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394in" svg:y="1.2839in">
            <draw:object draw:notify-on-update-of-ranges="Sheet1.A1:Sheet1.A2 Sheet1.A3:Sheet1.A7 Sheet1.A1:Sheet1.A1 Sheet1.B3:Sheet1.B7 Sheet1.A1:Sheet1.A2 Sheet1.C3:Sheet1.C7 Sheet1.C1:Sheet1.C1 Sheet1.D3:Sheet1.D7 Sheet1.E1:Sheet1.E1 Sheet1.F3:Sheet1.F7 Sheet1.E3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17in" svg:height="3.5453in" svg:x="3.2594in" svg:y="4.2563in">
            <draw:object draw:notify-on-update-of-ranges="Sheet1.A36:Sheet1.A37 Sheet1.A38:Sheet1.A48 Sheet1.B36:Sheet1.B37 Sheet1.B38:Sheet1.B48 Sheet1.A36:Sheet1.A37 Sheet1.A38:Sheet1.A48 Sheet1.C36:Sheet1.C37 Sheet1.C38:Sheet1.C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.6846in" svg:y="8.1921in">
            <draw:object draw:notify-on-update-of-ranges="Sheet1.A53:Sheet1.A53 Sheet1.A54:Sheet1.A64 Sheet1.B52:Sheet1.B52 Sheet1.B54:Sheet1.B64 Sheet1.A53:Sheet1.A53 Sheet1.A54:Sheet1.A64 Sheet1.C52:Sheet1.C52 Sheet1.C54:Sheet1.C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uffled</text:p>
          </table:table-cell>
          <table:table-cell/>
          <table:table-cell office:value-type="string" calcext:value-type="string">
            <text:p>Ordered</text:p>
          </table:table-cell>
          <table:table-cell/>
          <table:table-cell office:value-type="string" calcext:value-type="string">
            <text:p>Treeset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17527301" calcext:value-type="float">
            <text:p>0.0017527301</text:p>
          </table:table-cell>
          <table:table-cell office:value-type="float" office:value="1024" calcext:value-type="float">
            <text:p>1024</text:p>
          </table:table-cell>
          <table:table-cell office:value-type="float" office:value="0.0017881701" calcext:value-type="float">
            <text:p>0.0017881701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159099" calcext:value-type="float">
            <text:p>4.16E-0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54669199" calcext:value-type="float">
            <text:p>0.0054669199</text:p>
          </table:table-cell>
          <table:table-cell office:value-type="float" office:value="2048" calcext:value-type="float">
            <text:p>2048</text:p>
          </table:table-cell>
          <table:table-cell office:value-type="float" office:value="0.0053717402" calcext:value-type="float">
            <text:p>0.0053717402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6999" calcext:value-type="float">
            <text:p>1.70E-0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219450301" calcext:value-type="float">
            <text:p>0.0219450301</text:p>
          </table:table-cell>
          <table:table-cell office:value-type="float" office:value="4096" calcext:value-type="float">
            <text:p>4096</text:p>
          </table:table-cell>
          <table:table-cell office:value-type="float" office:value="0.0218708199" calcext:value-type="float">
            <text:p>0.0218708199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3091298" calcext:value-type="float">
            <text:p>3.09E-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909590701" calcext:value-type="float">
            <text:p>0.0909590701</text:p>
          </table:table-cell>
          <table:table-cell office:value-type="float" office:value="8192" calcext:value-type="float">
            <text:p>8192</text:p>
          </table:table-cell>
          <table:table-cell office:value-type="float" office:value="0.0900618801" calcext:value-type="float">
            <text:p>0.0900618801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4769901" calcext:value-type="float">
            <text:p>4.77E-0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3804014898" calcext:value-type="float">
            <text:p>0.3804014898</text:p>
          </table:table-cell>
          <table:table-cell office:value-type="float" office:value="16384" calcext:value-type="float">
            <text:p>16384</text:p>
          </table:table-cell>
          <table:table-cell office:value-type="float" office:value="0.3792694901" calcext:value-type="float">
            <text:p>0.3792694901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96419" calcext:value-type="float">
            <text:p>9.64E-04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/>
          <table:table-cell office:value-type="string" calcext:value-type="string">
            <text:p>BadHashFunctor</text:p>
          </table:table-cell>
          <table:table-cell office:value-type="string" calcext:value-type="string">
            <text:p>MediocreHashFunctor</text:p>
          </table:table-cell>
          <table:table-cell office:value-type="string" calcext:value-type="string">
            <text:p>GoodHashFun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45351" calcext:value-type="float">
            <text:p>45351</text:p>
          </table:table-cell>
          <table:table-cell office:value-type="float" office:value="43887" calcext:value-type="float">
            <text:p>43887</text:p>
          </table:table-cell>
          <table:table-cell office:value-type="float" office:value="8856" calcext:value-type="float">
            <text:p>8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for 45402 word dictionary</text:p>
          </table:table-cell>
          <table:table-cell office:value-type="string" calcext:value-type="string">
            <text:p>104ms</text:p>
          </table:table-cell>
          <table:table-cell office:value-type="string" calcext:value-type="string">
            <text:p>19ms</text:p>
          </table:table-cell>
          <table:table-cell office:value-type="string" calcext:value-type="string">
            <text:p>2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lk Construction</text:p>
          </table:table-cell>
          <table:table-cell office:value-type="string" calcext:value-type="string">
            <text:p>Successive Inser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ms)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58836" calcext:value-type="float">
            <text:p>0.458836</text:p>
          </table:table-cell>
          <table:table-cell office:value-type="float" office:value="0.068483" calcext:value-type="float">
            <text:p>0.068483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98186" calcext:value-type="float">
            <text:p>0.298186</text:p>
          </table:table-cell>
          <table:table-cell office:value-type="float" office:value="0.001117" calcext:value-type="float">
            <text:p>0.001117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764707" calcext:value-type="float">
            <text:p>0.764707</text:p>
          </table:table-cell>
          <table:table-cell office:value-type="float" office:value="0.001832" calcext:value-type="float">
            <text:p>0.001832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401671" calcext:value-type="float">
            <text:p>1.401671</text:p>
          </table:table-cell>
          <table:table-cell office:value-type="float" office:value="0.003739" calcext:value-type="float">
            <text:p>0.003739</text:p>
          </table:table-cell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696085" calcext:value-type="float">
            <text:p>2.696085</text:p>
          </table:table-cell>
          <table:table-cell office:value-type="float" office:value="0.01107" calcext:value-type="float">
            <text:p>0.01107</text:p>
          </table:table-cell>
          <table:table-cell table:number-columns-repeated="3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.40248" calcext:value-type="float">
            <text:p>5.40248</text:p>
          </table:table-cell>
          <table:table-cell office:value-type="float" office:value="0.021601" calcext:value-type="float">
            <text:p>0.021601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.550387" calcext:value-type="float">
            <text:p>11.550387</text:p>
          </table:table-cell>
          <table:table-cell office:value-type="float" office:value="0.036691" calcext:value-type="float">
            <text:p>0.036691</text:p>
          </table:table-cell>
          <table:table-cell table:number-columns-repeated="3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677414" calcext:value-type="float">
            <text:p>24.677414</text:p>
          </table:table-cell>
          <table:table-cell office:value-type="float" office:value="0.074021" calcext:value-type="float">
            <text:p>0.074021</text:p>
          </table:table-cell>
          <table:table-cell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5.569282" calcext:value-type="float">
            <text:p>55.569282</text:p>
          </table:table-cell>
          <table:table-cell office:value-type="float" office:value="0.147907" calcext:value-type="float">
            <text:p>0.147907</text:p>
          </table:table-cell>
          <table:table-cell table:number-columns-repeated="3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5.501447" calcext:value-type="float">
            <text:p>115.501447</text:p>
          </table:table-cell>
          <table:table-cell office:value-type="float" office:value="0.499056" calcext:value-type="float">
            <text:p>0.499056</text:p>
          </table:table-cell>
          <table:table-cell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4.591907" calcext:value-type="float">
            <text:p>254.591907</text:p>
          </table:table-cell>
          <table:table-cell office:value-type="float" office:value="1.329124" calcext:value-type="float">
            <text:p>1.329124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Typical</text:p>
          </table:table-cell>
          <table:table-cell office:value-type="string" calcext:value-type="string">
            <text:p>Analysis Algorit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s</text:p>
          </table:table-cell>
          <table:table-cell office:value-type="string" calcext:value-type="string">
            <text:p>t(ns)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2240" calcext:value-type="float">
            <text:p>2.24E+03</text:p>
          </table:table-cell>
          <table:table-cell office:value-type="float" office:value="42614" calcext:value-type="float">
            <text:p>42614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409" calcext:value-type="float">
            <text:p>4.09E+02</text:p>
          </table:table-cell>
          <table:table-cell office:value-type="float" office:value="15675" calcext:value-type="float">
            <text:p>15675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453" calcext:value-type="float">
            <text:p>4.53E+02</text:p>
          </table:table-cell>
          <table:table-cell office:value-type="float" office:value="30447" calcext:value-type="float">
            <text:p>30447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546" calcext:value-type="float">
            <text:p>5.46E+02</text:p>
          </table:table-cell>
          <table:table-cell office:value-type="float" office:value="64698" calcext:value-type="float">
            <text:p>64698</text:p>
          </table:table-cell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office:value-type="float" office:value="259" calcext:value-type="float">
            <text:p>2.59E+02</text:p>
          </table:table-cell>
          <table:table-cell office:value-type="float" office:value="153784" calcext:value-type="float">
            <text:p>153784</text:p>
          </table:table-cell>
          <table:table-cell table:number-columns-repeated="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" office:value-type="float" office:value="266" calcext:value-type="float">
            <text:p>2.66E+02</text:p>
          </table:table-cell>
          <table:table-cell office:value-type="float" office:value="353475" calcext:value-type="float">
            <text:p>353475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355" calcext:value-type="float">
            <text:p>3.55E+02</text:p>
          </table:table-cell>
          <table:table-cell office:value-type="float" office:value="665121" calcext:value-type="float">
            <text:p>665121</text:p>
          </table:table-cell>
          <table:table-cell table:number-columns-repeated="3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style-name="ce1" office:value-type="float" office:value="340" calcext:value-type="float">
            <text:p>3.40E+02</text:p>
          </table:table-cell>
          <table:table-cell office:value-type="float" office:value="1623062" calcext:value-type="float">
            <text:p>1623062</text:p>
          </table:table-cell>
          <table:table-cell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1" office:value-type="float" office:value="83" calcext:value-type="float">
            <text:p>8.30E+01</text:p>
          </table:table-cell>
          <table:table-cell office:value-type="float" office:value="5162537" calcext:value-type="float">
            <text:p>5162537</text:p>
          </table:table-cell>
          <table:table-cell table:number-columns-repeated="3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" office:value-type="float" office:value="29" calcext:value-type="float">
            <text:p>2.90E+01</text:p>
          </table:table-cell>
          <table:table-cell table:style-name="ce1" office:value-type="float" office:value="12453062" calcext:value-type="float">
            <text:p>1.25E+07</text:p>
          </table:table-cell>
          <table:table-cell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1" office:value-type="float" office:value="53" calcext:value-type="float">
            <text:p>5.30E+01</text:p>
          </table:table-cell>
          <table:table-cell table:style-name="ce1" office:value-type="float" office:value="19950385" calcext:value-type="float">
            <text:p>2.00E+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5T11:02:39.439000000</meta:creation-date>
    <dc:date>2025-12-15T12:53:31.535000000</dc:date>
    <meta:editing-duration>PT14M44S</meta:editing-duration>
    <meta:editing-cycles>2</meta:editing-cycles>
    <meta:generator>LibreOffice/7.2.5.2$Windows_X86_64 LibreOffice_project/499f9727c189e6ef3471021d6132d4c694f357e5</meta:generator>
    <meta:document-statistic meta:table-count="1" meta:cell-count="12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07cm" svg:y="0.316cm" chart:style-name="ch2">
          <text:p>add() n items</text:p>
        </chart:title>
        <chart:legend chart:legend-position="end" svg:x="13.386cm" svg:y="3.703cm" style:legend-expansion="high" chart:style-name="ch3"/>
        <chart:plot-area chart:style-name="ch4" table:cell-range-address="Sheet1.A1:Sheet1.A7 Sheet1.B3:Sheet1.B7 Sheet1.C1:Sheet1.C1 Sheet1.D3:Sheet1.D7 Sheet1.E1:Sheet1.E1 Sheet1.F3:Sheet1.F7" chart:data-source-has-labels="row" svg:x="1.331cm" svg:y="1.275cm" svg:width="11.735cm" svg:height="6.564cm">
          <chart:coordinate-region svg:x="2.243cm" svg:y="1.474cm" svg:width="10.358cm" svg:height="5.718cm"/>
          <chart:axis chart:dimension="x" chart:name="primary-x" chart:style-name="ch5">
            <chart:title svg:x="7.048cm" svg:y="8.019cm" chart:style-name="ch6">
              <text:p>n</text:p>
            </chart:title>
          </chart:axis>
          <chart:axis chart:dimension="y" chart:name="primary-y" chart:style-name="ch7">
            <chart:title svg:x="0.451cm" svg:y="5.143cm" chart:style-name="ch8">
              <text:p>time (s)</text:p>
            </chart:title>
            <chart:grid chart:style-name="ch9" chart:class="major"/>
          </chart:axis>
          <chart:series chart:style-name="ch10" chart:values-cell-range-address="Sheet1.B3:Sheet1.B7" chart:label-cell-address="Sheet1.A1:Sheet1.A1" chart:class="chart:scatter">
            <chart:domain table:cell-range-address="Sheet1.A3:Sheet1.A7"/>
            <chart:data-point chart:repeated="5"/>
          </chart:series>
          <chart:series chart:style-name="ch11" chart:values-cell-range-address="Sheet1.D3:Sheet1.D7" chart:label-cell-address="Sheet1.C1:Sheet1.C1" chart:class="chart:scatter">
            <chart:domain table:cell-range-address="Sheet1.C3:Sheet1.C7"/>
            <chart:data-point chart:repeated="5"/>
          </chart:series>
          <chart:series chart:style-name="ch12" chart:values-cell-range-address="Sheet1.F3:Sheet1.F7" chart:label-cell-address="Sheet1.E1:Sheet1.E1" chart:class="chart:scatter">
            <chart:domain table:cell-range-address="Sheet1.E3:Sheet1.E7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uffled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Ordered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Treese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3:Sheet1.A7</svg:desc>
                </draw:g>
              </table:table-cell>
              <table:table-cell office:value-type="float" office:value="0.0017527301">
                <text:p>0.0017527301</text:p>
                <draw:g>
                  <svg:desc>Sheet1.B3:Sheet1.B7</svg:desc>
                </draw:g>
              </table:table-cell>
              <table:table-cell office:value-type="float" office:value="1024">
                <text:p>1024</text:p>
                <draw:g>
                  <svg:desc>Sheet1.C3:Sheet1.C7</svg:desc>
                </draw:g>
              </table:table-cell>
              <table:table-cell office:value-type="float" office:value="0.0017881701">
                <text:p>0.0017881701</text:p>
                <draw:g>
                  <svg:desc>Sheet1.D3:Sheet1.D7</svg:desc>
                </draw:g>
              </table:table-cell>
              <table:table-cell office:value-type="float" office:value="1024">
                <text:p>1024</text:p>
                <draw:g>
                  <svg:desc>Sheet1.E3:Sheet1.E7</svg:desc>
                </draw:g>
              </table:table-cell>
              <table:table-cell office:value-type="float" office:value="0.0004159099">
                <text:p>0.0004159099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54669199">
                <text:p>0.0054669199</text:p>
              </table:table-cell>
              <table:table-cell office:value-type="float" office:value="2048">
                <text:p>2048</text:p>
              </table:table-cell>
              <table:table-cell office:value-type="float" office:value="0.0053717402">
                <text:p>0.0053717402</text:p>
              </table:table-cell>
              <table:table-cell office:value-type="float" office:value="2048">
                <text:p>2048</text:p>
              </table:table-cell>
              <table:table-cell office:value-type="float" office:value="0.00016999">
                <text:p>0.0001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219450301">
                <text:p>0.0219450301</text:p>
              </table:table-cell>
              <table:table-cell office:value-type="float" office:value="4096">
                <text:p>4096</text:p>
              </table:table-cell>
              <table:table-cell office:value-type="float" office:value="0.0218708199">
                <text:p>0.0218708199</text:p>
              </table:table-cell>
              <table:table-cell office:value-type="float" office:value="4096">
                <text:p>4096</text:p>
              </table:table-cell>
              <table:table-cell office:value-type="float" office:value="0.0003091298">
                <text:p>0.0003091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909590701">
                <text:p>0.0909590701</text:p>
              </table:table-cell>
              <table:table-cell office:value-type="float" office:value="8192">
                <text:p>8192</text:p>
              </table:table-cell>
              <table:table-cell office:value-type="float" office:value="0.0900618801">
                <text:p>0.0900618801</text:p>
              </table:table-cell>
              <table:table-cell office:value-type="float" office:value="8192">
                <text:p>8192</text:p>
              </table:table-cell>
              <table:table-cell office:value-type="float" office:value="0.0004769901">
                <text:p>0.0004769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3804014898">
                <text:p>0.3804014898</text:p>
              </table:table-cell>
              <table:table-cell office:value-type="float" office:value="16384">
                <text:p>16384</text:p>
              </table:table-cell>
              <table:table-cell office:value-type="float" office:value="0.3792694901">
                <text:p>0.3792694901</text:p>
              </table:table-cell>
              <table:table-cell office:value-type="float" office:value="16384">
                <text:p>16384</text:p>
              </table:table-cell>
              <table:table-cell office:value-type="float" office:value="0.00096419">
                <text:p>0.00096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0.51cm" svg:y="3.955cm" style:legend-expansion="high" chart:style-name="ch2"/>
        <chart:plot-area chart:style-name="ch3" table:cell-range-address="Sheet1.A36:Sheet1.C48" chart:data-source-has-labels="row" svg:x="1.33cm" svg:y="0.18cm" svg:width="8.861cm" svg:height="7.665cm">
          <chart:coordinate-region svg:x="2.137cm" svg:y="0.38cm" svg:width="7.404cm" svg:height="6.818cm"/>
          <chart:axis chart:dimension="x" chart:name="primary-x" chart:style-name="ch4">
            <chart:title svg:x="5.61cm" svg:y="8.025cm" chart:style-name="ch5">
              <text:p>n</text:p>
            </chart:title>
          </chart:axis>
          <chart:axis chart:dimension="y" chart:name="primary-y" chart:style-name="ch6">
            <chart:title svg:x="0.451cm" svg:y="4.744cm" chart:style-name="ch7">
              <text:p>Time(ms)</text:p>
            </chart:title>
            <chart:grid chart:style-name="ch8" chart:class="major"/>
          </chart:axis>
          <chart:series chart:style-name="ch9" chart:values-cell-range-address="Sheet1.B38:Sheet1.B48" chart:label-cell-address="Sheet1.B36:Sheet1.B37" chart:class="chart:scatter">
            <chart:domain table:cell-range-address="Sheet1.A38:Sheet1.A48"/>
            <chart:data-point chart:repeated="11"/>
          </chart:series>
          <chart:series chart:style-name="ch10" chart:values-cell-range-address="Sheet1.C38:Sheet1.C48" chart:label-cell-address="Sheet1.C36:Sheet1.C37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lk Construction t(ms)</text:p>
                <text:list>
                  <text:list-item>
                    <text:p>Bulk Construction</text:p>
                  </text:list-item>
                  <text:list-item>
                    <text:p>t(ms)</text:p>
                  </text:list-item>
                </text:list>
                <draw:g>
                  <svg:desc>Sheet1.B36:Sheet1.B37</svg:desc>
                </draw:g>
              </table:table-cell>
              <table:table-cell office:value-type="string">
                <text:p>Successive Insertion t(ms)</text:p>
                <text:list>
                  <text:list-item>
                    <text:p>Successive Insertion</text:p>
                  </text:list-item>
                  <text:list-item>
                    <text:p>t(ms)</text:p>
                  </text:list-item>
                </text:list>
                <draw:g>
                  <svg:desc>Sheet1.C36:Sheet1.C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38:Sheet1.A48</svg:desc>
                </draw:g>
              </table:table-cell>
              <table:table-cell office:value-type="float" office:value="0.458836">
                <text:p>0.458836</text:p>
                <draw:g>
                  <svg:desc>Sheet1.B38:Sheet1.B48</svg:desc>
                </draw:g>
              </table:table-cell>
              <table:table-cell office:value-type="float" office:value="0.068483">
                <text:p>0.068483</text:p>
                <draw:g>
                  <svg:desc>Sheet1.C38:Sheet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298186">
                <text:p>0.298186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764707">
                <text:p>0.764707</text:p>
              </table:table-cell>
              <table:table-cell office:value-type="float" office:value="0.001832">
                <text:p>0.001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.401671">
                <text:p>1.401671</text:p>
              </table:table-cell>
              <table:table-cell office:value-type="float" office:value="0.003739">
                <text:p>0.003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2.696085">
                <text:p>2.696085</text:p>
              </table:table-cell>
              <table:table-cell office:value-type="float" office:value="0.01107">
                <text:p>0.01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5.40248">
                <text:p>5.40248</text:p>
              </table:table-cell>
              <table:table-cell office:value-type="float" office:value="0.021601">
                <text:p>0.021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1.550387">
                <text:p>11.550387</text:p>
              </table:table-cell>
              <table:table-cell office:value-type="float" office:value="0.036691">
                <text:p>0.036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24.677414">
                <text:p>24.677414</text:p>
              </table:table-cell>
              <table:table-cell office:value-type="float" office:value="0.074021">
                <text:p>0.074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55.569282">
                <text:p>55.569282</text:p>
              </table:table-cell>
              <table:table-cell office:value-type="float" office:value="0.147907">
                <text:p>0.147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15.501447">
                <text:p>115.501447</text:p>
              </table:table-cell>
              <table:table-cell office:value-type="float" office:value="0.499056">
                <text:p>0.499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254.591907">
                <text:p>254.591907</text:p>
              </table:table-cell>
              <table:table-cell office:value-type="float" office:value="1.329124">
                <text:p>1.329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2cm" svg:y="3.952cm" style:legend-expansion="high" chart:style-name="ch2"/>
        <chart:plot-area chart:style-name="ch3" table:cell-range-address="Sheet1.A53:Sheet1.A64 Sheet1.B52:Sheet1.C52 Sheet1.B54:Sheet1.C64" chart:data-source-has-labels="row" svg:x="1.331cm" svg:y="0.18cm" svg:width="10.121cm" svg:height="7.659cm">
          <chart:coordinate-region svg:x="3.064cm" svg:y="0.379cm" svg:width="7.738cm" svg:height="6.813cm"/>
          <chart:axis chart:dimension="x" chart:name="primary-x" chart:style-name="ch4">
            <chart:title svg:x="6.241cm" svg:y="8.019cm" chart:style-name="ch5">
              <text:p>n</text:p>
            </chart:title>
          </chart:axis>
          <chart:axis chart:dimension="y" chart:name="primary-y" chart:style-name="ch6">
            <chart:title svg:x="0.451cm" svg:y="4.701cm" chart:style-name="ch7">
              <text:p>Time(ns)</text:p>
            </chart:title>
            <chart:grid chart:style-name="ch8" chart:class="major"/>
          </chart:axis>
          <chart:series chart:style-name="ch9" chart:values-cell-range-address="Sheet1.B54:Sheet1.B64" chart:label-cell-address="Sheet1.B52:Sheet1.B52" chart:class="chart:scatter">
            <chart:domain table:cell-range-address="Sheet1.A54:Sheet1.A64"/>
            <chart:data-point chart:repeated="11"/>
          </chart:series>
          <chart:series chart:style-name="ch10" chart:values-cell-range-address="Sheet1.C54:Sheet1.C64" chart:label-cell-address="Sheet1.C52:Sheet1.C5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ypical</text:p>
                <draw:g>
                  <svg:desc>Sheet1.B52:Sheet1.B52</svg:desc>
                </draw:g>
              </table:table-cell>
              <table:table-cell office:value-type="string">
                <text:p>Analysis Algorithm</text:p>
                <draw:g>
                  <svg:desc>Sheet1.C52:Sheet1.C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54:Sheet1.A64</svg:desc>
                </draw:g>
              </table:table-cell>
              <table:table-cell office:value-type="float" office:value="2240">
                <text:p>2240</text:p>
                <draw:g>
                  <svg:desc>Sheet1.B54:Sheet1.B64</svg:desc>
                </draw:g>
              </table:table-cell>
              <table:table-cell office:value-type="float" office:value="42614">
                <text:p>42614</text:p>
                <draw:g>
                  <svg:desc>Sheet1.C54:Sheet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409">
                <text:p>409</text:p>
              </table:table-cell>
              <table:table-cell office:value-type="float" office:value="15675">
                <text:p>15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453">
                <text:p>453</text:p>
              </table:table-cell>
              <table:table-cell office:value-type="float" office:value="30447">
                <text:p>30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546">
                <text:p>546</text:p>
              </table:table-cell>
              <table:table-cell office:value-type="float" office:value="64698">
                <text:p>64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259">
                <text:p>259</text:p>
              </table:table-cell>
              <table:table-cell office:value-type="float" office:value="153784">
                <text:p>153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266">
                <text:p>266</text:p>
              </table:table-cell>
              <table:table-cell office:value-type="float" office:value="353475">
                <text:p>35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355">
                <text:p>355</text:p>
              </table:table-cell>
              <table:table-cell office:value-type="float" office:value="665121">
                <text:p>665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340">
                <text:p>340</text:p>
              </table:table-cell>
              <table:table-cell office:value-type="float" office:value="1623062">
                <text:p>1623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83">
                <text:p>83</text:p>
              </table:table-cell>
              <table:table-cell office:value-type="float" office:value="5162537">
                <text:p>5162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29">
                <text:p>29</text:p>
              </table:table-cell>
              <table:table-cell office:value-type="float" office:value="12453062">
                <text:p>12453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53">
                <text:p>53</text:p>
              </table:table-cell>
              <table:table-cell office:value-type="float" office:value="19950385">
                <text:p>19950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