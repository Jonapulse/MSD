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officeooo:rsid="0004da81" officeooo:paragraph-rsid="0004da81"/>
    </style:style>
    <style:style style:name="P2" style:family="paragraph" style:parent-style-name="Standard">
      <style:text-properties fo:font-style="italic" officeooo:rsid="0004da81" officeooo:paragraph-rsid="0004da81" style:font-style-asian="italic" style:font-style-complex="italic"/>
    </style:style>
    <style:style style:name="P3" style:family="paragraph" style:parent-style-name="Standard">
      <style:text-properties officeooo:rsid="000588ee" officeooo:paragraph-rsid="000588ee"/>
    </style:style>
    <style:style style:name="T1" style:family="text">
      <style:text-properties fo:font-style="italic" style:font-style-asian="italic" style:font-style-complex="italic"/>
    </style:style>
    <style:style style:name="T2" style:family="text">
      <style:text-properties officeooo:rsid="000588ee"/>
    </style:style>
    <style:style style:name="T3" style:family="text">
      <style:text-properties officeooo:rsid="000736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6 Analysis – 6012 – Jon Pulsipher</text:p>
      <text:p text:style-name="P1"/>
      <text:p text:style-name="P1">1) <text:span text:style-name="T1">Explain how the order that items are inserted into a BST affects the construction of the tree, and how this construction affects the running time of subsequent calls to the add, contains, and remove methods.</text:span></text:p>
      <text:p text:style-name="P2"/>
      <text:p text:style-name="P1">Inserting items into a BST without <text:span text:style-name="T2">considering the balance of the tree can create unbalanced trees with heights up to N (for example when inserting elements into a tree in order.) This can reduce or erase the benefits of a BST’s quick add, contains, and remove – with a balanced tree they are O(nlgn), but a fully lopsided tree will be O(n^2) because it’s look-up</text:span></text:p>
      <text:p text:style-name="P1"/>
      <text:p text:style-name="P1">2) <text:span text:style-name="T1">Design and conduct an experiment to illustrate the effect of building an N-item BST by inserting the N items in sorted order versus inserting the N items in a random order. Carefully describe your experiment, so that anyone reading this document could replicate your results.</text:span></text:p>
      <text:p text:style-name="P1"/>
      <text:p text:style-name="P3">I <text:span text:style-name="T3">wi</text:span>ll take int arrays of size 2^10 to 2^20 in powers of 2, ordered and shuffled, <text:span text:style-name="T3">then measure how long it takes to build those arrays into BSTs.</text:span></text:p>
      <text:p text:style-name="P1"/>
      <text:p text:style-name="P1">3) <text:span text:style-name="T1">Plot the results of your experiment. Since the organization of your plot(s) is not specified here, the labels and titles of your plots(s), as well as your interpretation of the plots, are critical.</text:span></text:p>
      <text:p text:style-name="P2"/>
      <text:p text:style-name="P2"/>
      <text:p text:style-name="P1"/>
      <text:p text:style-name="P1">4) <text:span text:style-name="T1">Design and conduct an experiment to illustrate the differing performance in a BST with a balance requirement and a BST that is allowed to be unbalanced. Use Java's TreeSet as an example of the former and your BinarySearchTree as an example of the latter. Carefully describe your experiment, so that anyone reading this document could replicate your results. Plot the results of your experiment. Since the organization of your plot(s) is not specified here, the labels and titles of your plots(s), as well as your interpretation of the plots, are critical.</text:span></text:p>
      <text:p text:style-name="P1"/>
      <text:p text:style-name="P1">5) <text:span text:style-name="T1">Discuss whether a BST is a good data structure for representing a dictionary. If you think that it is, explain why. If you think that it is not, discuss other data structure(s) that you think would be better. (Keep in mind that for a typical dictionary, insertions and deletions of words are infrequent compared to word searches.)</text:span></text:p>
      <text:p text:style-name="P1"/>
      <text:p text:style-name="P1">6) <text:span text:style-name="T1">Many dictionaries are in alphabetical order. What problem will it create for a dictionary BST if it is constructed by inserting words in alphabetical order? What can you do to fix the probl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7:26:27.596387000</meta:creation-date>
    <dc:date>2025-12-10T13:28:24.724127000</dc:date>
    <meta:editing-duration>P10DT18H54M54S</meta:editing-duration>
    <meta:editing-cycles>1</meta:editing-cycles>
    <meta:document-statistic meta:table-count="0" meta:image-count="0" meta:object-count="0" meta:page-count="1" meta:paragraph-count="9" meta:word-count="398" meta:character-count="2316" meta:non-whitespace-character-count="1924"/>
    <meta:generator>LibreOffice/25.8.2.2$MacOSX_AARCH64 LibreOffice_project/d401f2107ccab8f924a8e2df40f573aab7605b6f</meta:generator>
  </office:meta>
</office:document-meta>
</file>