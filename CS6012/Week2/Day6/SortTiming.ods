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0 thresh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1<text:span text:style-name="T1">st</text:span> capture, when I think I might have hit the threshold and started calling both sorts, hence why it always increased…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4T08:21:02.770000000</meta:creation-date>
    <dc:date>2025-11-14T08:31:44.172000000</dc:date>
    <meta:editing-duration>PT1S</meta:editing-duration>
    <meta:editing-cycles>1</meta:editing-cycles>
    <meta:document-statistic meta:table-count="1" meta:cell-count="183" meta:object-count="0"/>
    <meta:generator>LibreOffice/7.2.5.2$Windows_X86_64 LibreOffice_project/499f9727c189e6ef3471021d6132d4c694f357e5</meta:generator>
  </office:meta>
</office:document-meta>
</file>