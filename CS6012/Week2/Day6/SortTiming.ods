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9291in" svg:y="7.287in">
            <draw:object draw:notify-on-update-of-ranges="Sheet1.A25:Sheet1.A25 Sheet1.A26:Sheet1.A40 Sheet1.A24:Sheet1.A24 Sheet1.B26:Sheet1.B40 Sheet1.C24:Sheet1.C24 Sheet1.D26:Sheet1.D40 Sheet1.C26:Sheet1.C40 Sheet1.E24:Sheet1.E24 Sheet1.F26:Sheet1.F40 Sheet1.E26:Sheet1.E40 Sheet1.G24:Sheet1.G24 Sheet1.H26:Sheet1.H40 Sheet1.G26:Sheet1.G40 Sheet1.I24:Sheet1.I24 Sheet1.J26:Sheet1.J40 Sheet1.I26:Sheet1.I40 Sheet1.K24:Sheet1.K24 Sheet1.L26:Sheet1.L40 Sheet1.C26:Sheet1.C40 Sheet1.M24:Sheet1.M24 Sheet1.N26:Sheet1.N40 Sheet1.M26:Sheet1.M40 Sheet1.O24:Sheet1.O24 Sheet1.P26:Sheet1.P40 Sheet1.O26:Sheet1.O40 Sheet1.Q24:Sheet1.Q24 Sheet1.R26:Sheet1.R40 Sheet1.P26:Sheet1.P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re-fix mergesort iss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 (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5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50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00 thresh)</text:p>
          </table:table-cell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29011" calcext:value-type="float">
            <text:p>2.90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08684" calcext:value-type="float">
            <text:p>4.09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90839" calcext:value-type="float">
            <text:p>3.91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08959" calcext:value-type="float">
            <text:p>4.09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89085" calcext:value-type="float">
            <text:p>3.89E-04</text:p>
          </table:table-cell>
          <table:table-cell table:number-columns-repeated="8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585075" calcext:value-type="float">
            <text:p>5.85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86791" calcext:value-type="float">
            <text:p>1.87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92316" calcext:value-type="float">
            <text:p>1.92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99159" calcext:value-type="float">
            <text:p>1.99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08832" calcext:value-type="float">
            <text:p>2.09E-04</text:p>
          </table:table-cell>
          <table:table-cell table:number-columns-repeated="8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34167" calcext:value-type="float">
            <text:p>2.3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28809" calcext:value-type="float">
            <text:p>5.29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13741" calcext:value-type="float">
            <text:p>5.1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4742" calcext:value-type="float">
            <text:p>5.47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70511" calcext:value-type="float">
            <text:p>5.71E-04</text:p>
          </table:table-cell>
          <table:table-cell table:number-columns-repeated="8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496363" calcext:value-type="float">
            <text:p>4.96E-04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79979" calcext:value-type="float">
            <text:p>0.001679979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29692" calcext:value-type="float">
            <text:p>0.001629692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73065" calcext:value-type="float">
            <text:p>0.001673065</text:p>
          </table:table-cell>
          <table:table-cell office:value-type="float" office:value="8192" calcext:value-type="float">
            <text:p>8192</text:p>
          </table:table-cell>
          <table:table-cell office:value-type="float" office:value="0.00173266" calcext:value-type="float">
            <text:p>0.00173266</text:p>
          </table:table-cell>
          <table:table-cell table:number-columns-repeated="8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0922" calcext:value-type="float">
            <text:p>0.001092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62586" calcext:value-type="float">
            <text:p>0.00562586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288885" calcext:value-type="float">
            <text:p>0.005288885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660712" calcext:value-type="float">
            <text:p>0.00566071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817085" calcext:value-type="float">
            <text:p>0.005817085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255037" calcext:value-type="float">
            <text:p>0.002255037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1179352" calcext:value-type="float">
            <text:p>0.021179352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309944" calcext:value-type="float">
            <text:p>0.0203099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420394" calcext:value-type="float">
            <text:p>0.02042039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907982" calcext:value-type="float">
            <text:p>0.020907982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489083" calcext:value-type="float">
            <text:p>0.00489083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9721717" calcext:value-type="float">
            <text:p>0.079721717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6021788" calcext:value-type="float">
            <text:p>0.076021788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9968503" calcext:value-type="float">
            <text:p>0.079968503</text:p>
          </table:table-cell>
          <table:table-cell office:value-type="float" office:value="65536" calcext:value-type="float">
            <text:p>65536</text:p>
          </table:table-cell>
          <table:table-cell office:value-type="float" office:value="0.112843523" calcext:value-type="float">
            <text:p>0.112843523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0646256" calcext:value-type="float">
            <text:p>0.010646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27246689" calcext:value-type="float">
            <text:p>0.327246689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09268316" calcext:value-type="float">
            <text:p>0.3092683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2953525" calcext:value-type="float">
            <text:p>0.3129535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984327" calcext:value-type="float">
            <text:p>0.31984327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1<text:span text:style-name="T1">st</text:span> capture, when I think I might have hit the threshold and started calling both sorts, hence why it always increased…?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 (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5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500 thresh)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29011" calcext:value-type="float">
            <text:p>2.90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08684" calcext:value-type="float">
            <text:p>4.09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90839" calcext:value-type="float">
            <text:p>3.91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08959" calcext:value-type="float">
            <text:p>4.09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89085" calcext:value-type="float">
            <text:p>3.89E-04</text:p>
          </table:table-cell>
          <table:table-cell table:number-columns-repeated="8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585075" calcext:value-type="float">
            <text:p>5.85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86791" calcext:value-type="float">
            <text:p>1.87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92316" calcext:value-type="float">
            <text:p>1.92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99159" calcext:value-type="float">
            <text:p>1.99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08832" calcext:value-type="float">
            <text:p>2.09E-04</text:p>
          </table:table-cell>
          <table:table-cell table:number-columns-repeated="8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34167" calcext:value-type="float">
            <text:p>2.3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28809" calcext:value-type="float">
            <text:p>5.29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13741" calcext:value-type="float">
            <text:p>5.1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4742" calcext:value-type="float">
            <text:p>5.47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70511" calcext:value-type="float">
            <text:p>5.71E-04</text:p>
          </table:table-cell>
          <table:table-cell table:number-columns-repeated="8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496363" calcext:value-type="float">
            <text:p>4.96E-04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79979" calcext:value-type="float">
            <text:p>0.001679979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29692" calcext:value-type="float">
            <text:p>0.001629692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73065" calcext:value-type="float">
            <text:p>0.001673065</text:p>
          </table:table-cell>
          <table:table-cell office:value-type="float" office:value="8192" calcext:value-type="float">
            <text:p>8192</text:p>
          </table:table-cell>
          <table:table-cell office:value-type="float" office:value="0.00173266" calcext:value-type="float">
            <text:p>0.00173266</text:p>
          </table:table-cell>
          <table:table-cell table:number-columns-repeated="8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0922" calcext:value-type="float">
            <text:p>0.001092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62586" calcext:value-type="float">
            <text:p>0.00562586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288885" calcext:value-type="float">
            <text:p>0.005288885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660712" calcext:value-type="float">
            <text:p>0.00566071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817085" calcext:value-type="float">
            <text:p>0.005817085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255037" calcext:value-type="float">
            <text:p>0.002255037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1179352" calcext:value-type="float">
            <text:p>0.021179352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309944" calcext:value-type="float">
            <text:p>0.0203099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420394" calcext:value-type="float">
            <text:p>0.02042039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907982" calcext:value-type="float">
            <text:p>0.020907982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489083" calcext:value-type="float">
            <text:p>0.00489083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9721717" calcext:value-type="float">
            <text:p>0.079721717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6021788" calcext:value-type="float">
            <text:p>0.076021788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9968503" calcext:value-type="float">
            <text:p>0.079968503</text:p>
          </table:table-cell>
          <table:table-cell office:value-type="float" office:value="65536" calcext:value-type="float">
            <text:p>65536</text:p>
          </table:table-cell>
          <table:table-cell office:value-type="float" office:value="0.112843523" calcext:value-type="float">
            <text:p>0.112843523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0646256" calcext:value-type="float">
            <text:p>0.010646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27246689" calcext:value-type="float">
            <text:p>0.327246689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09268316" calcext:value-type="float">
            <text:p>0.3092683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2953525" calcext:value-type="float">
            <text:p>0.3129535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984327" calcext:value-type="float">
            <text:p>0.31984327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 threshol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100000" calcext:value-type="float">
            <text:p>10000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10^7</text:p>
          </table:table-cell>
          <table:table-cell/>
          <table:table-cell office:value-type="string" calcext:value-type="string">
            <text:p>10^8 (all insertion sort)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47999" calcext:value-type="float">
            <text:p>4.80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8783" calcext:value-type="float">
            <text:p>3.88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6673" calcext:value-type="float">
            <text:p>4.67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21661" calcext:value-type="float">
            <text:p>2.17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3342" calcext:value-type="float">
            <text:p>3.34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3327" calcext:value-type="float">
            <text:p>3.33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3337" calcext:value-type="float">
            <text:p>3.34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3229" calcext:value-type="float">
            <text:p>3.23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3247" calcext:value-type="float">
            <text:p>3.25E-0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57773" calcext:value-type="float">
            <text:p>5.78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8096" calcext:value-type="float">
            <text:p>8.10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3779" calcext:value-type="float">
            <text:p>2.38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42241" calcext:value-type="float">
            <text:p>4.22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918" calcext:value-type="float">
            <text:p>2.92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855" calcext:value-type="float">
            <text:p>2.86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821" calcext:value-type="float">
            <text:p>2.82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832" calcext:value-type="float">
            <text:p>2.83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831" calcext:value-type="float">
            <text:p>2.83E-0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3302" calcext:value-type="float">
            <text:p>2.33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17483" calcext:value-type="float">
            <text:p>1.75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63748" calcext:value-type="float">
            <text:p>6.37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4947" calcext:value-type="float">
            <text:p>5.49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143" calcext:value-type="float">
            <text:p>5.14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142" calcext:value-type="float">
            <text:p>5.14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359" calcext:value-type="float">
            <text:p>5.36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135" calcext:value-type="float">
            <text:p>5.14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114" calcext:value-type="float">
            <text:p>5.11E-0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51203" calcext:value-type="float">
            <text:p>5.12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38917" calcext:value-type="float">
            <text:p>3.89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6805" calcext:value-type="float">
            <text:p>2.68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6281" calcext:value-type="float">
            <text:p>6.28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474" calcext:value-type="float">
            <text:p>4.47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419" calcext:value-type="float">
            <text:p>4.42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622" calcext:value-type="float">
            <text:p>4.62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927" calcext:value-type="float">
            <text:p>4.93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602" calcext:value-type="float">
            <text:p>4.60E-0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04066" calcext:value-type="float">
            <text:p>0.00104066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81348" calcext:value-type="float">
            <text:p>8.13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58695" calcext:value-type="float">
            <text:p>5.87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37617" calcext:value-type="float">
            <text:p>3.76E-04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13359" calcext:value-type="float">
            <text:p>0.00113359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07742" calcext:value-type="float">
            <text:p>7.74E-05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07692" calcext:value-type="float">
            <text:p>7.69E-05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07766" calcext:value-type="float">
            <text:p>7.77E-05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07739" calcext:value-type="float">
            <text:p>7.74E-0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32148" calcext:value-type="float">
            <text:p>0.00232148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83381" calcext:value-type="float">
            <text:p>0.00183381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30993" calcext:value-type="float">
            <text:p>0.00130993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87736" calcext:value-type="float">
            <text:p>8.77E-0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3589" calcext:value-type="float">
            <text:p>0.0013589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12852" calcext:value-type="float">
            <text:p>1.29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10723" calcext:value-type="float">
            <text:p>1.07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1065" calcext:value-type="float">
            <text:p>1.07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12143" calcext:value-type="float">
            <text:p>1.21E-04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487687" calcext:value-type="float">
            <text:p>0.00487687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396164" calcext:value-type="float">
            <text:p>0.00396164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9245" calcext:value-type="float">
            <text:p>0.0029245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03201" calcext:value-type="float">
            <text:p>0.00203201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314913" calcext:value-type="float">
            <text:p>0.00314913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18722" calcext:value-type="float">
            <text:p>1.87E-04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17102" calcext:value-type="float">
            <text:p>1.71E-04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16889" calcext:value-type="float">
            <text:p>1.69E-04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17338" calcext:value-type="float">
            <text:p>1.73E-04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052219" calcext:value-type="float">
            <text:p>0.01052219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864501" calcext:value-type="float">
            <text:p>0.00864501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662065" calcext:value-type="float">
            <text:p>0.00662065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469254" calcext:value-type="float">
            <text:p>0.00469254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63776" calcext:value-type="float">
            <text:p>0.0026377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10524" calcext:value-type="float">
            <text:p>0.00310524</text:p>
          </table:table-cell>
          <table:table-cell office:value-type="float" office:value="131072" calcext:value-type="float">
            <text:p>131072</text:p>
          </table:table-cell>
          <table:table-cell table:style-name="ce1" office:value-type="float" office:value="0.00045136" calcext:value-type="float">
            <text:p>4.51E-04</text:p>
          </table:table-cell>
          <table:table-cell office:value-type="float" office:value="131072" calcext:value-type="float">
            <text:p>131072</text:p>
          </table:table-cell>
          <table:table-cell table:style-name="ce1" office:value-type="float" office:value="0.00037249" calcext:value-type="float">
            <text:p>3.72E-04</text:p>
          </table:table-cell>
          <table:table-cell office:value-type="float" office:value="131072" calcext:value-type="float">
            <text:p>131072</text:p>
          </table:table-cell>
          <table:table-cell table:style-name="ce1" office:value-type="float" office:value="0.00036688" calcext:value-type="float">
            <text:p>3.67E-0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212609" calcext:value-type="float">
            <text:p>0.02212609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826014" calcext:value-type="float">
            <text:p>0.018260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39531" calcext:value-type="float">
            <text:p>0.0139531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059883" calcext:value-type="float">
            <text:p>0.01059883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613327" calcext:value-type="float">
            <text:p>0.00613327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381534" calcext:value-type="float">
            <text:p>0.00381534</text:p>
          </table:table-cell>
          <table:table-cell office:value-type="float" office:value="262144" calcext:value-type="float">
            <text:p>262144</text:p>
          </table:table-cell>
          <table:table-cell table:style-name="ce1" office:value-type="float" office:value="0.00045156" calcext:value-type="float">
            <text:p>4.52E-04</text:p>
          </table:table-cell>
          <table:table-cell office:value-type="float" office:value="262144" calcext:value-type="float">
            <text:p>262144</text:p>
          </table:table-cell>
          <table:table-cell table:style-name="ce1" office:value-type="float" office:value="0.00044946" calcext:value-type="float">
            <text:p>4.49E-04</text:p>
          </table:table-cell>
          <table:table-cell office:value-type="float" office:value="262144" calcext:value-type="float">
            <text:p>262144</text:p>
          </table:table-cell>
          <table:table-cell table:style-name="ce1" office:value-type="float" office:value="0.00048174" calcext:value-type="float">
            <text:p>4.82E-0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0001624" calcext:value-type="float">
            <text:p>0.100016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567457" calcext:value-type="float">
            <text:p>0.08567457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6843435" calcext:value-type="float">
            <text:p>0.06843435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5340237" calcext:value-type="float">
            <text:p>0.05340237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3393615" calcext:value-type="float">
            <text:p>0.03393615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814354" calcext:value-type="float">
            <text:p>0.01814354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14842" calcext:value-type="float">
            <text:p>0.0014842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147569" calcext:value-type="float">
            <text:p>0.00147569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149237" calcext:value-type="float">
            <text:p>0.0014923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1242948" calcext:value-type="float">
            <text:p>0.2124294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8405969" calcext:value-type="float">
            <text:p>0.1840596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5116227" calcext:value-type="float">
            <text:p>0.1511622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2002983" calcext:value-type="float">
            <text:p>0.1200298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8188674" calcext:value-type="float">
            <text:p>0.0818867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4984005" calcext:value-type="float">
            <text:p>0.0498400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943228" calcext:value-type="float">
            <text:p>0.0394322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2112481" calcext:value-type="float">
            <text:p>0.0211248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1567669" calcext:value-type="float">
            <text:p>0.01567669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4316271" calcext:value-type="float">
            <text:p>0.44316271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38144665" calcext:value-type="float">
            <text:p>0.381446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32453972" calcext:value-type="float">
            <text:p>0.3245397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26117468" calcext:value-type="float">
            <text:p>0.26117468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175047" calcext:value-type="float">
            <text:p>0.175047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11824276" calcext:value-type="float">
            <text:p>0.1182427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5450765" calcext:value-type="float">
            <text:p>0.054507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1897299" calcext:value-type="float">
            <text:p>0.01897299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0926839" calcext:value-type="float">
            <text:p>0.0092683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92825489" calcext:value-type="float">
            <text:p>0.9282548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80587715" calcext:value-type="float">
            <text:p>0.8058771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68790225" calcext:value-type="float">
            <text:p>0.6879022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55281258" calcext:value-type="float">
            <text:p>0.5528125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39244235" calcext:value-type="float">
            <text:p>0.3924423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28653811" calcext:value-type="float">
            <text:p>0.2865381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15395144" calcext:value-type="float">
            <text:p>0.1539514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01927864" calcext:value-type="float">
            <text:p>0.0192786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03607466" calcext:value-type="float">
            <text:p>0.03607466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.94423625" calcext:value-type="float">
            <text:p>1.94423625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.69587297" calcext:value-type="float">
            <text:p>1.69587297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.48235481" calcext:value-type="float">
            <text:p>1.48235481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.18708863" calcext:value-type="float">
            <text:p>1.18708863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88385134" calcext:value-type="float">
            <text:p>0.88385134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6209824" calcext:value-type="float">
            <text:p>0.6209824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37408696" calcext:value-type="float">
            <text:p>0.37408696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03609886" calcext:value-type="float">
            <text:p>0.03609886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0481072" calcext:value-type="float">
            <text:p>0.0481072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4.07791845" calcext:value-type="float">
            <text:p>4.07791845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.53209748" calcext:value-type="float">
            <text:p>3.5320974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.17620311" calcext:value-type="float">
            <text:p>3.17620311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.56023466" calcext:value-type="float">
            <text:p>2.56023466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.88502364" calcext:value-type="float">
            <text:p>1.8850236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.4433003" calcext:value-type="float">
            <text:p>1.4433003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.90360528" calcext:value-type="float">
            <text:p>0.9036052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.29360866" calcext:value-type="float">
            <text:p>0.29360866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.06195102" calcext:value-type="float">
            <text:p>0.06195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07:20:49.3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14T08:21:02.770000000</meta:creation-date>
    <dc:date>2025-11-19T07:48:34.749000000</dc:date>
    <meta:editing-duration>PT7M15S</meta:editing-duration>
    <meta:editing-cycles>2</meta:editing-cycles>
    <meta:generator>LibreOffice/7.2.5.2$Windows_X86_64 LibreOffice_project/499f9727c189e6ef3471021d6132d4c694f357e5</meta:generator>
    <meta:document-statistic meta:table-count="1" meta:cell-count="48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02cm" svg:y="0.316cm" chart:style-name="ch2">
          <text:p>InsertionSort Threshold</text:p>
        </chart:title>
        <chart:legend chart:legend-position="end" svg:x="11.19cm" svg:y="2.209cm" style:legend-expansion="high" chart:style-name="ch3"/>
        <chart:plot-area chart:style-name="ch4" table:cell-range-address="Sheet1.A24:Sheet1.A40 Sheet1.B26:Sheet1.B40 Sheet1.C24:Sheet1.C24 Sheet1.D26:Sheet1.D40 Sheet1.E24:Sheet1.E24 Sheet1.F26:Sheet1.F40 Sheet1.G24:Sheet1.G24 Sheet1.H26:Sheet1.H40 Sheet1.I24:Sheet1.I24 Sheet1.J26:Sheet1.J40 Sheet1.K24:Sheet1.K24 Sheet1.L26:Sheet1.L40 Sheet1.M24:Sheet1.M24 Sheet1.N26:Sheet1.N40 Sheet1.O24:Sheet1.O24 Sheet1.P26:Sheet1.P40 Sheet1.Q24:Sheet1.Q24 Sheet1.R26:Sheet1.R40" chart:data-source-has-labels="row" svg:x="1.331cm" svg:y="1.275cm" svg:width="9.539cm" svg:height="6.564cm">
          <chart:coordinate-region svg:x="3.064cm" svg:y="1.474cm" svg:width="7.063cm" svg:height="5.718cm"/>
          <chart:axis chart:dimension="x" chart:name="primary-x" chart:style-name="ch5">
            <chart:title svg:x="5.95cm" svg:y="8.019cm" chart:style-name="ch6">
              <text:p>n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Sheet1.B26:Sheet1.B40" chart:label-cell-address="Sheet1.A24:Sheet1.A24" chart:class="chart:scatter">
            <chart:domain table:cell-range-address="Sheet1.A26:Sheet1.A40"/>
            <chart:data-point chart:repeated="15"/>
          </chart:series>
          <chart:series chart:style-name="ch11" chart:values-cell-range-address="Sheet1.D26:Sheet1.D40" chart:label-cell-address="Sheet1.C24:Sheet1.C24" chart:class="chart:scatter">
            <chart:domain table:cell-range-address="Sheet1.C26:Sheet1.C40"/>
            <chart:data-point chart:repeated="15"/>
          </chart:series>
          <chart:series chart:style-name="ch12" chart:values-cell-range-address="Sheet1.F26:Sheet1.F40" chart:label-cell-address="Sheet1.E24:Sheet1.E24" chart:class="chart:scatter">
            <chart:domain table:cell-range-address="Sheet1.E26:Sheet1.E40"/>
            <chart:data-point chart:repeated="15"/>
          </chart:series>
          <chart:series chart:style-name="ch13" chart:values-cell-range-address="Sheet1.H26:Sheet1.H40" chart:label-cell-address="Sheet1.G24:Sheet1.G24" chart:class="chart:scatter">
            <chart:domain table:cell-range-address="Sheet1.G26:Sheet1.G40"/>
            <chart:data-point chart:repeated="15"/>
          </chart:series>
          <chart:series chart:style-name="ch14" chart:values-cell-range-address="Sheet1.J26:Sheet1.J40" chart:label-cell-address="Sheet1.I24:Sheet1.I24" chart:class="chart:scatter">
            <chart:domain table:cell-range-address="Sheet1.I26:Sheet1.I40"/>
            <chart:data-point chart:repeated="15"/>
          </chart:series>
          <chart:series chart:style-name="ch15" chart:values-cell-range-address="Sheet1.L26:Sheet1.L40" chart:label-cell-address="Sheet1.K24:Sheet1.K24" chart:class="chart:scatter">
            <chart:domain table:cell-range-address="Sheet1.C26:Sheet1.C40"/>
            <chart:data-point chart:repeated="15"/>
          </chart:series>
          <chart:series chart:style-name="ch16" chart:values-cell-range-address="Sheet1.N26:Sheet1.N40" chart:label-cell-address="Sheet1.M24:Sheet1.M24" chart:class="chart:scatter">
            <chart:domain table:cell-range-address="Sheet1.M26:Sheet1.M40"/>
            <chart:data-point chart:repeated="15"/>
          </chart:series>
          <chart:series chart:style-name="ch17" chart:values-cell-range-address="Sheet1.P26:Sheet1.P40" chart:label-cell-address="Sheet1.O24:Sheet1.O24" chart:class="chart:scatter">
            <chart:domain table:cell-range-address="Sheet1.O26:Sheet1.O40"/>
            <chart:data-point chart:repeated="15"/>
          </chart:series>
          <chart:series chart:style-name="ch18" chart:values-cell-range-address="Sheet1.R26:Sheet1.R40" chart:label-cell-address="Sheet1.Q24:Sheet1.Q24" chart:class="chart:scatter">
            <chart:domain table:cell-range-address="Sheet1.P26:Sheet1.P40"/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 threshold</text:p>
                <draw:g>
                  <svg:desc>Sheet1.A24:Sheet1.A2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0</text:p>
                <draw:g>
                  <svg:desc>Sheet1.C24:Sheet1.C2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00</text:p>
                <draw:g>
                  <svg:desc>Sheet1.E24:Sheet1.E2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00</text:p>
                <draw:g>
                  <svg:desc>Sheet1.G24:Sheet1.G24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10000</text:p>
                <draw:g>
                  <svg:desc>Sheet1.I24:Sheet1.I2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00000</text:p>
                <draw:g>
                  <svg:desc>Sheet1.K24:Sheet1.K24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1000000</text:p>
                <draw:g>
                  <svg:desc>Sheet1.M24:Sheet1.M24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10^7</text:p>
                <draw:g>
                  <svg:desc>Sheet1.O24:Sheet1.O24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10^8 (all insertion sort)</text:p>
                <draw:g>
                  <svg:desc>Sheet1.Q24:Sheet1.Q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Sheet1.A26:Sheet1.A40</svg:desc>
                </draw:g>
              </table:table-cell>
              <table:table-cell office:value-type="float" office:value="0.00047999">
                <text:p>0.00047999</text:p>
                <draw:g>
                  <svg:desc>Sheet1.B26:Sheet1.B40</svg:desc>
                </draw:g>
              </table:table-cell>
              <table:table-cell office:value-type="float" office:value="1024">
                <text:p>1024</text:p>
                <draw:g>
                  <svg:desc>Sheet1.C26:Sheet1.C40</svg:desc>
                </draw:g>
              </table:table-cell>
              <table:table-cell office:value-type="float" office:value="0.00038783">
                <text:p>0.00038783</text:p>
                <draw:g>
                  <svg:desc>Sheet1.D26:Sheet1.D40</svg:desc>
                </draw:g>
              </table:table-cell>
              <table:table-cell office:value-type="float" office:value="1024">
                <text:p>1024</text:p>
                <draw:g>
                  <svg:desc>Sheet1.E26:Sheet1.E40</svg:desc>
                </draw:g>
              </table:table-cell>
              <table:table-cell office:value-type="float" office:value="0.00046673">
                <text:p>0.00046673</text:p>
                <draw:g>
                  <svg:desc>Sheet1.F26:Sheet1.F40</svg:desc>
                </draw:g>
              </table:table-cell>
              <table:table-cell office:value-type="float" office:value="1024">
                <text:p>1024</text:p>
                <draw:g>
                  <svg:desc>Sheet1.G26:Sheet1.G40</svg:desc>
                </draw:g>
              </table:table-cell>
              <table:table-cell office:value-type="float" office:value="0.00021661">
                <text:p>0.00021661</text:p>
                <draw:g>
                  <svg:desc>Sheet1.H26:Sheet1.H40</svg:desc>
                </draw:g>
              </table:table-cell>
              <table:table-cell office:value-type="float" office:value="1024">
                <text:p>1024</text:p>
                <draw:g>
                  <svg:desc>Sheet1.I26:Sheet1.I40</svg:desc>
                </draw:g>
              </table:table-cell>
              <table:table-cell office:value-type="float" office:value="0.00003342">
                <text:p>0.00003342</text:p>
                <draw:g>
                  <svg:desc>Sheet1.J26:Sheet1.J40</svg:desc>
                </draw:g>
              </table:table-cell>
              <table:table-cell office:value-type="float" office:value="1024">
                <text:p>1024</text:p>
                <draw:g>
                  <svg:desc>Sheet1.C26:Sheet1.C40</svg:desc>
                </draw:g>
              </table:table-cell>
              <table:table-cell office:value-type="float" office:value="0.00003327">
                <text:p>0.00003327</text:p>
                <draw:g>
                  <svg:desc>Sheet1.L26:Sheet1.L40</svg:desc>
                </draw:g>
              </table:table-cell>
              <table:table-cell office:value-type="float" office:value="1024">
                <text:p>1024</text:p>
                <draw:g>
                  <svg:desc>Sheet1.M26:Sheet1.M40</svg:desc>
                </draw:g>
              </table:table-cell>
              <table:table-cell office:value-type="float" office:value="0.00003337">
                <text:p>0.00003337</text:p>
                <draw:g>
                  <svg:desc>Sheet1.N26:Sheet1.N40</svg:desc>
                </draw:g>
              </table:table-cell>
              <table:table-cell office:value-type="float" office:value="1024">
                <text:p>1024</text:p>
                <draw:g>
                  <svg:desc>Sheet1.O26:Sheet1.O40</svg:desc>
                </draw:g>
              </table:table-cell>
              <table:table-cell office:value-type="float" office:value="0.00003229">
                <text:p>0.00003229</text:p>
                <draw:g>
                  <svg:desc>Sheet1.P26:Sheet1.P40</svg:desc>
                </draw:g>
              </table:table-cell>
              <table:table-cell office:value-type="float" office:value="0.00003229">
                <text:p>0.00003229</text:p>
                <draw:g>
                  <svg:desc>Sheet1.P26:Sheet1.P40</svg:desc>
                </draw:g>
              </table:table-cell>
              <table:table-cell office:value-type="float" office:value="0.00003247">
                <text:p>0.00003247</text:p>
                <draw:g>
                  <svg:desc>Sheet1.R26:Sheet1.R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0.00057773">
                <text:p>0.00057773</text:p>
              </table:table-cell>
              <table:table-cell office:value-type="float" office:value="2048">
                <text:p>2048</text:p>
              </table:table-cell>
              <table:table-cell office:value-type="float" office:value="0.00008096">
                <text:p>0.00008096</text:p>
              </table:table-cell>
              <table:table-cell office:value-type="float" office:value="2048">
                <text:p>2048</text:p>
              </table:table-cell>
              <table:table-cell office:value-type="float" office:value="0.00023779">
                <text:p>0.00023779</text:p>
              </table:table-cell>
              <table:table-cell office:value-type="float" office:value="2048">
                <text:p>2048</text:p>
              </table:table-cell>
              <table:table-cell office:value-type="float" office:value="0.00042241">
                <text:p>0.00042241</text:p>
              </table:table-cell>
              <table:table-cell office:value-type="float" office:value="2048">
                <text:p>2048</text:p>
              </table:table-cell>
              <table:table-cell office:value-type="float" office:value="0.00002918">
                <text:p>0.00002918</text:p>
              </table:table-cell>
              <table:table-cell office:value-type="float" office:value="2048">
                <text:p>2048</text:p>
              </table:table-cell>
              <table:table-cell office:value-type="float" office:value="0.00002855">
                <text:p>0.00002855</text:p>
              </table:table-cell>
              <table:table-cell office:value-type="float" office:value="2048">
                <text:p>2048</text:p>
              </table:table-cell>
              <table:table-cell office:value-type="float" office:value="0.00002821">
                <text:p>0.00002821</text:p>
              </table:table-cell>
              <table:table-cell office:value-type="float" office:value="2048">
                <text:p>2048</text:p>
              </table:table-cell>
              <table:table-cell office:value-type="float" office:value="0.00002832">
                <text:p>0.00002832</text:p>
              </table:table-cell>
              <table:table-cell office:value-type="float" office:value="0.00002832">
                <text:p>0.00002832</text:p>
              </table:table-cell>
              <table:table-cell office:value-type="float" office:value="0.00002831">
                <text:p>0.00002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00023302">
                <text:p>0.00023302</text:p>
              </table:table-cell>
              <table:table-cell office:value-type="float" office:value="4096">
                <text:p>4096</text:p>
              </table:table-cell>
              <table:table-cell office:value-type="float" office:value="0.00017483">
                <text:p>0.00017483</text:p>
              </table:table-cell>
              <table:table-cell office:value-type="float" office:value="4096">
                <text:p>4096</text:p>
              </table:table-cell>
              <table:table-cell office:value-type="float" office:value="0.00063748">
                <text:p>0.00063748</text:p>
              </table:table-cell>
              <table:table-cell office:value-type="float" office:value="4096">
                <text:p>4096</text:p>
              </table:table-cell>
              <table:table-cell office:value-type="float" office:value="0.00054947">
                <text:p>0.00054947</text:p>
              </table:table-cell>
              <table:table-cell office:value-type="float" office:value="4096">
                <text:p>4096</text:p>
              </table:table-cell>
              <table:table-cell office:value-type="float" office:value="0.00005143">
                <text:p>0.00005143</text:p>
              </table:table-cell>
              <table:table-cell office:value-type="float" office:value="4096">
                <text:p>4096</text:p>
              </table:table-cell>
              <table:table-cell office:value-type="float" office:value="0.00005142">
                <text:p>0.00005142</text:p>
              </table:table-cell>
              <table:table-cell office:value-type="float" office:value="4096">
                <text:p>4096</text:p>
              </table:table-cell>
              <table:table-cell office:value-type="float" office:value="0.00005359">
                <text:p>0.00005359</text:p>
              </table:table-cell>
              <table:table-cell office:value-type="float" office:value="4096">
                <text:p>4096</text:p>
              </table:table-cell>
              <table:table-cell office:value-type="float" office:value="0.00005135">
                <text:p>0.00005135</text:p>
              </table:table-cell>
              <table:table-cell office:value-type="float" office:value="0.00005135">
                <text:p>0.00005135</text:p>
              </table:table-cell>
              <table:table-cell office:value-type="float" office:value="0.00005114">
                <text:p>0.00005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0.00051203">
                <text:p>0.00051203</text:p>
              </table:table-cell>
              <table:table-cell office:value-type="float" office:value="8192">
                <text:p>8192</text:p>
              </table:table-cell>
              <table:table-cell office:value-type="float" office:value="0.00038917">
                <text:p>0.00038917</text:p>
              </table:table-cell>
              <table:table-cell office:value-type="float" office:value="8192">
                <text:p>8192</text:p>
              </table:table-cell>
              <table:table-cell office:value-type="float" office:value="0.00026805">
                <text:p>0.00026805</text:p>
              </table:table-cell>
              <table:table-cell office:value-type="float" office:value="8192">
                <text:p>8192</text:p>
              </table:table-cell>
              <table:table-cell office:value-type="float" office:value="0.0006281">
                <text:p>0.0006281</text:p>
              </table:table-cell>
              <table:table-cell office:value-type="float" office:value="8192">
                <text:p>8192</text:p>
              </table:table-cell>
              <table:table-cell office:value-type="float" office:value="0.00004474">
                <text:p>0.00004474</text:p>
              </table:table-cell>
              <table:table-cell office:value-type="float" office:value="8192">
                <text:p>8192</text:p>
              </table:table-cell>
              <table:table-cell office:value-type="float" office:value="0.00004419">
                <text:p>0.00004419</text:p>
              </table:table-cell>
              <table:table-cell office:value-type="float" office:value="8192">
                <text:p>8192</text:p>
              </table:table-cell>
              <table:table-cell office:value-type="float" office:value="0.00004622">
                <text:p>0.00004622</text:p>
              </table:table-cell>
              <table:table-cell office:value-type="float" office:value="8192">
                <text:p>8192</text:p>
              </table:table-cell>
              <table:table-cell office:value-type="float" office:value="0.00004927">
                <text:p>0.00004927</text:p>
              </table:table-cell>
              <table:table-cell office:value-type="float" office:value="0.00004927">
                <text:p>0.00004927</text:p>
              </table:table-cell>
              <table:table-cell office:value-type="float" office:value="0.00004602">
                <text:p>0.00004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0.00104066">
                <text:p>0.00104066</text:p>
              </table:table-cell>
              <table:table-cell office:value-type="float" office:value="16384">
                <text:p>16384</text:p>
              </table:table-cell>
              <table:table-cell office:value-type="float" office:value="0.00081348">
                <text:p>0.00081348</text:p>
              </table:table-cell>
              <table:table-cell office:value-type="float" office:value="16384">
                <text:p>16384</text:p>
              </table:table-cell>
              <table:table-cell office:value-type="float" office:value="0.00058695">
                <text:p>0.00058695</text:p>
              </table:table-cell>
              <table:table-cell office:value-type="float" office:value="16384">
                <text:p>16384</text:p>
              </table:table-cell>
              <table:table-cell office:value-type="float" office:value="0.00037617">
                <text:p>0.00037617</text:p>
              </table:table-cell>
              <table:table-cell office:value-type="float" office:value="16384">
                <text:p>16384</text:p>
              </table:table-cell>
              <table:table-cell office:value-type="float" office:value="0.00113359">
                <text:p>0.00113359</text:p>
              </table:table-cell>
              <table:table-cell office:value-type="float" office:value="16384">
                <text:p>16384</text:p>
              </table:table-cell>
              <table:table-cell office:value-type="float" office:value="0.00007742">
                <text:p>0.00007742</text:p>
              </table:table-cell>
              <table:table-cell office:value-type="float" office:value="16384">
                <text:p>16384</text:p>
              </table:table-cell>
              <table:table-cell office:value-type="float" office:value="0.00007692">
                <text:p>0.00007692</text:p>
              </table:table-cell>
              <table:table-cell office:value-type="float" office:value="16384">
                <text:p>16384</text:p>
              </table:table-cell>
              <table:table-cell office:value-type="float" office:value="0.00007766">
                <text:p>0.00007766</text:p>
              </table:table-cell>
              <table:table-cell office:value-type="float" office:value="0.00007766">
                <text:p>0.00007766</text:p>
              </table:table-cell>
              <table:table-cell office:value-type="float" office:value="0.00007739">
                <text:p>0.00007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0.00232148">
                <text:p>0.00232148</text:p>
              </table:table-cell>
              <table:table-cell office:value-type="float" office:value="32768">
                <text:p>32768</text:p>
              </table:table-cell>
              <table:table-cell office:value-type="float" office:value="0.00183381">
                <text:p>0.00183381</text:p>
              </table:table-cell>
              <table:table-cell office:value-type="float" office:value="32768">
                <text:p>32768</text:p>
              </table:table-cell>
              <table:table-cell office:value-type="float" office:value="0.00130993">
                <text:p>0.00130993</text:p>
              </table:table-cell>
              <table:table-cell office:value-type="float" office:value="32768">
                <text:p>32768</text:p>
              </table:table-cell>
              <table:table-cell office:value-type="float" office:value="0.00087736">
                <text:p>0.00087736</text:p>
              </table:table-cell>
              <table:table-cell office:value-type="float" office:value="32768">
                <text:p>32768</text:p>
              </table:table-cell>
              <table:table-cell office:value-type="float" office:value="0.0013589">
                <text:p>0.0013589</text:p>
              </table:table-cell>
              <table:table-cell office:value-type="float" office:value="32768">
                <text:p>32768</text:p>
              </table:table-cell>
              <table:table-cell office:value-type="float" office:value="0.00012852">
                <text:p>0.00012852</text:p>
              </table:table-cell>
              <table:table-cell office:value-type="float" office:value="32768">
                <text:p>32768</text:p>
              </table:table-cell>
              <table:table-cell office:value-type="float" office:value="0.00010723">
                <text:p>0.00010723</text:p>
              </table:table-cell>
              <table:table-cell office:value-type="float" office:value="32768">
                <text:p>32768</text:p>
              </table:table-cell>
              <table:table-cell office:value-type="float" office:value="0.0001065">
                <text:p>0.0001065</text:p>
              </table:table-cell>
              <table:table-cell office:value-type="float" office:value="0.0001065">
                <text:p>0.0001065</text:p>
              </table:table-cell>
              <table:table-cell office:value-type="float" office:value="0.00012143">
                <text:p>0.00012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0.00487687">
                <text:p>0.00487687</text:p>
              </table:table-cell>
              <table:table-cell office:value-type="float" office:value="65536">
                <text:p>65536</text:p>
              </table:table-cell>
              <table:table-cell office:value-type="float" office:value="0.00396164">
                <text:p>0.00396164</text:p>
              </table:table-cell>
              <table:table-cell office:value-type="float" office:value="65536">
                <text:p>65536</text:p>
              </table:table-cell>
              <table:table-cell office:value-type="float" office:value="0.0029245">
                <text:p>0.0029245</text:p>
              </table:table-cell>
              <table:table-cell office:value-type="float" office:value="65536">
                <text:p>65536</text:p>
              </table:table-cell>
              <table:table-cell office:value-type="float" office:value="0.00203201">
                <text:p>0.00203201</text:p>
              </table:table-cell>
              <table:table-cell office:value-type="float" office:value="65536">
                <text:p>65536</text:p>
              </table:table-cell>
              <table:table-cell office:value-type="float" office:value="0.00314913">
                <text:p>0.00314913</text:p>
              </table:table-cell>
              <table:table-cell office:value-type="float" office:value="65536">
                <text:p>65536</text:p>
              </table:table-cell>
              <table:table-cell office:value-type="float" office:value="0.00018722">
                <text:p>0.00018722</text:p>
              </table:table-cell>
              <table:table-cell office:value-type="float" office:value="65536">
                <text:p>65536</text:p>
              </table:table-cell>
              <table:table-cell office:value-type="float" office:value="0.00017102">
                <text:p>0.00017102</text:p>
              </table:table-cell>
              <table:table-cell office:value-type="float" office:value="65536">
                <text:p>65536</text:p>
              </table:table-cell>
              <table:table-cell office:value-type="float" office:value="0.00016889">
                <text:p>0.00016889</text:p>
              </table:table-cell>
              <table:table-cell office:value-type="float" office:value="0.00016889">
                <text:p>0.00016889</text:p>
              </table:table-cell>
              <table:table-cell office:value-type="float" office:value="0.00017338">
                <text:p>0.00017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0.01052219">
                <text:p>0.01052219</text:p>
              </table:table-cell>
              <table:table-cell office:value-type="float" office:value="131072">
                <text:p>131072</text:p>
              </table:table-cell>
              <table:table-cell office:value-type="float" office:value="0.00864501">
                <text:p>0.00864501</text:p>
              </table:table-cell>
              <table:table-cell office:value-type="float" office:value="131072">
                <text:p>131072</text:p>
              </table:table-cell>
              <table:table-cell office:value-type="float" office:value="0.00662065">
                <text:p>0.00662065</text:p>
              </table:table-cell>
              <table:table-cell office:value-type="float" office:value="131072">
                <text:p>131072</text:p>
              </table:table-cell>
              <table:table-cell office:value-type="float" office:value="0.00469254">
                <text:p>0.00469254</text:p>
              </table:table-cell>
              <table:table-cell office:value-type="float" office:value="131072">
                <text:p>131072</text:p>
              </table:table-cell>
              <table:table-cell office:value-type="float" office:value="0.00263776">
                <text:p>0.00263776</text:p>
              </table:table-cell>
              <table:table-cell office:value-type="float" office:value="131072">
                <text:p>131072</text:p>
              </table:table-cell>
              <table:table-cell office:value-type="float" office:value="0.00310524">
                <text:p>0.00310524</text:p>
              </table:table-cell>
              <table:table-cell office:value-type="float" office:value="131072">
                <text:p>131072</text:p>
              </table:table-cell>
              <table:table-cell office:value-type="float" office:value="0.00045136">
                <text:p>0.00045136</text:p>
              </table:table-cell>
              <table:table-cell office:value-type="float" office:value="131072">
                <text:p>131072</text:p>
              </table:table-cell>
              <table:table-cell office:value-type="float" office:value="0.00037249">
                <text:p>0.00037249</text:p>
              </table:table-cell>
              <table:table-cell office:value-type="float" office:value="0.00037249">
                <text:p>0.00037249</text:p>
              </table:table-cell>
              <table:table-cell office:value-type="float" office:value="0.00036688">
                <text:p>0.00036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0.02212609">
                <text:p>0.02212609</text:p>
              </table:table-cell>
              <table:table-cell office:value-type="float" office:value="262144">
                <text:p>262144</text:p>
              </table:table-cell>
              <table:table-cell office:value-type="float" office:value="0.01826014">
                <text:p>0.01826014</text:p>
              </table:table-cell>
              <table:table-cell office:value-type="float" office:value="262144">
                <text:p>262144</text:p>
              </table:table-cell>
              <table:table-cell office:value-type="float" office:value="0.0139531">
                <text:p>0.0139531</text:p>
              </table:table-cell>
              <table:table-cell office:value-type="float" office:value="262144">
                <text:p>262144</text:p>
              </table:table-cell>
              <table:table-cell office:value-type="float" office:value="0.01059883">
                <text:p>0.01059883</text:p>
              </table:table-cell>
              <table:table-cell office:value-type="float" office:value="262144">
                <text:p>262144</text:p>
              </table:table-cell>
              <table:table-cell office:value-type="float" office:value="0.00613327">
                <text:p>0.00613327</text:p>
              </table:table-cell>
              <table:table-cell office:value-type="float" office:value="262144">
                <text:p>262144</text:p>
              </table:table-cell>
              <table:table-cell office:value-type="float" office:value="0.00381534">
                <text:p>0.00381534</text:p>
              </table:table-cell>
              <table:table-cell office:value-type="float" office:value="262144">
                <text:p>262144</text:p>
              </table:table-cell>
              <table:table-cell office:value-type="float" office:value="0.00045156">
                <text:p>0.00045156</text:p>
              </table:table-cell>
              <table:table-cell office:value-type="float" office:value="262144">
                <text:p>262144</text:p>
              </table:table-cell>
              <table:table-cell office:value-type="float" office:value="0.00044946">
                <text:p>0.00044946</text:p>
              </table:table-cell>
              <table:table-cell office:value-type="float" office:value="0.00044946">
                <text:p>0.00044946</text:p>
              </table:table-cell>
              <table:table-cell office:value-type="float" office:value="0.00048174">
                <text:p>0.00048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0.10001624">
                <text:p>0.10001624</text:p>
              </table:table-cell>
              <table:table-cell office:value-type="float" office:value="524288">
                <text:p>524288</text:p>
              </table:table-cell>
              <table:table-cell office:value-type="float" office:value="0.08567457">
                <text:p>0.08567457</text:p>
              </table:table-cell>
              <table:table-cell office:value-type="float" office:value="524288">
                <text:p>524288</text:p>
              </table:table-cell>
              <table:table-cell office:value-type="float" office:value="0.06843435">
                <text:p>0.06843435</text:p>
              </table:table-cell>
              <table:table-cell office:value-type="float" office:value="524288">
                <text:p>524288</text:p>
              </table:table-cell>
              <table:table-cell office:value-type="float" office:value="0.05340237">
                <text:p>0.05340237</text:p>
              </table:table-cell>
              <table:table-cell office:value-type="float" office:value="524288">
                <text:p>524288</text:p>
              </table:table-cell>
              <table:table-cell office:value-type="float" office:value="0.03393615">
                <text:p>0.03393615</text:p>
              </table:table-cell>
              <table:table-cell office:value-type="float" office:value="524288">
                <text:p>524288</text:p>
              </table:table-cell>
              <table:table-cell office:value-type="float" office:value="0.01814354">
                <text:p>0.01814354</text:p>
              </table:table-cell>
              <table:table-cell office:value-type="float" office:value="524288">
                <text:p>524288</text:p>
              </table:table-cell>
              <table:table-cell office:value-type="float" office:value="0.0014842">
                <text:p>0.0014842</text:p>
              </table:table-cell>
              <table:table-cell office:value-type="float" office:value="524288">
                <text:p>524288</text:p>
              </table:table-cell>
              <table:table-cell office:value-type="float" office:value="0.00147569">
                <text:p>0.00147569</text:p>
              </table:table-cell>
              <table:table-cell office:value-type="float" office:value="0.00147569">
                <text:p>0.00147569</text:p>
              </table:table-cell>
              <table:table-cell office:value-type="float" office:value="0.00149237">
                <text:p>0.00149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0.21242948">
                <text:p>0.21242948</text:p>
              </table:table-cell>
              <table:table-cell office:value-type="float" office:value="1048576">
                <text:p>1048576</text:p>
              </table:table-cell>
              <table:table-cell office:value-type="float" office:value="0.18405969">
                <text:p>0.18405969</text:p>
              </table:table-cell>
              <table:table-cell office:value-type="float" office:value="1048576">
                <text:p>1048576</text:p>
              </table:table-cell>
              <table:table-cell office:value-type="float" office:value="0.15116227">
                <text:p>0.15116227</text:p>
              </table:table-cell>
              <table:table-cell office:value-type="float" office:value="1048576">
                <text:p>1048576</text:p>
              </table:table-cell>
              <table:table-cell office:value-type="float" office:value="0.12002983">
                <text:p>0.12002983</text:p>
              </table:table-cell>
              <table:table-cell office:value-type="float" office:value="1048576">
                <text:p>1048576</text:p>
              </table:table-cell>
              <table:table-cell office:value-type="float" office:value="0.08188674">
                <text:p>0.08188674</text:p>
              </table:table-cell>
              <table:table-cell office:value-type="float" office:value="1048576">
                <text:p>1048576</text:p>
              </table:table-cell>
              <table:table-cell office:value-type="float" office:value="0.04984005">
                <text:p>0.04984005</text:p>
              </table:table-cell>
              <table:table-cell office:value-type="float" office:value="1048576">
                <text:p>1048576</text:p>
              </table:table-cell>
              <table:table-cell office:value-type="float" office:value="0.03943228">
                <text:p>0.03943228</text:p>
              </table:table-cell>
              <table:table-cell office:value-type="float" office:value="1048576">
                <text:p>1048576</text:p>
              </table:table-cell>
              <table:table-cell office:value-type="float" office:value="0.02112481">
                <text:p>0.02112481</text:p>
              </table:table-cell>
              <table:table-cell office:value-type="float" office:value="0.02112481">
                <text:p>0.02112481</text:p>
              </table:table-cell>
              <table:table-cell office:value-type="float" office:value="0.01567669">
                <text:p>0.015676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97152">
                <text:p>2097152</text:p>
              </table:table-cell>
              <table:table-cell office:value-type="float" office:value="0.44316271">
                <text:p>0.44316271</text:p>
              </table:table-cell>
              <table:table-cell office:value-type="float" office:value="2097152">
                <text:p>2097152</text:p>
              </table:table-cell>
              <table:table-cell office:value-type="float" office:value="0.38144665">
                <text:p>0.38144665</text:p>
              </table:table-cell>
              <table:table-cell office:value-type="float" office:value="2097152">
                <text:p>2097152</text:p>
              </table:table-cell>
              <table:table-cell office:value-type="float" office:value="0.32453972">
                <text:p>0.32453972</text:p>
              </table:table-cell>
              <table:table-cell office:value-type="float" office:value="2097152">
                <text:p>2097152</text:p>
              </table:table-cell>
              <table:table-cell office:value-type="float" office:value="0.26117468">
                <text:p>0.26117468</text:p>
              </table:table-cell>
              <table:table-cell office:value-type="float" office:value="2097152">
                <text:p>2097152</text:p>
              </table:table-cell>
              <table:table-cell office:value-type="float" office:value="0.175047">
                <text:p>0.175047</text:p>
              </table:table-cell>
              <table:table-cell office:value-type="float" office:value="2097152">
                <text:p>2097152</text:p>
              </table:table-cell>
              <table:table-cell office:value-type="float" office:value="0.11824276">
                <text:p>0.11824276</text:p>
              </table:table-cell>
              <table:table-cell office:value-type="float" office:value="2097152">
                <text:p>2097152</text:p>
              </table:table-cell>
              <table:table-cell office:value-type="float" office:value="0.05450765">
                <text:p>0.05450765</text:p>
              </table:table-cell>
              <table:table-cell office:value-type="float" office:value="2097152">
                <text:p>2097152</text:p>
              </table:table-cell>
              <table:table-cell office:value-type="float" office:value="0.01897299">
                <text:p>0.01897299</text:p>
              </table:table-cell>
              <table:table-cell office:value-type="float" office:value="0.01897299">
                <text:p>0.01897299</text:p>
              </table:table-cell>
              <table:table-cell office:value-type="float" office:value="0.00926839">
                <text:p>0.00926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94304">
                <text:p>4194304</text:p>
              </table:table-cell>
              <table:table-cell office:value-type="float" office:value="0.92825489">
                <text:p>0.92825489</text:p>
              </table:table-cell>
              <table:table-cell office:value-type="float" office:value="4194304">
                <text:p>4194304</text:p>
              </table:table-cell>
              <table:table-cell office:value-type="float" office:value="0.80587715">
                <text:p>0.80587715</text:p>
              </table:table-cell>
              <table:table-cell office:value-type="float" office:value="4194304">
                <text:p>4194304</text:p>
              </table:table-cell>
              <table:table-cell office:value-type="float" office:value="0.68790225">
                <text:p>0.68790225</text:p>
              </table:table-cell>
              <table:table-cell office:value-type="float" office:value="4194304">
                <text:p>4194304</text:p>
              </table:table-cell>
              <table:table-cell office:value-type="float" office:value="0.55281258">
                <text:p>0.55281258</text:p>
              </table:table-cell>
              <table:table-cell office:value-type="float" office:value="4194304">
                <text:p>4194304</text:p>
              </table:table-cell>
              <table:table-cell office:value-type="float" office:value="0.39244235">
                <text:p>0.39244235</text:p>
              </table:table-cell>
              <table:table-cell office:value-type="float" office:value="4194304">
                <text:p>4194304</text:p>
              </table:table-cell>
              <table:table-cell office:value-type="float" office:value="0.28653811">
                <text:p>0.28653811</text:p>
              </table:table-cell>
              <table:table-cell office:value-type="float" office:value="4194304">
                <text:p>4194304</text:p>
              </table:table-cell>
              <table:table-cell office:value-type="float" office:value="0.15395144">
                <text:p>0.15395144</text:p>
              </table:table-cell>
              <table:table-cell office:value-type="float" office:value="4194304">
                <text:p>4194304</text:p>
              </table:table-cell>
              <table:table-cell office:value-type="float" office:value="0.01927864">
                <text:p>0.01927864</text:p>
              </table:table-cell>
              <table:table-cell office:value-type="float" office:value="0.01927864">
                <text:p>0.01927864</text:p>
              </table:table-cell>
              <table:table-cell office:value-type="float" office:value="0.03607466">
                <text:p>0.036074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88608">
                <text:p>8388608</text:p>
              </table:table-cell>
              <table:table-cell office:value-type="float" office:value="1.94423625">
                <text:p>1.94423625</text:p>
              </table:table-cell>
              <table:table-cell office:value-type="float" office:value="8388608">
                <text:p>8388608</text:p>
              </table:table-cell>
              <table:table-cell office:value-type="float" office:value="1.69587297">
                <text:p>1.69587297</text:p>
              </table:table-cell>
              <table:table-cell office:value-type="float" office:value="8388608">
                <text:p>8388608</text:p>
              </table:table-cell>
              <table:table-cell office:value-type="float" office:value="1.48235481">
                <text:p>1.48235481</text:p>
              </table:table-cell>
              <table:table-cell office:value-type="float" office:value="8388608">
                <text:p>8388608</text:p>
              </table:table-cell>
              <table:table-cell office:value-type="float" office:value="1.18708863">
                <text:p>1.18708863</text:p>
              </table:table-cell>
              <table:table-cell office:value-type="float" office:value="8388608">
                <text:p>8388608</text:p>
              </table:table-cell>
              <table:table-cell office:value-type="float" office:value="0.88385134">
                <text:p>0.88385134</text:p>
              </table:table-cell>
              <table:table-cell office:value-type="float" office:value="8388608">
                <text:p>8388608</text:p>
              </table:table-cell>
              <table:table-cell office:value-type="float" office:value="0.6209824">
                <text:p>0.6209824</text:p>
              </table:table-cell>
              <table:table-cell office:value-type="float" office:value="8388608">
                <text:p>8388608</text:p>
              </table:table-cell>
              <table:table-cell office:value-type="float" office:value="0.37408696">
                <text:p>0.37408696</text:p>
              </table:table-cell>
              <table:table-cell office:value-type="float" office:value="8388608">
                <text:p>8388608</text:p>
              </table:table-cell>
              <table:table-cell office:value-type="float" office:value="0.03609886">
                <text:p>0.03609886</text:p>
              </table:table-cell>
              <table:table-cell office:value-type="float" office:value="0.03609886">
                <text:p>0.03609886</text:p>
              </table:table-cell>
              <table:table-cell office:value-type="float" office:value="0.0481072">
                <text:p>0.0481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777216">
                <text:p>16777216</text:p>
              </table:table-cell>
              <table:table-cell office:value-type="float" office:value="4.07791845">
                <text:p>4.07791845</text:p>
              </table:table-cell>
              <table:table-cell office:value-type="float" office:value="16777216">
                <text:p>16777216</text:p>
              </table:table-cell>
              <table:table-cell office:value-type="float" office:value="3.53209748">
                <text:p>3.53209748</text:p>
              </table:table-cell>
              <table:table-cell office:value-type="float" office:value="16777216">
                <text:p>16777216</text:p>
              </table:table-cell>
              <table:table-cell office:value-type="float" office:value="3.17620311">
                <text:p>3.17620311</text:p>
              </table:table-cell>
              <table:table-cell office:value-type="float" office:value="16777216">
                <text:p>16777216</text:p>
              </table:table-cell>
              <table:table-cell office:value-type="float" office:value="2.56023466">
                <text:p>2.56023466</text:p>
              </table:table-cell>
              <table:table-cell office:value-type="float" office:value="16777216">
                <text:p>16777216</text:p>
              </table:table-cell>
              <table:table-cell office:value-type="float" office:value="1.88502364">
                <text:p>1.88502364</text:p>
              </table:table-cell>
              <table:table-cell office:value-type="float" office:value="16777216">
                <text:p>16777216</text:p>
              </table:table-cell>
              <table:table-cell office:value-type="float" office:value="1.4433003">
                <text:p>1.4433003</text:p>
              </table:table-cell>
              <table:table-cell office:value-type="float" office:value="16777216">
                <text:p>16777216</text:p>
              </table:table-cell>
              <table:table-cell office:value-type="float" office:value="0.90360528">
                <text:p>0.90360528</text:p>
              </table:table-cell>
              <table:table-cell office:value-type="float" office:value="16777216">
                <text:p>16777216</text:p>
              </table:table-cell>
              <table:table-cell office:value-type="float" office:value="0.29360866">
                <text:p>0.29360866</text:p>
              </table:table-cell>
              <table:table-cell office:value-type="float" office:value="0.29360866">
                <text:p>0.29360866</text:p>
              </table:table-cell>
              <table:table-cell office:value-type="float" office:value="0.06195102">
                <text:p>0.06195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