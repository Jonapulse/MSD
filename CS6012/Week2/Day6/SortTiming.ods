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6.6307in" svg:y="3.7843in">
            <draw:object draw:notify-on-update-of-ranges="Sheet1.A26:Sheet1.A40 Sheet1.A24:Sheet1.A24 Sheet1.B26:Sheet1.B40 Sheet1.C26:Sheet1.C40 Sheet1.C24:Sheet1.C24 Sheet1.D26:Sheet1.D40 Sheet1.E26:Sheet1.E40 Sheet1.E24:Sheet1.E24 Sheet1.F26:Sheet1.F40 Sheet1.G26:Sheet1.G40 Sheet1.G24:Sheet1.G24 Sheet1.H26:Sheet1.H40 Sheet1.I26:Sheet1.I40 Sheet1.I24:Sheet1.I24 Sheet1.J26:Sheet1.J40 Sheet1.C26:Sheet1.C40 Sheet1.K24:Sheet1.K24 Sheet1.L26:Sheet1.L40 Sheet1.M26:Sheet1.M40 Sheet1.M24:Sheet1.M24 Sheet1.N26:Sheet1.N40 Sheet1.O26:Sheet1.O40 Sheet1.O24:Sheet1.O24 Sheet1.P26:Sheet1.P40 Sheet1.P26:Sheet1.P40 Sheet1.Q24:Sheet1.Q24 Sheet1.R26:Sheet1.R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e-fix mergesort iss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^7</text:p>
          </table:table-cell>
          <table:table-cell/>
          <table:table-cell office:value-type="string" calcext:value-type="string">
            <text:p>10^8 (all insertion sor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47999" calcext:value-type="float">
            <text:p>4.8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783" calcext:value-type="float">
            <text:p>3.88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6673" calcext:value-type="float">
            <text:p>4.6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1661" calcext:value-type="float">
            <text:p>2.1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42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27" calcext:value-type="float">
            <text:p>3.3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37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29" calcext:value-type="float">
            <text:p>3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47" calcext:value-type="float">
            <text:p>3.2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7773" calcext:value-type="float">
            <text:p>5.7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096" calcext:value-type="float">
            <text:p>8.1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779" calcext:value-type="float">
            <text:p>2.3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42241" calcext:value-type="float">
            <text:p>4.2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918" calcext:value-type="float">
            <text:p>2.9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55" calcext:value-type="float">
            <text:p>2.86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21" calcext:value-type="float">
            <text:p>2.8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2" calcext:value-type="float">
            <text:p>2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1" calcext:value-type="float">
            <text:p>2.83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302" calcext:value-type="float">
            <text:p>2.3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483" calcext:value-type="float">
            <text:p>1.75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63748" calcext:value-type="float">
            <text:p>6.3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947" calcext:value-type="float">
            <text:p>5.4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3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2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359" calcext:value-type="float">
            <text:p>5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35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14" calcext:value-type="float">
            <text:p>5.11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203" calcext:value-type="float">
            <text:p>5.1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8917" calcext:value-type="float">
            <text:p>3.8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6805" calcext:value-type="float">
            <text:p>2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281" calcext:value-type="float">
            <text:p>6.2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74" calcext:value-type="float">
            <text:p>4.4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19" calcext:value-type="float">
            <text:p>4.4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22" calcext:value-type="float">
            <text:p>4.6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27" calcext:value-type="float">
            <text:p>4.9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02" calcext:value-type="float">
            <text:p>4.60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4066" calcext:value-type="float">
            <text:p>0.0010406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1348" calcext:value-type="float">
            <text:p>8.1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8695" calcext:value-type="float">
            <text:p>5.87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7617" calcext:value-type="float">
            <text:p>3.76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3359" calcext:value-type="float">
            <text:p>0.0011335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42" calcext:value-type="float">
            <text:p>7.74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692" calcext:value-type="float">
            <text:p>7.69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66" calcext:value-type="float">
            <text:p>7.77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39" calcext:value-type="float">
            <text:p>7.74E-0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2148" calcext:value-type="float">
            <text:p>0.002321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0993" calcext:value-type="float">
            <text:p>0.00130993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7736" calcext:value-type="float">
            <text:p>8.77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852" calcext:value-type="float">
            <text:p>1.2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723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65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143" calcext:value-type="float">
            <text:p>1.21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96164" calcext:value-type="float">
            <text:p>0.003961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245" calcext:value-type="float">
            <text:p>0.002924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03201" calcext:value-type="float">
            <text:p>0.002032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14913" calcext:value-type="float">
            <text:p>0.00314913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8722" calcext:value-type="float">
            <text:p>1.87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102" calcext:value-type="float">
            <text:p>1.71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6889" calcext:value-type="float">
            <text:p>1.69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338" calcext:value-type="float">
            <text:p>1.73E-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52219" calcext:value-type="float">
            <text:p>0.0105221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4501" calcext:value-type="float">
            <text:p>0.008645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662065" calcext:value-type="float">
            <text:p>0.0066206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9254" calcext:value-type="float">
            <text:p>0.004692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3776" calcext:value-type="float">
            <text:p>0.002637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10524" calcext:value-type="float">
            <text:p>0.0031052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45136" calcext:value-type="float">
            <text:p>4.51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7249" calcext:value-type="float">
            <text:p>3.72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6688" calcext:value-type="float">
            <text:p>3.67E-0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12609" calcext:value-type="float">
            <text:p>0.022126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26014" calcext:value-type="float">
            <text:p>0.018260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531" calcext:value-type="float">
            <text:p>0.01395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059883" calcext:value-type="float">
            <text:p>0.010598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13327" calcext:value-type="float">
            <text:p>0.0061332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1534" calcext:value-type="float">
            <text:p>0.0038153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5156" calcext:value-type="float">
            <text:p>4.52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4946" calcext:value-type="float">
            <text:p>4.49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8174" calcext:value-type="float">
            <text:p>4.82E-04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001624" calcext:value-type="float">
            <text:p>0.100016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567457" calcext:value-type="float">
            <text:p>0.0856745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843435" calcext:value-type="float">
            <text:p>0.0684343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340237" calcext:value-type="float">
            <text:p>0.053402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393615" calcext:value-type="float">
            <text:p>0.0339361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4354" calcext:value-type="float">
            <text:p>0.0181435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842" calcext:value-type="float">
            <text:p>0.00148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7569" calcext:value-type="float">
            <text:p>0.0014756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9237" calcext:value-type="float">
            <text:p>0.0014923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242948" calcext:value-type="float">
            <text:p>0.212429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405969" calcext:value-type="float">
            <text:p>0.184059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116227" calcext:value-type="float">
            <text:p>0.151162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002983" calcext:value-type="float">
            <text:p>0.1200298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188674" calcext:value-type="float">
            <text:p>0.0818867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005" calcext:value-type="float">
            <text:p>0.049840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943228" calcext:value-type="float">
            <text:p>0.039432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112481" calcext:value-type="float">
            <text:p>0.0211248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67669" calcext:value-type="float">
            <text:p>0.01567669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316271" calcext:value-type="float">
            <text:p>0.4431627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8144665" calcext:value-type="float">
            <text:p>0.381446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2453972" calcext:value-type="float">
            <text:p>0.324539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26117468" calcext:value-type="float">
            <text:p>0.261174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75047" calcext:value-type="float">
            <text:p>0.17504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1824276" calcext:value-type="float">
            <text:p>0.118242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450765" calcext:value-type="float">
            <text:p>0.054507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897299" calcext:value-type="float">
            <text:p>0.0189729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926839" calcext:value-type="float">
            <text:p>0.00926839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825489" calcext:value-type="float">
            <text:p>0.9282548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80587715" calcext:value-type="float">
            <text:p>0.805877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68790225" calcext:value-type="float">
            <text:p>0.687902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5281258" calcext:value-type="float">
            <text:p>0.552812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39244235" calcext:value-type="float">
            <text:p>0.392442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8653811" calcext:value-type="float">
            <text:p>0.286538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5395144" calcext:value-type="float">
            <text:p>0.15395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1927864" calcext:value-type="float">
            <text:p>0.019278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07466" calcext:value-type="float">
            <text:p>0.0360746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94423625" calcext:value-type="float">
            <text:p>1.9442362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69587297" calcext:value-type="float">
            <text:p>1.69587297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48235481" calcext:value-type="float">
            <text:p>1.4823548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18708863" calcext:value-type="float">
            <text:p>1.187088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88385134" calcext:value-type="float">
            <text:p>0.8838513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6209824" calcext:value-type="float">
            <text:p>0.620982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408696" calcext:value-type="float">
            <text:p>0.3740869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609886" calcext:value-type="float">
            <text:p>0.0360988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481072" calcext:value-type="float">
            <text:p>0.048107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07791845" calcext:value-type="float">
            <text:p>4.0779184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53209748" calcext:value-type="float">
            <text:p>3.532097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17620311" calcext:value-type="float">
            <text:p>3.176203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.56023466" calcext:value-type="float">
            <text:p>2.560234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88502364" calcext:value-type="float">
            <text:p>1.8850236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4433003" calcext:value-type="float">
            <text:p>1.443300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90360528" calcext:value-type="float">
            <text:p>0.903605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29360866" calcext:value-type="float">
            <text:p>0.293608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6195102" calcext:value-type="float">
            <text:p>0.061951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77207" calcext:value-type="float">
            <text:p>2.7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97139" calcext:value-type="float">
            <text:p>1.9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55864" calcext:value-type="float">
            <text:p>1.56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33336" calcext:value-type="float">
            <text:p>1.3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20997" calcext:value-type="float">
            <text:p>1.2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2302" calcext:value-type="float">
            <text:p>9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4451" calcext:value-type="float">
            <text:p>1.45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22" calcext:value-type="float">
            <text:p>1.5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5" calcext:value-type="float">
            <text:p>1.5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12309" calcext:value-type="float">
            <text:p>1.1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6837" calcext:value-type="float">
            <text:p>7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322893" calcext:value-type="float">
            <text:p>3.2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563" calcext:value-type="float">
            <text:p>2.76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73113" calcext:value-type="float">
            <text:p>1.7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18983" calcext:value-type="float">
            <text:p>1.1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5966" calcext:value-type="float">
            <text:p>1.6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71" calcext:value-type="float">
            <text:p>1.07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971" calcext:value-type="float">
            <text:p>1.10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7842" calcext:value-type="float">
            <text:p>2.38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671" calcext:value-type="float">
            <text:p>1.7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34287" calcext:value-type="float">
            <text:p>1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8915" calcext:value-type="float">
            <text:p>1.1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4457" calcext:value-type="float">
            <text:p>8.45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5317" calcext:value-type="float">
            <text:p>6.5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1219" calcext:value-type="float">
            <text:p>1.1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5012" calcext:value-type="float">
            <text:p>1.50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6546" calcext:value-type="float">
            <text:p>1.65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0842" calcext:value-type="float">
            <text:p>5.1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71534" calcext:value-type="float">
            <text:p>3.7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05592" calcext:value-type="float">
            <text:p>3.06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78908" calcext:value-type="float">
            <text:p>2.7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10128" calcext:value-type="float">
            <text:p>2.1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68162" calcext:value-type="float">
            <text:p>1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92018" calcext:value-type="float">
            <text:p>2.9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612" calcext:value-type="float">
            <text:p>2.06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829" calcext:value-type="float">
            <text:p>2.08E-05</text:p>
          </table:table-cell>
          <table:table-cell/>
          <table:table-cell office:value-type="string" calcext:value-type="string">
            <text:p>…. this is the same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126009" calcext:value-type="float">
            <text:p>0.00112600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38976" calcext:value-type="float">
            <text:p>8.3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710694" calcext:value-type="float">
            <text:p>7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41252" calcext:value-type="float">
            <text:p>6.4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0956" calcext:value-type="float">
            <text:p>5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15777" calcext:value-type="float">
            <text:p>4.1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3375" calcext:value-type="float">
            <text:p>4.0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58855" calcext:value-type="float">
            <text:p>3.5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42791" calcext:value-type="float">
            <text:p>4.28E-05</text:p>
          </table:table-cell>
          <table:table-cell/>
          <table:table-cell office:value-type="string" calcext:value-type="string">
            <text:p>No gain from mergeSor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8838" calcext:value-type="float">
            <text:p>0.0023883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79061" calcext:value-type="float">
            <text:p>0.0017906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83939" calcext:value-type="float">
            <text:p>0.001583939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05713" calcext:value-type="float">
            <text:p>0.00150571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65281" calcext:value-type="float">
            <text:p>0.0012652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68111" calcext:value-type="float">
            <text:p>0.001068111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8781" calcext:value-type="float">
            <text:p>5.88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23476" calcext:value-type="float">
            <text:p>4.23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03501" calcext:value-type="float">
            <text:p>3.50E-05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052414" calcext:value-type="float">
            <text:p>0.00505241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113264" calcext:value-type="float">
            <text:p>0.0041132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695027" calcext:value-type="float">
            <text:p>0.00369502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412795" calcext:value-type="float">
            <text:p>0.00341279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725405" calcext:value-type="float">
            <text:p>0.00272540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322628" calcext:value-type="float">
            <text:p>0.00232262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9884" calcext:value-type="float">
            <text:p>0.0012988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22594" calcext:value-type="float">
            <text:p>0.00102259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08636" calcext:value-type="float">
            <text:p>8.64E-05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763625" calcext:value-type="float">
            <text:p>0.0107636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9172916" calcext:value-type="float">
            <text:p>0.0091729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564464" calcext:value-type="float">
            <text:p>0.0085644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79032" calcext:value-type="float">
            <text:p>0.0086790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952428" calcext:value-type="float">
            <text:p>0.0089524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996247" calcext:value-type="float">
            <text:p>0.0079962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332082" calcext:value-type="float">
            <text:p>0.00533208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565441" calcext:value-type="float">
            <text:p>0.0045654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691779" calcext:value-type="float">
            <text:p>0.00169177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3023288" calcext:value-type="float">
            <text:p>0.023023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713684" calcext:value-type="float">
            <text:p>0.0187136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065124" calcext:value-type="float">
            <text:p>0.0180651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763374" calcext:value-type="float">
            <text:p>0.0176337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520171" calcext:value-type="float">
            <text:p>0.0155201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725704" calcext:value-type="float">
            <text:p>0.0137257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14286" calcext:value-type="float">
            <text:p>0.009114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15717" calcext:value-type="float">
            <text:p>0.008157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67616" calcext:value-type="float">
            <text:p>0.0036761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3088801" calcext:value-type="float">
            <text:p>0.10308880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01461" calcext:value-type="float">
            <text:p>0.08850146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0869739" calcext:value-type="float">
            <text:p>0.08086973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830453" calcext:value-type="float">
            <text:p>0.0768304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6549053" calcext:value-type="float">
            <text:p>0.0665490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2137603" calcext:value-type="float">
            <text:p>0.06213760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293137" calcext:value-type="float">
            <text:p>0.042931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7441451" calcext:value-type="float">
            <text:p>0.03744145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370435" calcext:value-type="float">
            <text:p>0.02137043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5065663" calcext:value-type="float">
            <text:p>0.22506566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93244978" calcext:value-type="float">
            <text:p>0.19324497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70248586" calcext:value-type="float">
            <text:p>0.1702485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4907916" calcext:value-type="float">
            <text:p>0.1649079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2674831" calcext:value-type="float">
            <text:p>0.1526748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7436434" calcext:value-type="float">
            <text:p>0.1474364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4804089" calcext:value-type="float">
            <text:p>0.12480408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4685216" calcext:value-type="float">
            <text:p>0.1146852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5730931" calcext:value-type="float">
            <text:p>0.057309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0.39778255" calcext:value-type="float">
            <text:p>0.3977825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 office:value-type="float" office:value="0.214017591" calcext:value-type="float">
            <text:p>0.2140175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.016542354" calcext:value-type="float">
            <text:p>1.016542354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 office:value-type="float" office:value="0.47658812" calcext:value-type="float">
            <text:p>0.476588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2.233665202" calcext:value-type="float">
            <text:p>2.233665202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 office:value-type="float" office:value="1.438724152" calcext:value-type="float">
            <text:p>1.4387241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3:46:50.1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08:21:02.770000000</meta:creation-date>
    <dc:date>2025-11-19T14:27:47.903000000</dc:date>
    <meta:editing-duration>PT17M21S</meta:editing-duration>
    <meta:editing-cycles>3</meta:editing-cycles>
    <meta:generator>LibreOffice/7.2.5.2$Windows_X86_64 LibreOffice_project/499f9727c189e6ef3471021d6132d4c694f357e5</meta:generator>
    <meta:document-statistic meta:table-count="1" meta:cell-count="7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InsertionSort Threshold</text:p>
        </chart:title>
        <chart:legend chart:legend-position="end" svg:x="11.19cm" svg:y="2.209cm" style:legend-expansion="high" chart:style-name="ch3"/>
        <chart:plot-area chart:style-name="ch4" table:cell-range-address="Sheet1.A26:Sheet1.B40 Sheet1.A24:Sheet1.A24 Sheet1.C24:Sheet1.C24 Sheet1.D26:Sheet1.D40 Sheet1.E24:Sheet1.E24 Sheet1.F26:Sheet1.F40 Sheet1.G24:Sheet1.G24 Sheet1.H26:Sheet1.H40 Sheet1.I24:Sheet1.I24 Sheet1.J26:Sheet1.J40 Sheet1.K24:Sheet1.K24 Sheet1.L26:Sheet1.L40 Sheet1.M24:Sheet1.M24 Sheet1.N26:Sheet1.N40 Sheet1.O24:Sheet1.O24 Sheet1.P26:Sheet1.P40 Sheet1.Q24:Sheet1.Q24 Sheet1.R26:Sheet1.R40" chart:data-source-has-labels="row" svg:x="1.331cm" svg:y="1.275cm" svg:width="9.539cm" svg:height="6.564cm">
          <chart:coordinate-region svg:x="3.064cm" svg:y="1.474cm" svg:width="7.063cm" svg:height="5.718cm"/>
          <chart:axis chart:dimension="x" chart:name="primary-x" chart:style-name="ch5">
            <chart:title svg:x="5.95cm" svg:y="8.019cm" chart:style-name="ch6">
              <text:p>n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Sheet1.B26:Sheet1.B40" chart:label-cell-address="Sheet1.A24:Sheet1.A24" chart:class="chart:scatter">
            <chart:domain table:cell-range-address="Sheet1.A26:Sheet1.A40"/>
            <chart:data-point chart:repeated="15"/>
          </chart:series>
          <chart:series chart:style-name="ch11" chart:values-cell-range-address="Sheet1.D26:Sheet1.D40" chart:label-cell-address="Sheet1.C24:Sheet1.C24" chart:class="chart:scatter">
            <chart:domain table:cell-range-address="Sheet1.C26:Sheet1.C40"/>
            <chart:data-point chart:repeated="15"/>
          </chart:series>
          <chart:series chart:style-name="ch12" chart:values-cell-range-address="Sheet1.F26:Sheet1.F40" chart:label-cell-address="Sheet1.E24:Sheet1.E24" chart:class="chart:scatter">
            <chart:domain table:cell-range-address="Sheet1.E26:Sheet1.E40"/>
            <chart:data-point chart:repeated="15"/>
          </chart:series>
          <chart:series chart:style-name="ch13" chart:values-cell-range-address="Sheet1.H26:Sheet1.H40" chart:label-cell-address="Sheet1.G24:Sheet1.G24" chart:class="chart:scatter">
            <chart:domain table:cell-range-address="Sheet1.G26:Sheet1.G40"/>
            <chart:data-point chart:repeated="15"/>
          </chart:series>
          <chart:series chart:style-name="ch14" chart:values-cell-range-address="Sheet1.J26:Sheet1.J40" chart:label-cell-address="Sheet1.I24:Sheet1.I24" chart:class="chart:scatter">
            <chart:domain table:cell-range-address="Sheet1.I26:Sheet1.I40"/>
            <chart:data-point chart:repeated="15"/>
          </chart:series>
          <chart:series chart:style-name="ch15" chart:values-cell-range-address="Sheet1.L26:Sheet1.L40" chart:label-cell-address="Sheet1.K24:Sheet1.K24" chart:class="chart:scatter">
            <chart:domain table:cell-range-address="Sheet1.C26:Sheet1.C40"/>
            <chart:data-point chart:repeated="15"/>
          </chart:series>
          <chart:series chart:style-name="ch16" chart:values-cell-range-address="Sheet1.N26:Sheet1.N40" chart:label-cell-address="Sheet1.M24:Sheet1.M24" chart:class="chart:scatter">
            <chart:domain table:cell-range-address="Sheet1.M26:Sheet1.M40"/>
            <chart:data-point chart:repeated="15"/>
          </chart:series>
          <chart:series chart:style-name="ch17" chart:values-cell-range-address="Sheet1.P26:Sheet1.P40" chart:label-cell-address="Sheet1.O24:Sheet1.O24" chart:class="chart:scatter">
            <chart:domain table:cell-range-address="Sheet1.O26:Sheet1.O40"/>
            <chart:data-point chart:repeated="15"/>
          </chart:series>
          <chart:series chart:style-name="ch18" chart:values-cell-range-address="Sheet1.R26:Sheet1.R40" chart:label-cell-address="Sheet1.Q24:Sheet1.Q24" chart:class="chart:scatter">
            <chart:domain table:cell-range-address="Sheet1.P26:Sheet1.P40"/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24:Sheet1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24:Sheet1.C2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heet1.G24:Sheet1.G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000</text:p>
                <draw:g>
                  <svg:desc>Sheet1.I24:Sheet1.I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0</text:p>
                <draw:g>
                  <svg:desc>Sheet1.K24:Sheet1.K2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000000</text:p>
                <draw:g>
                  <svg:desc>Sheet1.M24:Sheet1.M2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^7</text:p>
                <draw:g>
                  <svg:desc>Sheet1.O24:Sheet1.O2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0^8 (all insertion sort)</text:p>
                <draw:g>
                  <svg:desc>Sheet1.Q24:Sheet1.Q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6:Sheet1.A40</svg:desc>
                </draw:g>
              </table:table-cell>
              <table:table-cell office:value-type="float" office:value="0.00047999">
                <text:p>0.00047999</text:p>
                <draw:g>
                  <svg:desc>Sheet1.B26:Sheet1.B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38783">
                <text:p>0.00038783</text:p>
                <draw:g>
                  <svg:desc>Sheet1.D26:Sheet1.D40</svg:desc>
                </draw:g>
              </table:table-cell>
              <table:table-cell office:value-type="float" office:value="1024">
                <text:p>1024</text:p>
                <draw:g>
                  <svg:desc>Sheet1.E26:Sheet1.E40</svg:desc>
                </draw:g>
              </table:table-cell>
              <table:table-cell office:value-type="float" office:value="0.00046673">
                <text:p>0.00046673</text:p>
                <draw:g>
                  <svg:desc>Sheet1.F26:Sheet1.F40</svg:desc>
                </draw:g>
              </table:table-cell>
              <table:table-cell office:value-type="float" office:value="1024">
                <text:p>1024</text:p>
                <draw:g>
                  <svg:desc>Sheet1.G26:Sheet1.G40</svg:desc>
                </draw:g>
              </table:table-cell>
              <table:table-cell office:value-type="float" office:value="0.00021661">
                <text:p>0.00021661</text:p>
                <draw:g>
                  <svg:desc>Sheet1.H26:Sheet1.H40</svg:desc>
                </draw:g>
              </table:table-cell>
              <table:table-cell office:value-type="float" office:value="1024">
                <text:p>1024</text:p>
                <draw:g>
                  <svg:desc>Sheet1.I26:Sheet1.I40</svg:desc>
                </draw:g>
              </table:table-cell>
              <table:table-cell office:value-type="float" office:value="0.00003342">
                <text:p>0.00003342</text:p>
                <draw:g>
                  <svg:desc>Sheet1.J26:Sheet1.J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03327">
                <text:p>0.00003327</text:p>
                <draw:g>
                  <svg:desc>Sheet1.L26:Sheet1.L40</svg:desc>
                </draw:g>
              </table:table-cell>
              <table:table-cell office:value-type="float" office:value="1024">
                <text:p>1024</text:p>
                <draw:g>
                  <svg:desc>Sheet1.M26:Sheet1.M40</svg:desc>
                </draw:g>
              </table:table-cell>
              <table:table-cell office:value-type="float" office:value="0.00003337">
                <text:p>0.00003337</text:p>
                <draw:g>
                  <svg:desc>Sheet1.N26:Sheet1.N40</svg:desc>
                </draw:g>
              </table:table-cell>
              <table:table-cell office:value-type="float" office:value="1024">
                <text:p>1024</text:p>
                <draw:g>
                  <svg:desc>Sheet1.O26:Sheet1.O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47">
                <text:p>0.00003247</text:p>
                <draw:g>
                  <svg:desc>Sheet1.R26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57773">
                <text:p>0.00057773</text:p>
              </table:table-cell>
              <table:table-cell office:value-type="float" office:value="2048">
                <text:p>2048</text:p>
              </table:table-cell>
              <table:table-cell office:value-type="float" office:value="0.00008096">
                <text:p>0.00008096</text:p>
              </table:table-cell>
              <table:table-cell office:value-type="float" office:value="2048">
                <text:p>2048</text:p>
              </table:table-cell>
              <table:table-cell office:value-type="float" office:value="0.00023779">
                <text:p>0.00023779</text:p>
              </table:table-cell>
              <table:table-cell office:value-type="float" office:value="2048">
                <text:p>2048</text:p>
              </table:table-cell>
              <table:table-cell office:value-type="float" office:value="0.00042241">
                <text:p>0.00042241</text:p>
              </table:table-cell>
              <table:table-cell office:value-type="float" office:value="2048">
                <text:p>2048</text:p>
              </table:table-cell>
              <table:table-cell office:value-type="float" office:value="0.00002918">
                <text:p>0.00002918</text:p>
              </table:table-cell>
              <table:table-cell office:value-type="float" office:value="2048">
                <text:p>2048</text:p>
              </table:table-cell>
              <table:table-cell office:value-type="float" office:value="0.00002855">
                <text:p>0.00002855</text:p>
              </table:table-cell>
              <table:table-cell office:value-type="float" office:value="2048">
                <text:p>2048</text:p>
              </table:table-cell>
              <table:table-cell office:value-type="float" office:value="0.00002821">
                <text:p>0.00002821</text:p>
              </table:table-cell>
              <table:table-cell office:value-type="float" office:value="2048">
                <text:p>2048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1">
                <text:p>0.0000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302">
                <text:p>0.00023302</text:p>
              </table:table-cell>
              <table:table-cell office:value-type="float" office:value="4096">
                <text:p>4096</text:p>
              </table:table-cell>
              <table:table-cell office:value-type="float" office:value="0.00017483">
                <text:p>0.00017483</text:p>
              </table:table-cell>
              <table:table-cell office:value-type="float" office:value="4096">
                <text:p>4096</text:p>
              </table:table-cell>
              <table:table-cell office:value-type="float" office:value="0.00063748">
                <text:p>0.00063748</text:p>
              </table:table-cell>
              <table:table-cell office:value-type="float" office:value="4096">
                <text:p>4096</text:p>
              </table:table-cell>
              <table:table-cell office:value-type="float" office:value="0.00054947">
                <text:p>0.00054947</text:p>
              </table:table-cell>
              <table:table-cell office:value-type="float" office:value="4096">
                <text:p>4096</text:p>
              </table:table-cell>
              <table:table-cell office:value-type="float" office:value="0.00005143">
                <text:p>0.00005143</text:p>
              </table:table-cell>
              <table:table-cell office:value-type="float" office:value="4096">
                <text:p>4096</text:p>
              </table:table-cell>
              <table:table-cell office:value-type="float" office:value="0.00005142">
                <text:p>0.00005142</text:p>
              </table:table-cell>
              <table:table-cell office:value-type="float" office:value="4096">
                <text:p>4096</text:p>
              </table:table-cell>
              <table:table-cell office:value-type="float" office:value="0.00005359">
                <text:p>0.00005359</text:p>
              </table:table-cell>
              <table:table-cell office:value-type="float" office:value="4096">
                <text:p>409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14">
                <text:p>0.0000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1203">
                <text:p>0.00051203</text:p>
              </table:table-cell>
              <table:table-cell office:value-type="float" office:value="8192">
                <text:p>8192</text:p>
              </table:table-cell>
              <table:table-cell office:value-type="float" office:value="0.00038917">
                <text:p>0.00038917</text:p>
              </table:table-cell>
              <table:table-cell office:value-type="float" office:value="8192">
                <text:p>8192</text:p>
              </table:table-cell>
              <table:table-cell office:value-type="float" office:value="0.00026805">
                <text:p>0.00026805</text:p>
              </table:table-cell>
              <table:table-cell office:value-type="float" office:value="8192">
                <text:p>8192</text:p>
              </table:table-cell>
              <table:table-cell office:value-type="float" office:value="0.0006281">
                <text:p>0.0006281</text:p>
              </table:table-cell>
              <table:table-cell office:value-type="float" office:value="8192">
                <text:p>8192</text:p>
              </table:table-cell>
              <table:table-cell office:value-type="float" office:value="0.00004474">
                <text:p>0.00004474</text:p>
              </table:table-cell>
              <table:table-cell office:value-type="float" office:value="8192">
                <text:p>8192</text:p>
              </table:table-cell>
              <table:table-cell office:value-type="float" office:value="0.00004419">
                <text:p>0.00004419</text:p>
              </table:table-cell>
              <table:table-cell office:value-type="float" office:value="8192">
                <text:p>8192</text:p>
              </table:table-cell>
              <table:table-cell office:value-type="float" office:value="0.00004622">
                <text:p>0.00004622</text:p>
              </table:table-cell>
              <table:table-cell office:value-type="float" office:value="8192">
                <text:p>8192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602">
                <text:p>0.0000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04066">
                <text:p>0.00104066</text:p>
              </table:table-cell>
              <table:table-cell office:value-type="float" office:value="16384">
                <text:p>16384</text:p>
              </table:table-cell>
              <table:table-cell office:value-type="float" office:value="0.00081348">
                <text:p>0.00081348</text:p>
              </table:table-cell>
              <table:table-cell office:value-type="float" office:value="16384">
                <text:p>16384</text:p>
              </table:table-cell>
              <table:table-cell office:value-type="float" office:value="0.00058695">
                <text:p>0.00058695</text:p>
              </table:table-cell>
              <table:table-cell office:value-type="float" office:value="16384">
                <text:p>16384</text:p>
              </table:table-cell>
              <table:table-cell office:value-type="float" office:value="0.00037617">
                <text:p>0.00037617</text:p>
              </table:table-cell>
              <table:table-cell office:value-type="float" office:value="16384">
                <text:p>16384</text:p>
              </table:table-cell>
              <table:table-cell office:value-type="float" office:value="0.00113359">
                <text:p>0.00113359</text:p>
              </table:table-cell>
              <table:table-cell office:value-type="float" office:value="16384">
                <text:p>16384</text:p>
              </table:table-cell>
              <table:table-cell office:value-type="float" office:value="0.00007742">
                <text:p>0.00007742</text:p>
              </table:table-cell>
              <table:table-cell office:value-type="float" office:value="16384">
                <text:p>16384</text:p>
              </table:table-cell>
              <table:table-cell office:value-type="float" office:value="0.00007692">
                <text:p>0.00007692</text:p>
              </table:table-cell>
              <table:table-cell office:value-type="float" office:value="16384">
                <text:p>16384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39">
                <text:p>0.00007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32148">
                <text:p>0.00232148</text:p>
              </table:table-cell>
              <table:table-cell office:value-type="float" office:value="32768">
                <text:p>32768</text:p>
              </table:table-cell>
              <table:table-cell office:value-type="float" office:value="0.00183381">
                <text:p>0.00183381</text:p>
              </table:table-cell>
              <table:table-cell office:value-type="float" office:value="32768">
                <text:p>32768</text:p>
              </table:table-cell>
              <table:table-cell office:value-type="float" office:value="0.00130993">
                <text:p>0.00130993</text:p>
              </table:table-cell>
              <table:table-cell office:value-type="float" office:value="32768">
                <text:p>32768</text:p>
              </table:table-cell>
              <table:table-cell office:value-type="float" office:value="0.00087736">
                <text:p>0.00087736</text:p>
              </table:table-cell>
              <table:table-cell office:value-type="float" office:value="32768">
                <text:p>32768</text:p>
              </table:table-cell>
              <table:table-cell office:value-type="float" office:value="0.0013589">
                <text:p>0.0013589</text:p>
              </table:table-cell>
              <table:table-cell office:value-type="float" office:value="32768">
                <text:p>32768</text:p>
              </table:table-cell>
              <table:table-cell office:value-type="float" office:value="0.00012852">
                <text:p>0.00012852</text:p>
              </table:table-cell>
              <table:table-cell office:value-type="float" office:value="32768">
                <text:p>32768</text:p>
              </table:table-cell>
              <table:table-cell office:value-type="float" office:value="0.00010723">
                <text:p>0.00010723</text:p>
              </table:table-cell>
              <table:table-cell office:value-type="float" office:value="32768">
                <text:p>32768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2143">
                <text:p>0.0001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487687">
                <text:p>0.00487687</text:p>
              </table:table-cell>
              <table:table-cell office:value-type="float" office:value="65536">
                <text:p>65536</text:p>
              </table:table-cell>
              <table:table-cell office:value-type="float" office:value="0.00396164">
                <text:p>0.00396164</text:p>
              </table:table-cell>
              <table:table-cell office:value-type="float" office:value="65536">
                <text:p>65536</text:p>
              </table:table-cell>
              <table:table-cell office:value-type="float" office:value="0.0029245">
                <text:p>0.0029245</text:p>
              </table:table-cell>
              <table:table-cell office:value-type="float" office:value="65536">
                <text:p>65536</text:p>
              </table:table-cell>
              <table:table-cell office:value-type="float" office:value="0.00203201">
                <text:p>0.00203201</text:p>
              </table:table-cell>
              <table:table-cell office:value-type="float" office:value="65536">
                <text:p>65536</text:p>
              </table:table-cell>
              <table:table-cell office:value-type="float" office:value="0.00314913">
                <text:p>0.00314913</text:p>
              </table:table-cell>
              <table:table-cell office:value-type="float" office:value="65536">
                <text:p>65536</text:p>
              </table:table-cell>
              <table:table-cell office:value-type="float" office:value="0.00018722">
                <text:p>0.00018722</text:p>
              </table:table-cell>
              <table:table-cell office:value-type="float" office:value="65536">
                <text:p>65536</text:p>
              </table:table-cell>
              <table:table-cell office:value-type="float" office:value="0.00017102">
                <text:p>0.00017102</text:p>
              </table:table-cell>
              <table:table-cell office:value-type="float" office:value="65536">
                <text:p>65536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7338">
                <text:p>0.0001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052219">
                <text:p>0.01052219</text:p>
              </table:table-cell>
              <table:table-cell office:value-type="float" office:value="131072">
                <text:p>131072</text:p>
              </table:table-cell>
              <table:table-cell office:value-type="float" office:value="0.00864501">
                <text:p>0.00864501</text:p>
              </table:table-cell>
              <table:table-cell office:value-type="float" office:value="131072">
                <text:p>131072</text:p>
              </table:table-cell>
              <table:table-cell office:value-type="float" office:value="0.00662065">
                <text:p>0.00662065</text:p>
              </table:table-cell>
              <table:table-cell office:value-type="float" office:value="131072">
                <text:p>131072</text:p>
              </table:table-cell>
              <table:table-cell office:value-type="float" office:value="0.00469254">
                <text:p>0.00469254</text:p>
              </table:table-cell>
              <table:table-cell office:value-type="float" office:value="131072">
                <text:p>131072</text:p>
              </table:table-cell>
              <table:table-cell office:value-type="float" office:value="0.00263776">
                <text:p>0.00263776</text:p>
              </table:table-cell>
              <table:table-cell office:value-type="float" office:value="131072">
                <text:p>131072</text:p>
              </table:table-cell>
              <table:table-cell office:value-type="float" office:value="0.00310524">
                <text:p>0.00310524</text:p>
              </table:table-cell>
              <table:table-cell office:value-type="float" office:value="131072">
                <text:p>131072</text:p>
              </table:table-cell>
              <table:table-cell office:value-type="float" office:value="0.00045136">
                <text:p>0.00045136</text:p>
              </table:table-cell>
              <table:table-cell office:value-type="float" office:value="131072">
                <text:p>131072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6688">
                <text:p>0.0003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2212609">
                <text:p>0.02212609</text:p>
              </table:table-cell>
              <table:table-cell office:value-type="float" office:value="262144">
                <text:p>262144</text:p>
              </table:table-cell>
              <table:table-cell office:value-type="float" office:value="0.01826014">
                <text:p>0.01826014</text:p>
              </table:table-cell>
              <table:table-cell office:value-type="float" office:value="262144">
                <text:p>262144</text:p>
              </table:table-cell>
              <table:table-cell office:value-type="float" office:value="0.0139531">
                <text:p>0.0139531</text:p>
              </table:table-cell>
              <table:table-cell office:value-type="float" office:value="262144">
                <text:p>262144</text:p>
              </table:table-cell>
              <table:table-cell office:value-type="float" office:value="0.01059883">
                <text:p>0.01059883</text:p>
              </table:table-cell>
              <table:table-cell office:value-type="float" office:value="262144">
                <text:p>262144</text:p>
              </table:table-cell>
              <table:table-cell office:value-type="float" office:value="0.00613327">
                <text:p>0.00613327</text:p>
              </table:table-cell>
              <table:table-cell office:value-type="float" office:value="262144">
                <text:p>262144</text:p>
              </table:table-cell>
              <table:table-cell office:value-type="float" office:value="0.00381534">
                <text:p>0.00381534</text:p>
              </table:table-cell>
              <table:table-cell office:value-type="float" office:value="262144">
                <text:p>262144</text:p>
              </table:table-cell>
              <table:table-cell office:value-type="float" office:value="0.00045156">
                <text:p>0.00045156</text:p>
              </table:table-cell>
              <table:table-cell office:value-type="float" office:value="262144">
                <text:p>262144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8174">
                <text:p>0.00048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0001624">
                <text:p>0.10001624</text:p>
              </table:table-cell>
              <table:table-cell office:value-type="float" office:value="524288">
                <text:p>524288</text:p>
              </table:table-cell>
              <table:table-cell office:value-type="float" office:value="0.08567457">
                <text:p>0.08567457</text:p>
              </table:table-cell>
              <table:table-cell office:value-type="float" office:value="524288">
                <text:p>524288</text:p>
              </table:table-cell>
              <table:table-cell office:value-type="float" office:value="0.06843435">
                <text:p>0.06843435</text:p>
              </table:table-cell>
              <table:table-cell office:value-type="float" office:value="524288">
                <text:p>524288</text:p>
              </table:table-cell>
              <table:table-cell office:value-type="float" office:value="0.05340237">
                <text:p>0.05340237</text:p>
              </table:table-cell>
              <table:table-cell office:value-type="float" office:value="524288">
                <text:p>524288</text:p>
              </table:table-cell>
              <table:table-cell office:value-type="float" office:value="0.03393615">
                <text:p>0.03393615</text:p>
              </table:table-cell>
              <table:table-cell office:value-type="float" office:value="524288">
                <text:p>524288</text:p>
              </table:table-cell>
              <table:table-cell office:value-type="float" office:value="0.01814354">
                <text:p>0.01814354</text:p>
              </table:table-cell>
              <table:table-cell office:value-type="float" office:value="524288">
                <text:p>524288</text:p>
              </table:table-cell>
              <table:table-cell office:value-type="float" office:value="0.0014842">
                <text:p>0.0014842</text:p>
              </table:table-cell>
              <table:table-cell office:value-type="float" office:value="524288">
                <text:p>524288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9237">
                <text:p>0.0014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21242948">
                <text:p>0.21242948</text:p>
              </table:table-cell>
              <table:table-cell office:value-type="float" office:value="1048576">
                <text:p>1048576</text:p>
              </table:table-cell>
              <table:table-cell office:value-type="float" office:value="0.18405969">
                <text:p>0.18405969</text:p>
              </table:table-cell>
              <table:table-cell office:value-type="float" office:value="1048576">
                <text:p>1048576</text:p>
              </table:table-cell>
              <table:table-cell office:value-type="float" office:value="0.15116227">
                <text:p>0.15116227</text:p>
              </table:table-cell>
              <table:table-cell office:value-type="float" office:value="1048576">
                <text:p>1048576</text:p>
              </table:table-cell>
              <table:table-cell office:value-type="float" office:value="0.12002983">
                <text:p>0.12002983</text:p>
              </table:table-cell>
              <table:table-cell office:value-type="float" office:value="1048576">
                <text:p>1048576</text:p>
              </table:table-cell>
              <table:table-cell office:value-type="float" office:value="0.08188674">
                <text:p>0.08188674</text:p>
              </table:table-cell>
              <table:table-cell office:value-type="float" office:value="1048576">
                <text:p>1048576</text:p>
              </table:table-cell>
              <table:table-cell office:value-type="float" office:value="0.04984005">
                <text:p>0.04984005</text:p>
              </table:table-cell>
              <table:table-cell office:value-type="float" office:value="1048576">
                <text:p>1048576</text:p>
              </table:table-cell>
              <table:table-cell office:value-type="float" office:value="0.03943228">
                <text:p>0.03943228</text:p>
              </table:table-cell>
              <table:table-cell office:value-type="float" office:value="1048576">
                <text:p>1048576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1567669">
                <text:p>0.01567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7152">
                <text:p>2097152</text:p>
              </table:table-cell>
              <table:table-cell office:value-type="float" office:value="0.44316271">
                <text:p>0.44316271</text:p>
              </table:table-cell>
              <table:table-cell office:value-type="float" office:value="2097152">
                <text:p>2097152</text:p>
              </table:table-cell>
              <table:table-cell office:value-type="float" office:value="0.38144665">
                <text:p>0.38144665</text:p>
              </table:table-cell>
              <table:table-cell office:value-type="float" office:value="2097152">
                <text:p>2097152</text:p>
              </table:table-cell>
              <table:table-cell office:value-type="float" office:value="0.32453972">
                <text:p>0.32453972</text:p>
              </table:table-cell>
              <table:table-cell office:value-type="float" office:value="2097152">
                <text:p>2097152</text:p>
              </table:table-cell>
              <table:table-cell office:value-type="float" office:value="0.26117468">
                <text:p>0.26117468</text:p>
              </table:table-cell>
              <table:table-cell office:value-type="float" office:value="2097152">
                <text:p>2097152</text:p>
              </table:table-cell>
              <table:table-cell office:value-type="float" office:value="0.175047">
                <text:p>0.175047</text:p>
              </table:table-cell>
              <table:table-cell office:value-type="float" office:value="2097152">
                <text:p>2097152</text:p>
              </table:table-cell>
              <table:table-cell office:value-type="float" office:value="0.11824276">
                <text:p>0.11824276</text:p>
              </table:table-cell>
              <table:table-cell office:value-type="float" office:value="2097152">
                <text:p>2097152</text:p>
              </table:table-cell>
              <table:table-cell office:value-type="float" office:value="0.05450765">
                <text:p>0.05450765</text:p>
              </table:table-cell>
              <table:table-cell office:value-type="float" office:value="2097152">
                <text:p>2097152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0926839">
                <text:p>0.00926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4304">
                <text:p>4194304</text:p>
              </table:table-cell>
              <table:table-cell office:value-type="float" office:value="0.92825489">
                <text:p>0.92825489</text:p>
              </table:table-cell>
              <table:table-cell office:value-type="float" office:value="4194304">
                <text:p>4194304</text:p>
              </table:table-cell>
              <table:table-cell office:value-type="float" office:value="0.80587715">
                <text:p>0.80587715</text:p>
              </table:table-cell>
              <table:table-cell office:value-type="float" office:value="4194304">
                <text:p>4194304</text:p>
              </table:table-cell>
              <table:table-cell office:value-type="float" office:value="0.68790225">
                <text:p>0.68790225</text:p>
              </table:table-cell>
              <table:table-cell office:value-type="float" office:value="4194304">
                <text:p>4194304</text:p>
              </table:table-cell>
              <table:table-cell office:value-type="float" office:value="0.55281258">
                <text:p>0.55281258</text:p>
              </table:table-cell>
              <table:table-cell office:value-type="float" office:value="4194304">
                <text:p>4194304</text:p>
              </table:table-cell>
              <table:table-cell office:value-type="float" office:value="0.39244235">
                <text:p>0.39244235</text:p>
              </table:table-cell>
              <table:table-cell office:value-type="float" office:value="4194304">
                <text:p>4194304</text:p>
              </table:table-cell>
              <table:table-cell office:value-type="float" office:value="0.28653811">
                <text:p>0.28653811</text:p>
              </table:table-cell>
              <table:table-cell office:value-type="float" office:value="4194304">
                <text:p>4194304</text:p>
              </table:table-cell>
              <table:table-cell office:value-type="float" office:value="0.15395144">
                <text:p>0.15395144</text:p>
              </table:table-cell>
              <table:table-cell office:value-type="float" office:value="4194304">
                <text:p>419430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3607466">
                <text:p>0.03607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8608">
                <text:p>8388608</text:p>
              </table:table-cell>
              <table:table-cell office:value-type="float" office:value="1.94423625">
                <text:p>1.94423625</text:p>
              </table:table-cell>
              <table:table-cell office:value-type="float" office:value="8388608">
                <text:p>8388608</text:p>
              </table:table-cell>
              <table:table-cell office:value-type="float" office:value="1.69587297">
                <text:p>1.69587297</text:p>
              </table:table-cell>
              <table:table-cell office:value-type="float" office:value="8388608">
                <text:p>8388608</text:p>
              </table:table-cell>
              <table:table-cell office:value-type="float" office:value="1.48235481">
                <text:p>1.48235481</text:p>
              </table:table-cell>
              <table:table-cell office:value-type="float" office:value="8388608">
                <text:p>8388608</text:p>
              </table:table-cell>
              <table:table-cell office:value-type="float" office:value="1.18708863">
                <text:p>1.18708863</text:p>
              </table:table-cell>
              <table:table-cell office:value-type="float" office:value="8388608">
                <text:p>8388608</text:p>
              </table:table-cell>
              <table:table-cell office:value-type="float" office:value="0.88385134">
                <text:p>0.88385134</text:p>
              </table:table-cell>
              <table:table-cell office:value-type="float" office:value="8388608">
                <text:p>8388608</text:p>
              </table:table-cell>
              <table:table-cell office:value-type="float" office:value="0.6209824">
                <text:p>0.6209824</text:p>
              </table:table-cell>
              <table:table-cell office:value-type="float" office:value="8388608">
                <text:p>8388608</text:p>
              </table:table-cell>
              <table:table-cell office:value-type="float" office:value="0.37408696">
                <text:p>0.37408696</text:p>
              </table:table-cell>
              <table:table-cell office:value-type="float" office:value="8388608">
                <text:p>8388608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481072">
                <text:p>0.048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4.07791845">
                <text:p>4.07791845</text:p>
              </table:table-cell>
              <table:table-cell office:value-type="float" office:value="16777216">
                <text:p>16777216</text:p>
              </table:table-cell>
              <table:table-cell office:value-type="float" office:value="3.53209748">
                <text:p>3.53209748</text:p>
              </table:table-cell>
              <table:table-cell office:value-type="float" office:value="16777216">
                <text:p>16777216</text:p>
              </table:table-cell>
              <table:table-cell office:value-type="float" office:value="3.17620311">
                <text:p>3.17620311</text:p>
              </table:table-cell>
              <table:table-cell office:value-type="float" office:value="16777216">
                <text:p>16777216</text:p>
              </table:table-cell>
              <table:table-cell office:value-type="float" office:value="2.56023466">
                <text:p>2.56023466</text:p>
              </table:table-cell>
              <table:table-cell office:value-type="float" office:value="16777216">
                <text:p>16777216</text:p>
              </table:table-cell>
              <table:table-cell office:value-type="float" office:value="1.88502364">
                <text:p>1.88502364</text:p>
              </table:table-cell>
              <table:table-cell office:value-type="float" office:value="16777216">
                <text:p>16777216</text:p>
              </table:table-cell>
              <table:table-cell office:value-type="float" office:value="1.4433003">
                <text:p>1.4433003</text:p>
              </table:table-cell>
              <table:table-cell office:value-type="float" office:value="16777216">
                <text:p>16777216</text:p>
              </table:table-cell>
              <table:table-cell office:value-type="float" office:value="0.90360528">
                <text:p>0.90360528</text:p>
              </table:table-cell>
              <table:table-cell office:value-type="float" office:value="16777216">
                <text:p>1677721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06195102">
                <text:p>0.0619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