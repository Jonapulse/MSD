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6.6307in" svg:y="3.7843in">
            <draw:object draw:notify-on-update-of-ranges="Sheet1.A26:Sheet1.A40 Sheet1.A24:Sheet1.A24 Sheet1.B26:Sheet1.B40 Sheet1.C26:Sheet1.C40 Sheet1.C24:Sheet1.C24 Sheet1.D26:Sheet1.D40 Sheet1.E26:Sheet1.E40 Sheet1.E24:Sheet1.E24 Sheet1.F26:Sheet1.F40 Sheet1.G26:Sheet1.G40 Sheet1.G24:Sheet1.G24 Sheet1.H26:Sheet1.H40 Sheet1.I26:Sheet1.I40 Sheet1.I24:Sheet1.I24 Sheet1.J26:Sheet1.J40 Sheet1.C26:Sheet1.C40 Sheet1.K24:Sheet1.K24 Sheet1.L26:Sheet1.L40 Sheet1.M26:Sheet1.M40 Sheet1.M24:Sheet1.M24 Sheet1.N26:Sheet1.N40 Sheet1.O26:Sheet1.O40 Sheet1.O24:Sheet1.O24 Sheet1.P26:Sheet1.P40 Sheet1.P26:Sheet1.P40 Sheet1.Q24:Sheet1.Q24 Sheet1.R26:Sheet1.R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9.5567in" svg:y="13.0646in">
            <draw:object draw:notify-on-update-of-ranges="Sheet1.A63:Sheet1.A73 Sheet1.A61:Sheet1.A61 Sheet1.B63:Sheet1.B73 Sheet1.C63:Sheet1.C73 Sheet1.C61:Sheet1.C61 Sheet1.D63:Sheet1.D73 Sheet1.E63:Sheet1.E73 Sheet1.E61:Sheet1.E61 Sheet1.F63:Sheet1.F73 Sheet1.G63:Sheet1.G73 Sheet1.G61:Sheet1.G61 Sheet1.H63:Sheet1.H73 Sheet1.I63:Sheet1.I73 Sheet1.I61:Sheet1.I61 Sheet1.J63:Sheet1.J73 Sheet1.K63:Sheet1.K73 Sheet1.K61:Sheet1.K61 Sheet1.L63:Sheet1.L73 Sheet1.M63:Sheet1.M73 Sheet1.M61:Sheet1.M61 Sheet1.N63:Sheet1.N73 Sheet1.O63:Sheet1.O73 Sheet1.O61:Sheet1.O61 Sheet1.P63:Sheet1.P7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13in" svg:height="3.5433in" svg:x="8.9091in" svg:y="16.9717in">
            <draw:object draw:notify-on-update-of-ranges="Sheet1.A90:Sheet1.A91 Sheet1.B92:Sheet1.B102 Sheet1.B90:Sheet1.B91 Sheet1.A92:Sheet1.A102 Sheet1.C90:Sheet1.C91 Sheet1.D92:Sheet1.D102 Sheet1.D90:Sheet1.D91 Sheet1.C92:Sheet1.C102 Sheet1.E90:Sheet1.E91 Sheet1.F92:Sheet1.F102 Sheet1.F90:Sheet1.F91 Sheet1.E92:Sheet1.E10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3.0362in" svg:y="20.7445in">
            <draw:object draw:notify-on-update-of-ranges="Sheet1.A77:Sheet1.A78 Sheet1.A79:Sheet1.A89 Sheet1.B77:Sheet1.B78 Sheet1.B79:Sheet1.B89 Sheet1.C77:Sheet1.C78 Sheet1.C79:Sheet1.C89 Sheet1.D77:Sheet1.D78 Sheet1.D79:Sheet1.D89 Sheet1.E77:Sheet1.E78 Sheet1.E79:Sheet1.E89 Sheet1.F77:Sheet1.F78 Sheet1.F79:Sheet1.F8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8.8862in" svg:y="21.0173in">
            <draw:object draw:notify-on-update-of-ranges="Sheet1.A119:Sheet1.A129 Sheet1.A117:Sheet1.A117 Sheet1.B119:Sheet1.B129 Sheet1.C119:Sheet1.C129 Sheet1.C117:Sheet1.C117 Sheet1.D119:Sheet1.D129 Sheet1.E119:Sheet1.E129 Sheet1.E117:Sheet1.E117 Sheet1.F119:Sheet1.F129 Sheet1.G119:Sheet1.G129 Sheet1.G117:Sheet1.G117 Sheet1.H119:Sheet1.H129 Sheet1.I119:Sheet1.I129 Sheet1.I117:Sheet1.I117 Sheet1.J119:Sheet1.J129 Sheet1.K119:Sheet1.K129 Sheet1.K117:Sheet1.K117 Sheet1.L119:Sheet1.L12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0.9287in" svg:y="20.3059in">
            <draw:object draw:notify-on-update-of-ranges="Sheet1.A119:Sheet1.A129 Sheet1.A117:Sheet1.A117 Sheet1.B130:Sheet1.B14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Pre-fix mergesort iss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 (0 thresh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 (10 thresh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 (50 thresh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 (100 thresh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 (500 thresh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 (1000 thresh)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office:value-type="float" office:value="0.00029011" calcext:value-type="float">
            <text:p>2.90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408684" calcext:value-type="float">
            <text:p>4.09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390839" calcext:value-type="float">
            <text:p>3.91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408959" calcext:value-type="float">
            <text:p>4.09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389085" calcext:value-type="float">
            <text:p>3.89E-04</text:p>
          </table:table-cell>
          <table:table-cell table:number-columns-repeated="10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1" office:value-type="float" office:value="0.000585075" calcext:value-type="float">
            <text:p>5.85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186791" calcext:value-type="float">
            <text:p>1.87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192316" calcext:value-type="float">
            <text:p>1.92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199159" calcext:value-type="float">
            <text:p>1.99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208832" calcext:value-type="float">
            <text:p>2.09E-04</text:p>
          </table:table-cell>
          <table:table-cell table:number-columns-repeated="10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style-name="ce1" office:value-type="float" office:value="0.000234167" calcext:value-type="float">
            <text:p>2.34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528809" calcext:value-type="float">
            <text:p>5.29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513741" calcext:value-type="float">
            <text:p>5.14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54742" calcext:value-type="float">
            <text:p>5.47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570511" calcext:value-type="float">
            <text:p>5.71E-04</text:p>
          </table:table-cell>
          <table:table-cell table:number-columns-repeated="10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style-name="ce1" office:value-type="float" office:value="0.000496363" calcext:value-type="float">
            <text:p>4.96E-04</text:p>
          </table:table-cell>
          <table:table-cell office:value-type="float" office:value="8192" calcext:value-type="float">
            <text:p>8192</text:p>
          </table:table-cell>
          <table:table-cell office:value-type="float" office:value="0.001679979" calcext:value-type="float">
            <text:p>0.001679979</text:p>
          </table:table-cell>
          <table:table-cell office:value-type="float" office:value="8192" calcext:value-type="float">
            <text:p>8192</text:p>
          </table:table-cell>
          <table:table-cell office:value-type="float" office:value="0.001629692" calcext:value-type="float">
            <text:p>0.001629692</text:p>
          </table:table-cell>
          <table:table-cell office:value-type="float" office:value="8192" calcext:value-type="float">
            <text:p>8192</text:p>
          </table:table-cell>
          <table:table-cell office:value-type="float" office:value="0.001673065" calcext:value-type="float">
            <text:p>0.001673065</text:p>
          </table:table-cell>
          <table:table-cell office:value-type="float" office:value="8192" calcext:value-type="float">
            <text:p>8192</text:p>
          </table:table-cell>
          <table:table-cell office:value-type="float" office:value="0.00173266" calcext:value-type="float">
            <text:p>0.00173266</text:p>
          </table:table-cell>
          <table:table-cell table:number-columns-repeated="10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10922" calcext:value-type="float">
            <text:p>0.0010922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562586" calcext:value-type="float">
            <text:p>0.00562586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5288885" calcext:value-type="float">
            <text:p>0.005288885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5660712" calcext:value-type="float">
            <text:p>0.005660712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5817085" calcext:value-type="float">
            <text:p>0.005817085</text:p>
          </table:table-cell>
          <table:table-cell table:number-columns-repeated="10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2255037" calcext:value-type="float">
            <text:p>0.002255037</text:p>
          </table:table-cell>
          <table:table-cell office:value-type="float" office:value="32768" calcext:value-type="float">
            <text:p>32768</text:p>
          </table:table-cell>
          <table:table-cell office:value-type="float" office:value="0.021179352" calcext:value-type="float">
            <text:p>0.021179352</text:p>
          </table:table-cell>
          <table:table-cell office:value-type="float" office:value="32768" calcext:value-type="float">
            <text:p>32768</text:p>
          </table:table-cell>
          <table:table-cell office:value-type="float" office:value="0.020309944" calcext:value-type="float">
            <text:p>0.02030994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20420394" calcext:value-type="float">
            <text:p>0.02042039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20907982" calcext:value-type="float">
            <text:p>0.020907982</text:p>
          </table:table-cell>
          <table:table-cell table:number-columns-repeated="10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489083" calcext:value-type="float">
            <text:p>0.00489083</text:p>
          </table:table-cell>
          <table:table-cell office:value-type="float" office:value="65536" calcext:value-type="float">
            <text:p>65536</text:p>
          </table:table-cell>
          <table:table-cell office:value-type="float" office:value="0.079721717" calcext:value-type="float">
            <text:p>0.079721717</text:p>
          </table:table-cell>
          <table:table-cell office:value-type="float" office:value="65536" calcext:value-type="float">
            <text:p>65536</text:p>
          </table:table-cell>
          <table:table-cell office:value-type="float" office:value="0.076021788" calcext:value-type="float">
            <text:p>0.076021788</text:p>
          </table:table-cell>
          <table:table-cell office:value-type="float" office:value="65536" calcext:value-type="float">
            <text:p>65536</text:p>
          </table:table-cell>
          <table:table-cell office:value-type="float" office:value="0.079968503" calcext:value-type="float">
            <text:p>0.079968503</text:p>
          </table:table-cell>
          <table:table-cell office:value-type="float" office:value="65536" calcext:value-type="float">
            <text:p>65536</text:p>
          </table:table-cell>
          <table:table-cell office:value-type="float" office:value="0.112843523" calcext:value-type="float">
            <text:p>0.112843523</text:p>
          </table:table-cell>
          <table:table-cell table:number-columns-repeated="10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0646256" calcext:value-type="float">
            <text:p>0.010646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327246689" calcext:value-type="float">
            <text:p>0.327246689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309268316" calcext:value-type="float">
            <text:p>0.309268316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312953525" calcext:value-type="float">
            <text:p>0.312953525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31984327" calcext:value-type="float">
            <text:p>0.31984327</text:p>
          </table:table-cell>
          <table:table-cell table:number-columns-repeated="10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1<text:span text:style-name="T1">st</text:span> capture, when I think I might have hit the threshold and started calling both sorts, hence why it always increased…?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 (0 thresh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 (10 thresh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 (50 thresh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 (100 thresh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 (500 thresh)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office:value-type="float" office:value="0.00029011" calcext:value-type="float">
            <text:p>2.90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408684" calcext:value-type="float">
            <text:p>4.09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390839" calcext:value-type="float">
            <text:p>3.91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408959" calcext:value-type="float">
            <text:p>4.09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389085" calcext:value-type="float">
            <text:p>3.89E-04</text:p>
          </table:table-cell>
          <table:table-cell table:number-columns-repeated="10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1" office:value-type="float" office:value="0.000585075" calcext:value-type="float">
            <text:p>5.85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186791" calcext:value-type="float">
            <text:p>1.87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192316" calcext:value-type="float">
            <text:p>1.92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199159" calcext:value-type="float">
            <text:p>1.99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208832" calcext:value-type="float">
            <text:p>2.09E-04</text:p>
          </table:table-cell>
          <table:table-cell table:number-columns-repeated="10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style-name="ce1" office:value-type="float" office:value="0.000234167" calcext:value-type="float">
            <text:p>2.34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528809" calcext:value-type="float">
            <text:p>5.29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513741" calcext:value-type="float">
            <text:p>5.14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54742" calcext:value-type="float">
            <text:p>5.47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570511" calcext:value-type="float">
            <text:p>5.71E-04</text:p>
          </table:table-cell>
          <table:table-cell table:number-columns-repeated="10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style-name="ce1" office:value-type="float" office:value="0.000496363" calcext:value-type="float">
            <text:p>4.96E-04</text:p>
          </table:table-cell>
          <table:table-cell office:value-type="float" office:value="8192" calcext:value-type="float">
            <text:p>8192</text:p>
          </table:table-cell>
          <table:table-cell office:value-type="float" office:value="0.001679979" calcext:value-type="float">
            <text:p>0.001679979</text:p>
          </table:table-cell>
          <table:table-cell office:value-type="float" office:value="8192" calcext:value-type="float">
            <text:p>8192</text:p>
          </table:table-cell>
          <table:table-cell office:value-type="float" office:value="0.001629692" calcext:value-type="float">
            <text:p>0.001629692</text:p>
          </table:table-cell>
          <table:table-cell office:value-type="float" office:value="8192" calcext:value-type="float">
            <text:p>8192</text:p>
          </table:table-cell>
          <table:table-cell office:value-type="float" office:value="0.001673065" calcext:value-type="float">
            <text:p>0.001673065</text:p>
          </table:table-cell>
          <table:table-cell office:value-type="float" office:value="8192" calcext:value-type="float">
            <text:p>8192</text:p>
          </table:table-cell>
          <table:table-cell office:value-type="float" office:value="0.00173266" calcext:value-type="float">
            <text:p>0.00173266</text:p>
          </table:table-cell>
          <table:table-cell table:number-columns-repeated="10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10922" calcext:value-type="float">
            <text:p>0.0010922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562586" calcext:value-type="float">
            <text:p>0.00562586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5288885" calcext:value-type="float">
            <text:p>0.005288885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5660712" calcext:value-type="float">
            <text:p>0.005660712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5817085" calcext:value-type="float">
            <text:p>0.005817085</text:p>
          </table:table-cell>
          <table:table-cell table:number-columns-repeated="10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2255037" calcext:value-type="float">
            <text:p>0.002255037</text:p>
          </table:table-cell>
          <table:table-cell office:value-type="float" office:value="32768" calcext:value-type="float">
            <text:p>32768</text:p>
          </table:table-cell>
          <table:table-cell office:value-type="float" office:value="0.021179352" calcext:value-type="float">
            <text:p>0.021179352</text:p>
          </table:table-cell>
          <table:table-cell office:value-type="float" office:value="32768" calcext:value-type="float">
            <text:p>32768</text:p>
          </table:table-cell>
          <table:table-cell office:value-type="float" office:value="0.020309944" calcext:value-type="float">
            <text:p>0.02030994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20420394" calcext:value-type="float">
            <text:p>0.02042039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20907982" calcext:value-type="float">
            <text:p>0.020907982</text:p>
          </table:table-cell>
          <table:table-cell table:number-columns-repeated="10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489083" calcext:value-type="float">
            <text:p>0.00489083</text:p>
          </table:table-cell>
          <table:table-cell office:value-type="float" office:value="65536" calcext:value-type="float">
            <text:p>65536</text:p>
          </table:table-cell>
          <table:table-cell office:value-type="float" office:value="0.079721717" calcext:value-type="float">
            <text:p>0.079721717</text:p>
          </table:table-cell>
          <table:table-cell office:value-type="float" office:value="65536" calcext:value-type="float">
            <text:p>65536</text:p>
          </table:table-cell>
          <table:table-cell office:value-type="float" office:value="0.076021788" calcext:value-type="float">
            <text:p>0.076021788</text:p>
          </table:table-cell>
          <table:table-cell office:value-type="float" office:value="65536" calcext:value-type="float">
            <text:p>65536</text:p>
          </table:table-cell>
          <table:table-cell office:value-type="float" office:value="0.079968503" calcext:value-type="float">
            <text:p>0.079968503</text:p>
          </table:table-cell>
          <table:table-cell office:value-type="float" office:value="65536" calcext:value-type="float">
            <text:p>65536</text:p>
          </table:table-cell>
          <table:table-cell office:value-type="float" office:value="0.112843523" calcext:value-type="float">
            <text:p>0.112843523</text:p>
          </table:table-cell>
          <table:table-cell table:number-columns-repeated="10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0646256" calcext:value-type="float">
            <text:p>0.010646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327246689" calcext:value-type="float">
            <text:p>0.327246689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309268316" calcext:value-type="float">
            <text:p>0.309268316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312953525" calcext:value-type="float">
            <text:p>0.312953525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31984327" calcext:value-type="float">
            <text:p>0.31984327</text:p>
          </table:table-cell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0 threshold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office:value-type="float" office:value="100000" calcext:value-type="float">
            <text:p>100000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  <table:table-cell office:value-type="string" calcext:value-type="string">
            <text:p>10^7</text:p>
          </table:table-cell>
          <table:table-cell/>
          <table:table-cell office:value-type="string" calcext:value-type="string">
            <text:p>10^8 (all insertion sort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office:value-type="float" office:value="0.00047999" calcext:value-type="float">
            <text:p>4.80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38783" calcext:value-type="float">
            <text:p>3.88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46673" calcext:value-type="float">
            <text:p>4.67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21661" calcext:value-type="float">
            <text:p>2.17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03342" calcext:value-type="float">
            <text:p>3.34E-05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03327" calcext:value-type="float">
            <text:p>3.33E-05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03337" calcext:value-type="float">
            <text:p>3.34E-05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03229" calcext:value-type="float">
            <text:p>3.23E-05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03247" calcext:value-type="float">
            <text:p>3.25E-05</text:p>
          </table:table-cell>
          <table:table-cell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1" office:value-type="float" office:value="0.00057773" calcext:value-type="float">
            <text:p>5.78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8096" calcext:value-type="float">
            <text:p>8.10E-05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23779" calcext:value-type="float">
            <text:p>2.38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42241" calcext:value-type="float">
            <text:p>4.22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2918" calcext:value-type="float">
            <text:p>2.92E-05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2855" calcext:value-type="float">
            <text:p>2.86E-05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2821" calcext:value-type="float">
            <text:p>2.82E-05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2832" calcext:value-type="float">
            <text:p>2.83E-05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2831" calcext:value-type="float">
            <text:p>2.83E-05</text:p>
          </table:table-cell>
          <table:table-cell table:number-columns-repeated="2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style-name="ce1" office:value-type="float" office:value="0.00023302" calcext:value-type="float">
            <text:p>2.33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17483" calcext:value-type="float">
            <text:p>1.75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63748" calcext:value-type="float">
            <text:p>6.37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54947" calcext:value-type="float">
            <text:p>5.49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5143" calcext:value-type="float">
            <text:p>5.14E-05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5142" calcext:value-type="float">
            <text:p>5.14E-05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5359" calcext:value-type="float">
            <text:p>5.36E-05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5135" calcext:value-type="float">
            <text:p>5.14E-05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5114" calcext:value-type="float">
            <text:p>5.11E-05</text:p>
          </table:table-cell>
          <table:table-cell table:number-columns-repeated="2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style-name="ce1" office:value-type="float" office:value="0.00051203" calcext:value-type="float">
            <text:p>5.12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38917" calcext:value-type="float">
            <text:p>3.89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26805" calcext:value-type="float">
            <text:p>2.68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6281" calcext:value-type="float">
            <text:p>6.28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04474" calcext:value-type="float">
            <text:p>4.47E-05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04419" calcext:value-type="float">
            <text:p>4.42E-05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04622" calcext:value-type="float">
            <text:p>4.62E-05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04927" calcext:value-type="float">
            <text:p>4.93E-05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04602" calcext:value-type="float">
            <text:p>4.60E-05</text:p>
          </table:table-cell>
          <table:table-cell table:number-columns-repeated="2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104066" calcext:value-type="float">
            <text:p>0.00104066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81348" calcext:value-type="float">
            <text:p>8.13E-04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58695" calcext:value-type="float">
            <text:p>5.87E-04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37617" calcext:value-type="float">
            <text:p>3.76E-04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113359" calcext:value-type="float">
            <text:p>0.00113359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07742" calcext:value-type="float">
            <text:p>7.74E-05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07692" calcext:value-type="float">
            <text:p>7.69E-05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07766" calcext:value-type="float">
            <text:p>7.77E-05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07739" calcext:value-type="float">
            <text:p>7.74E-05</text:p>
          </table:table-cell>
          <table:table-cell table:number-columns-repeated="2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232148" calcext:value-type="float">
            <text:p>0.00232148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83381" calcext:value-type="float">
            <text:p>0.00183381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30993" calcext:value-type="float">
            <text:p>0.00130993</text:p>
          </table:table-cell>
          <table:table-cell office:value-type="float" office:value="32768" calcext:value-type="float">
            <text:p>32768</text:p>
          </table:table-cell>
          <table:table-cell table:style-name="ce1" office:value-type="float" office:value="0.00087736" calcext:value-type="float">
            <text:p>8.77E-0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3589" calcext:value-type="float">
            <text:p>0.0013589</text:p>
          </table:table-cell>
          <table:table-cell office:value-type="float" office:value="32768" calcext:value-type="float">
            <text:p>32768</text:p>
          </table:table-cell>
          <table:table-cell table:style-name="ce1" office:value-type="float" office:value="0.00012852" calcext:value-type="float">
            <text:p>1.29E-04</text:p>
          </table:table-cell>
          <table:table-cell office:value-type="float" office:value="32768" calcext:value-type="float">
            <text:p>32768</text:p>
          </table:table-cell>
          <table:table-cell table:style-name="ce1" office:value-type="float" office:value="0.00010723" calcext:value-type="float">
            <text:p>1.07E-04</text:p>
          </table:table-cell>
          <table:table-cell office:value-type="float" office:value="32768" calcext:value-type="float">
            <text:p>32768</text:p>
          </table:table-cell>
          <table:table-cell table:style-name="ce1" office:value-type="float" office:value="0.0001065" calcext:value-type="float">
            <text:p>1.07E-04</text:p>
          </table:table-cell>
          <table:table-cell office:value-type="float" office:value="32768" calcext:value-type="float">
            <text:p>32768</text:p>
          </table:table-cell>
          <table:table-cell table:style-name="ce1" office:value-type="float" office:value="0.00012143" calcext:value-type="float">
            <text:p>1.21E-04</text:p>
          </table:table-cell>
          <table:table-cell table:number-columns-repeated="2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487687" calcext:value-type="float">
            <text:p>0.00487687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396164" calcext:value-type="float">
            <text:p>0.00396164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29245" calcext:value-type="float">
            <text:p>0.0029245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203201" calcext:value-type="float">
            <text:p>0.00203201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314913" calcext:value-type="float">
            <text:p>0.00314913</text:p>
          </table:table-cell>
          <table:table-cell office:value-type="float" office:value="65536" calcext:value-type="float">
            <text:p>65536</text:p>
          </table:table-cell>
          <table:table-cell table:style-name="ce1" office:value-type="float" office:value="0.00018722" calcext:value-type="float">
            <text:p>1.87E-04</text:p>
          </table:table-cell>
          <table:table-cell office:value-type="float" office:value="65536" calcext:value-type="float">
            <text:p>65536</text:p>
          </table:table-cell>
          <table:table-cell table:style-name="ce1" office:value-type="float" office:value="0.00017102" calcext:value-type="float">
            <text:p>1.71E-04</text:p>
          </table:table-cell>
          <table:table-cell office:value-type="float" office:value="65536" calcext:value-type="float">
            <text:p>65536</text:p>
          </table:table-cell>
          <table:table-cell table:style-name="ce1" office:value-type="float" office:value="0.00016889" calcext:value-type="float">
            <text:p>1.69E-04</text:p>
          </table:table-cell>
          <table:table-cell office:value-type="float" office:value="65536" calcext:value-type="float">
            <text:p>65536</text:p>
          </table:table-cell>
          <table:table-cell table:style-name="ce1" office:value-type="float" office:value="0.00017338" calcext:value-type="float">
            <text:p>1.73E-04</text:p>
          </table:table-cell>
          <table:table-cell table:number-columns-repeated="2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052219" calcext:value-type="float">
            <text:p>0.01052219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864501" calcext:value-type="float">
            <text:p>0.00864501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662065" calcext:value-type="float">
            <text:p>0.00662065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469254" calcext:value-type="float">
            <text:p>0.00469254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263776" calcext:value-type="float">
            <text:p>0.00263776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310524" calcext:value-type="float">
            <text:p>0.00310524</text:p>
          </table:table-cell>
          <table:table-cell office:value-type="float" office:value="131072" calcext:value-type="float">
            <text:p>131072</text:p>
          </table:table-cell>
          <table:table-cell table:style-name="ce1" office:value-type="float" office:value="0.00045136" calcext:value-type="float">
            <text:p>4.51E-04</text:p>
          </table:table-cell>
          <table:table-cell office:value-type="float" office:value="131072" calcext:value-type="float">
            <text:p>131072</text:p>
          </table:table-cell>
          <table:table-cell table:style-name="ce1" office:value-type="float" office:value="0.00037249" calcext:value-type="float">
            <text:p>3.72E-04</text:p>
          </table:table-cell>
          <table:table-cell office:value-type="float" office:value="131072" calcext:value-type="float">
            <text:p>131072</text:p>
          </table:table-cell>
          <table:table-cell table:style-name="ce1" office:value-type="float" office:value="0.00036688" calcext:value-type="float">
            <text:p>3.67E-04</text:p>
          </table:table-cell>
          <table:table-cell table:number-columns-repeated="2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2212609" calcext:value-type="float">
            <text:p>0.02212609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1826014" calcext:value-type="float">
            <text:p>0.01826014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139531" calcext:value-type="float">
            <text:p>0.0139531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1059883" calcext:value-type="float">
            <text:p>0.01059883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613327" calcext:value-type="float">
            <text:p>0.00613327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381534" calcext:value-type="float">
            <text:p>0.00381534</text:p>
          </table:table-cell>
          <table:table-cell office:value-type="float" office:value="262144" calcext:value-type="float">
            <text:p>262144</text:p>
          </table:table-cell>
          <table:table-cell table:style-name="ce1" office:value-type="float" office:value="0.00045156" calcext:value-type="float">
            <text:p>4.52E-04</text:p>
          </table:table-cell>
          <table:table-cell office:value-type="float" office:value="262144" calcext:value-type="float">
            <text:p>262144</text:p>
          </table:table-cell>
          <table:table-cell table:style-name="ce1" office:value-type="float" office:value="0.00044946" calcext:value-type="float">
            <text:p>4.49E-04</text:p>
          </table:table-cell>
          <table:table-cell office:value-type="float" office:value="262144" calcext:value-type="float">
            <text:p>262144</text:p>
          </table:table-cell>
          <table:table-cell table:style-name="ce1" office:value-type="float" office:value="0.00048174" calcext:value-type="float">
            <text:p>4.82E-04</text:p>
          </table:table-cell>
          <table:table-cell table:number-columns-repeated="2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10001624" calcext:value-type="float">
            <text:p>0.100016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8567457" calcext:value-type="float">
            <text:p>0.08567457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6843435" calcext:value-type="float">
            <text:p>0.06843435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5340237" calcext:value-type="float">
            <text:p>0.05340237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3393615" calcext:value-type="float">
            <text:p>0.03393615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1814354" calcext:value-type="float">
            <text:p>0.01814354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014842" calcext:value-type="float">
            <text:p>0.0014842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0147569" calcext:value-type="float">
            <text:p>0.00147569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0149237" calcext:value-type="float">
            <text:p>0.00149237</text:p>
          </table:table-cell>
          <table:table-cell table:number-columns-repeated="2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21242948" calcext:value-type="float">
            <text:p>0.2124294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8405969" calcext:value-type="float">
            <text:p>0.18405969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5116227" calcext:value-type="float">
            <text:p>0.15116227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2002983" calcext:value-type="float">
            <text:p>0.12002983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8188674" calcext:value-type="float">
            <text:p>0.0818867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4984005" calcext:value-type="float">
            <text:p>0.0498400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3943228" calcext:value-type="float">
            <text:p>0.0394322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2112481" calcext:value-type="float">
            <text:p>0.0211248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1567669" calcext:value-type="float">
            <text:p>0.01567669</text:p>
          </table:table-cell>
          <table:table-cell table:number-columns-repeated="2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44316271" calcext:value-type="float">
            <text:p>0.44316271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.38144665" calcext:value-type="float">
            <text:p>0.38144665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.32453972" calcext:value-type="float">
            <text:p>0.3245397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.26117468" calcext:value-type="float">
            <text:p>0.26117468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.175047" calcext:value-type="float">
            <text:p>0.175047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.11824276" calcext:value-type="float">
            <text:p>0.11824276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.05450765" calcext:value-type="float">
            <text:p>0.05450765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.01897299" calcext:value-type="float">
            <text:p>0.01897299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.00926839" calcext:value-type="float">
            <text:p>0.00926839</text:p>
          </table:table-cell>
          <table:table-cell table:number-columns-repeated="2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92825489" calcext:value-type="float">
            <text:p>0.92825489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0.80587715" calcext:value-type="float">
            <text:p>0.8058771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0.68790225" calcext:value-type="float">
            <text:p>0.6879022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0.55281258" calcext:value-type="float">
            <text:p>0.55281258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0.39244235" calcext:value-type="float">
            <text:p>0.3924423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0.28653811" calcext:value-type="float">
            <text:p>0.2865381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0.15395144" calcext:value-type="float">
            <text:p>0.1539514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0.01927864" calcext:value-type="float">
            <text:p>0.0192786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0.03607466" calcext:value-type="float">
            <text:p>0.03607466</text:p>
          </table:table-cell>
          <table:table-cell table:number-columns-repeated="2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.94423625" calcext:value-type="float">
            <text:p>1.94423625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.69587297" calcext:value-type="float">
            <text:p>1.69587297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.48235481" calcext:value-type="float">
            <text:p>1.48235481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.18708863" calcext:value-type="float">
            <text:p>1.18708863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0.88385134" calcext:value-type="float">
            <text:p>0.88385134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0.6209824" calcext:value-type="float">
            <text:p>0.6209824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0.37408696" calcext:value-type="float">
            <text:p>0.37408696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0.03609886" calcext:value-type="float">
            <text:p>0.03609886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0.0481072" calcext:value-type="float">
            <text:p>0.0481072</text:p>
          </table:table-cell>
          <table:table-cell table:number-columns-repeated="2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4.07791845" calcext:value-type="float">
            <text:p>4.07791845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3.53209748" calcext:value-type="float">
            <text:p>3.53209748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3.17620311" calcext:value-type="float">
            <text:p>3.17620311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2.56023466" calcext:value-type="float">
            <text:p>2.56023466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.88502364" calcext:value-type="float">
            <text:p>1.88502364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.4433003" calcext:value-type="float">
            <text:p>1.4433003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0.90360528" calcext:value-type="float">
            <text:p>0.90360528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0.29360866" calcext:value-type="float">
            <text:p>0.29360866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0.06195102" calcext:value-type="float">
            <text:p>0.061951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0 threshold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office:value-type="float" office:value="100000" calcext:value-type="float">
            <text:p>1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office:value-type="float" office:value="0.000277207" calcext:value-type="float">
            <text:p>2.77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197139" calcext:value-type="float">
            <text:p>1.97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155864" calcext:value-type="float">
            <text:p>1.56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133336" calcext:value-type="float">
            <text:p>1.33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120997" calcext:value-type="float">
            <text:p>1.21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092302" calcext:value-type="float">
            <text:p>9.23E-05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014451" calcext:value-type="float">
            <text:p>1.45E-05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01522" calcext:value-type="float">
            <text:p>1.52E-05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0155" calcext:value-type="float">
            <text:p>1.55E-05</text:p>
          </table:table-cell>
          <table:table-cell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1" office:value-type="float" office:value="0.000112309" calcext:value-type="float">
            <text:p>1.12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76837" calcext:value-type="float">
            <text:p>7.68E-05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322893" calcext:value-type="float">
            <text:p>3.23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27563" calcext:value-type="float">
            <text:p>2.76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173113" calcext:value-type="float">
            <text:p>1.73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118983" calcext:value-type="float">
            <text:p>1.19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15966" calcext:value-type="float">
            <text:p>1.60E-05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1071" calcext:value-type="float">
            <text:p>1.07E-05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10971" calcext:value-type="float">
            <text:p>1.10E-05</text:p>
          </table:table-cell>
          <table:table-cell table:number-columns-repeated="2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style-name="ce1" office:value-type="float" office:value="0.000237842" calcext:value-type="float">
            <text:p>2.38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17671" calcext:value-type="float">
            <text:p>1.77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134287" calcext:value-type="float">
            <text:p>1.34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118915" calcext:value-type="float">
            <text:p>1.19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84457" calcext:value-type="float">
            <text:p>8.45E-05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65317" calcext:value-type="float">
            <text:p>6.53E-05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11219" calcext:value-type="float">
            <text:p>1.12E-05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15012" calcext:value-type="float">
            <text:p>1.50E-05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16546" calcext:value-type="float">
            <text:p>1.65E-05</text:p>
          </table:table-cell>
          <table:table-cell table:number-columns-repeated="2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style-name="ce1" office:value-type="float" office:value="0.000510842" calcext:value-type="float">
            <text:p>5.11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371534" calcext:value-type="float">
            <text:p>3.72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305592" calcext:value-type="float">
            <text:p>3.06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278908" calcext:value-type="float">
            <text:p>2.79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210128" calcext:value-type="float">
            <text:p>2.10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168162" calcext:value-type="float">
            <text:p>1.68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292018" calcext:value-type="float">
            <text:p>2.92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020612" calcext:value-type="float">
            <text:p>2.06E-05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020829" calcext:value-type="float">
            <text:p>2.08E-05</text:p>
          </table:table-cell>
          <table:table-cell/>
          <table:table-cell office:value-type="string" calcext:value-type="string">
            <text:p>…. this is the same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1126009" calcext:value-type="float">
            <text:p>0.001126009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838976" calcext:value-type="float">
            <text:p>8.39E-04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710694" calcext:value-type="float">
            <text:p>7.11E-04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641252" calcext:value-type="float">
            <text:p>6.41E-04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510956" calcext:value-type="float">
            <text:p>5.11E-04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415777" calcext:value-type="float">
            <text:p>4.16E-04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403375" calcext:value-type="float">
            <text:p>4.03E-04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358855" calcext:value-type="float">
            <text:p>3.59E-04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042791" calcext:value-type="float">
            <text:p>4.28E-05</text:p>
          </table:table-cell>
          <table:table-cell/>
          <table:table-cell office:value-type="string" calcext:value-type="string">
            <text:p>No gain from mergeSort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238838" calcext:value-type="float">
            <text:p>0.00238838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79061" calcext:value-type="float">
            <text:p>0.00179061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583939" calcext:value-type="float">
            <text:p>0.001583939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505713" calcext:value-type="float">
            <text:p>0.001505713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265281" calcext:value-type="float">
            <text:p>0.001265281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068111" calcext:value-type="float">
            <text:p>0.001068111</text:p>
          </table:table-cell>
          <table:table-cell office:value-type="float" office:value="32768" calcext:value-type="float">
            <text:p>32768</text:p>
          </table:table-cell>
          <table:table-cell table:style-name="ce1" office:value-type="float" office:value="0.00058781" calcext:value-type="float">
            <text:p>5.88E-04</text:p>
          </table:table-cell>
          <table:table-cell office:value-type="float" office:value="32768" calcext:value-type="float">
            <text:p>32768</text:p>
          </table:table-cell>
          <table:table-cell table:style-name="ce1" office:value-type="float" office:value="0.000423476" calcext:value-type="float">
            <text:p>4.23E-04</text:p>
          </table:table-cell>
          <table:table-cell office:value-type="float" office:value="32768" calcext:value-type="float">
            <text:p>32768</text:p>
          </table:table-cell>
          <table:table-cell table:style-name="ce1" office:value-type="float" office:value="0.00003501" calcext:value-type="float">
            <text:p>3.50E-05</text:p>
          </table:table-cell>
          <table:table-cell table:number-columns-repeated="2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5052414" calcext:value-type="float">
            <text:p>0.005052414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4113264" calcext:value-type="float">
            <text:p>0.004113264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3695027" calcext:value-type="float">
            <text:p>0.003695027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3412795" calcext:value-type="float">
            <text:p>0.003412795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2725405" calcext:value-type="float">
            <text:p>0.002725405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2322628" calcext:value-type="float">
            <text:p>0.002322628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29884" calcext:value-type="float">
            <text:p>0.00129884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022594" calcext:value-type="float">
            <text:p>0.001022594</text:p>
          </table:table-cell>
          <table:table-cell office:value-type="float" office:value="65536" calcext:value-type="float">
            <text:p>65536</text:p>
          </table:table-cell>
          <table:table-cell table:style-name="ce1" office:value-type="float" office:value="0.00008636" calcext:value-type="float">
            <text:p>8.64E-05</text:p>
          </table:table-cell>
          <table:table-cell table:number-columns-repeated="2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0763625" calcext:value-type="float">
            <text:p>0.010763625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9172916" calcext:value-type="float">
            <text:p>0.009172916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8564464" calcext:value-type="float">
            <text:p>0.0085644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8679032" calcext:value-type="float">
            <text:p>0.0086790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8952428" calcext:value-type="float">
            <text:p>0.0089524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7996247" calcext:value-type="float">
            <text:p>0.007996247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5332082" calcext:value-type="float">
            <text:p>0.005332082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4565441" calcext:value-type="float">
            <text:p>0.004565441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1691779" calcext:value-type="float">
            <text:p>0.001691779</text:p>
          </table:table-cell>
          <table:table-cell table:number-columns-repeated="2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23023288" calcext:value-type="float">
            <text:p>0.023023288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18713684" calcext:value-type="float">
            <text:p>0.018713684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18065124" calcext:value-type="float">
            <text:p>0.0180651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1763374" calcext:value-type="float">
            <text:p>0.01763374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15520171" calcext:value-type="float">
            <text:p>0.015520171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13725704" calcext:value-type="float">
            <text:p>0.013725704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9114286" calcext:value-type="float">
            <text:p>0.009114286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815717" calcext:value-type="float">
            <text:p>0.00815717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367616" calcext:value-type="float">
            <text:p>0.00367616</text:p>
          </table:table-cell>
          <table:table-cell table:number-columns-repeated="2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103088801" calcext:value-type="float">
            <text:p>0.103088801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88501461" calcext:value-type="float">
            <text:p>0.088501461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80869739" calcext:value-type="float">
            <text:p>0.080869739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76830453" calcext:value-type="float">
            <text:p>0.076830453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66549053" calcext:value-type="float">
            <text:p>0.066549053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62137603" calcext:value-type="float">
            <text:p>0.062137603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4293137" calcext:value-type="float">
            <text:p>0.04293137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37441451" calcext:value-type="float">
            <text:p>0.037441451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21370435" calcext:value-type="float">
            <text:p>0.021370435</text:p>
          </table:table-cell>
          <table:table-cell table:number-columns-repeated="2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225065663" calcext:value-type="float">
            <text:p>0.225065663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93244978" calcext:value-type="float">
            <text:p>0.19324497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70248586" calcext:value-type="float">
            <text:p>0.17024858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64907916" calcext:value-type="float">
            <text:p>0.1649079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52674831" calcext:value-type="float">
            <text:p>0.15267483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47436434" calcext:value-type="float">
            <text:p>0.14743643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24804089" calcext:value-type="float">
            <text:p>0.124804089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14685216" calcext:value-type="float">
            <text:p>0.1146852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5730931" calcext:value-type="float">
            <text:p>0.0573093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2097152" calcext:value-type="float">
            <text:p>2097152</text:p>
          </table:table-cell>
          <table:table-cell office:value-type="float" office:value="0.39778255" calcext:value-type="float">
            <text:p>0.39778255</text:p>
          </table:table-cell>
          <table:table-cell table:number-columns-repeated="4"/>
          <table:table-cell office:value-type="float" office:value="2097152" calcext:value-type="float">
            <text:p>2097152</text:p>
          </table:table-cell>
          <table:table-cell office:value-type="float" office:value="0.214017591" calcext:value-type="float">
            <text:p>0.21401759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4194304" calcext:value-type="float">
            <text:p>4194304</text:p>
          </table:table-cell>
          <table:table-cell office:value-type="float" office:value="1.016542354" calcext:value-type="float">
            <text:p>1.016542354</text:p>
          </table:table-cell>
          <table:table-cell table:number-columns-repeated="4"/>
          <table:table-cell office:value-type="float" office:value="4194304" calcext:value-type="float">
            <text:p>4194304</text:p>
          </table:table-cell>
          <table:table-cell office:value-type="float" office:value="0.47658812" calcext:value-type="float">
            <text:p>0.476588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8388608" calcext:value-type="float">
            <text:p>8388608</text:p>
          </table:table-cell>
          <table:table-cell office:value-type="float" office:value="2.233665202" calcext:value-type="float">
            <text:p>2.233665202</text:p>
          </table:table-cell>
          <table:table-cell table:number-columns-repeated="4"/>
          <table:table-cell office:value-type="float" office:value="8388608" calcext:value-type="float">
            <text:p>8388608</text:p>
          </table:table-cell>
          <table:table-cell office:value-type="float" office:value="1.438724152" calcext:value-type="float">
            <text:p>1.438724152</text:p>
          </table:table-cell>
          <table:table-cell table:number-columns-repeated="2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Adjusting – re-initializing every tim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0 threshold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50" calcext:value-type="float">
            <text:p>250</text:p>
          </table:table-cell>
          <table:table-cell/>
          <table:table-cell office:value-type="float" office:value="375" calcext:value-type="float">
            <text:p>375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office:value-type="float" office:value="0.00021031541" calcext:value-type="float">
            <text:p>2.10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14672042" calcext:value-type="float">
            <text:p>1.47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1126425" calcext:value-type="float">
            <text:p>1.13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09619457" calcext:value-type="float">
            <text:p>9.62E-05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08104957" calcext:value-type="float">
            <text:p>8.10E-05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08817292" calcext:value-type="float">
            <text:p>8.82E-05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07499917" calcext:value-type="float">
            <text:p>7.50E-05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07427791" calcext:value-type="float">
            <text:p>7.43E-05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05401458" calcext:value-type="float">
            <text:p>5.40E-05</text:p>
          </table:table-cell>
          <table:table-cell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1" office:value-type="float" office:value="0.00010121791" calcext:value-type="float">
            <text:p>1.01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27872084" calcext:value-type="float">
            <text:p>2.79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9297791" calcext:value-type="float">
            <text:p>9.30E-05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2891083" calcext:value-type="float">
            <text:p>2.89E-05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2682625" calcext:value-type="float">
            <text:p>2.68E-05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2686207" calcext:value-type="float">
            <text:p>2.69E-05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8592876" calcext:value-type="float">
            <text:p>8.59E-05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1809084" calcext:value-type="float">
            <text:p>1.81E-05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986125" calcext:value-type="float">
            <text:p>9.86E-05</text:p>
          </table:table-cell>
          <table:table-cell table:number-columns-repeated="2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style-name="ce1" office:value-type="float" office:value="0.00023148625" calcext:value-type="float">
            <text:p>2.31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11016582" calcext:value-type="float">
            <text:p>1.10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8742584" calcext:value-type="float">
            <text:p>8.74E-05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6967959" calcext:value-type="float">
            <text:p>6.97E-05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6016583" calcext:value-type="float">
            <text:p>6.02E-05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5828125" calcext:value-type="float">
            <text:p>5.83E-05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4912918" calcext:value-type="float">
            <text:p>4.91E-05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5015292" calcext:value-type="float">
            <text:p>5.02E-05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34805" calcext:value-type="float">
            <text:p>3.48E-05</text:p>
          </table:table-cell>
          <table:table-cell table:number-columns-repeated="2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style-name="ce1" office:value-type="float" office:value="0.00050176125" calcext:value-type="float">
            <text:p>5.02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25496624" calcext:value-type="float">
            <text:p>2.55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20331291" calcext:value-type="float">
            <text:p>2.03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24029208" calcext:value-type="float">
            <text:p>2.40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14057584" calcext:value-type="float">
            <text:p>1.41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14070625" calcext:value-type="float">
            <text:p>1.41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11450875" calcext:value-type="float">
            <text:p>1.15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11409916" calcext:value-type="float">
            <text:p>1.14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09263124" calcext:value-type="float">
            <text:p>9.26E-05</text:p>
          </table:table-cell>
          <table:table-cell table:number-columns-repeated="2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128022041" calcext:value-type="float">
            <text:p>0.00128022041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68559957" calcext:value-type="float">
            <text:p>6.86E-04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51503" calcext:value-type="float">
            <text:p>5.15E-04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40954166" calcext:value-type="float">
            <text:p>4.10E-04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34220249" calcext:value-type="float">
            <text:p>3.42E-04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34774584" calcext:value-type="float">
            <text:p>3.48E-04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28646999" calcext:value-type="float">
            <text:p>2.86E-04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28591125" calcext:value-type="float">
            <text:p>2.86E-04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23428041" calcext:value-type="float">
            <text:p>2.34E-04</text:p>
          </table:table-cell>
          <table:table-cell table:number-columns-repeated="2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284053875" calcext:value-type="float">
            <text:p>0.00284053875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45881876" calcext:value-type="float">
            <text:p>0.0014588187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08382375" calcext:value-type="float">
            <text:p>0.00108382375</text:p>
          </table:table-cell>
          <table:table-cell office:value-type="float" office:value="32768" calcext:value-type="float">
            <text:p>32768</text:p>
          </table:table-cell>
          <table:table-cell table:style-name="ce1" office:value-type="float" office:value="0.00086923791" calcext:value-type="float">
            <text:p>8.69E-04</text:p>
          </table:table-cell>
          <table:table-cell office:value-type="float" office:value="32768" calcext:value-type="float">
            <text:p>32768</text:p>
          </table:table-cell>
          <table:table-cell table:style-name="ce1" office:value-type="float" office:value="0.00082606376" calcext:value-type="float">
            <text:p>8.26E-04</text:p>
          </table:table-cell>
          <table:table-cell office:value-type="float" office:value="32768" calcext:value-type="float">
            <text:p>32768</text:p>
          </table:table-cell>
          <table:table-cell table:style-name="ce1" office:value-type="float" office:value="0.00074138916" calcext:value-type="float">
            <text:p>7.41E-04</text:p>
          </table:table-cell>
          <table:table-cell office:value-type="float" office:value="32768" calcext:value-type="float">
            <text:p>32768</text:p>
          </table:table-cell>
          <table:table-cell table:style-name="ce1" office:value-type="float" office:value="0.00074914917" calcext:value-type="float">
            <text:p>7.49E-04</text:p>
          </table:table-cell>
          <table:table-cell office:value-type="float" office:value="32768" calcext:value-type="float">
            <text:p>32768</text:p>
          </table:table-cell>
          <table:table-cell table:style-name="ce1" office:value-type="float" office:value="0.00064028416" calcext:value-type="float">
            <text:p>6.40E-04</text:p>
          </table:table-cell>
          <table:table-cell office:value-type="float" office:value="32768" calcext:value-type="float">
            <text:p>32768</text:p>
          </table:table-cell>
          <table:table-cell table:style-name="ce1" office:value-type="float" office:value="0.00053501501" calcext:value-type="float">
            <text:p>5.35E-04</text:p>
          </table:table-cell>
          <table:table-cell table:number-columns-repeated="2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629654874" calcext:value-type="float">
            <text:p>0.00629654874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334974041" calcext:value-type="float">
            <text:p>0.00334974041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248884167" calcext:value-type="float">
            <text:p>0.00248884167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98434542" calcext:value-type="float">
            <text:p>0.00198434542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81628875" calcext:value-type="float">
            <text:p>0.00181628875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79981292" calcext:value-type="float">
            <text:p>0.00179981292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50826001" calcext:value-type="float">
            <text:p>0.00150826001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48581082" calcext:value-type="float">
            <text:p>0.00148581082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28182459" calcext:value-type="float">
            <text:p>0.00128182459</text:p>
          </table:table-cell>
          <table:table-cell table:number-columns-repeated="2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354941084" calcext:value-type="float">
            <text:p>0.01354941084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750022041" calcext:value-type="float">
            <text:p>0.00750022041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552945918" calcext:value-type="float">
            <text:p>0.00552945918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443779042" calcext:value-type="float">
            <text:p>0.00443779042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386940541" calcext:value-type="float">
            <text:p>0.00386940541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380326917" calcext:value-type="float">
            <text:p>0.00380326917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335200833" calcext:value-type="float">
            <text:p>0.003352008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353692917" calcext:value-type="float">
            <text:p>0.00353692917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292151457" calcext:value-type="float">
            <text:p>0.00292151457</text:p>
          </table:table-cell>
          <table:table-cell table:number-columns-repeated="2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5600144876" calcext:value-type="float">
            <text:p>0.05600144876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4159459376" calcext:value-type="float">
            <text:p>0.04159459376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3369652334" calcext:value-type="float">
            <text:p>0.03369652334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328542175" calcext:value-type="float">
            <text:p>0.0328542175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3616262209" calcext:value-type="float">
            <text:p>0.03616262209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3408462333" calcext:value-type="float">
            <text:p>0.03408462333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4268399541" calcext:value-type="float">
            <text:p>0.04268399541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34956025" calcext:value-type="float">
            <text:p>0.034956025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4566292583" calcext:value-type="float">
            <text:p>0.04566292583</text:p>
          </table:table-cell>
          <table:table-cell table:number-columns-repeated="2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12648846916" calcext:value-type="float">
            <text:p>0.12648846916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9422217416" calcext:value-type="float">
            <text:p>0.09422217416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8690225666" calcext:value-type="float">
            <text:p>0.08690225666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8135120791" calcext:value-type="float">
            <text:p>0.08135120791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8856336666" calcext:value-type="float">
            <text:p>0.08856336666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8282043042" calcext:value-type="float">
            <text:p>0.08282043042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11186093709" calcext:value-type="float">
            <text:p>0.11186093709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9996953708" calcext:value-type="float">
            <text:p>0.09996953708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1277244525" calcext:value-type="float">
            <text:p>0.1277244525</text:p>
          </table:table-cell>
          <table:table-cell table:number-columns-repeated="2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32682781917" calcext:value-type="float">
            <text:p>0.32682781917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277680515" calcext:value-type="float">
            <text:p>0.27768051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25174480416" calcext:value-type="float">
            <text:p>0.251744804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24658843584" calcext:value-type="float">
            <text:p>0.2465884358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25109631291" calcext:value-type="float">
            <text:p>0.2510963129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23967468791" calcext:value-type="float">
            <text:p>0.2396746879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24080100084" calcext:value-type="float">
            <text:p>0.2408010008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24306473875" calcext:value-type="float">
            <text:p>0.2430647387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26842623291" calcext:value-type="float">
            <text:p>0.26842623291</text:p>
          </table:table-cell>
          <table:table-cell table:number-columns-repeated="2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Pivot selection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ddle</text:p>
          </table:table-cell>
          <table:table-cell/>
          <table:table-cell office:value-type="string" calcext:value-type="string">
            <text:p>Median(first,middle,last)</text:p>
          </table:table-cell>
          <table:table-cell/>
          <table:table-cell office:value-type="string" calcext:value-type="string">
            <text:p>random</text:p>
          </table:table-cell>
          <table:table-cell/>
          <table:table-cell office:value-type="string" calcext:value-type="string">
            <text:p>Worst Ca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table:number-columns-repeated="14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office:value-type="float" office:value="0.00006499874" calcext:value-type="float">
            <text:p>6.50E-05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06898209" calcext:value-type="float">
            <text:p>6.90E-05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10644541" calcext:value-type="float">
            <text:p>1.06E-04</text:p>
          </table:table-cell>
          <table:table-cell table:number-columns-repeated="14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1" office:value-type="float" office:value="0.00007485334" calcext:value-type="float">
            <text:p>7.49E-05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8549416" calcext:value-type="float">
            <text:p>8.55E-05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7739875" calcext:value-type="float">
            <text:p>7.74E-05</text:p>
          </table:table-cell>
          <table:table-cell table:number-columns-repeated="14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style-name="ce1" office:value-type="float" office:value="0.00003347541" calcext:value-type="float">
            <text:p>3.35E-05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3357834" calcext:value-type="float">
            <text:p>3.36E-05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4706792" calcext:value-type="float">
            <text:p>4.71E-05</text:p>
          </table:table-cell>
          <table:table-cell table:number-columns-repeated="14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style-name="ce1" office:value-type="float" office:value="0.00007133999" calcext:value-type="float">
            <text:p>7.13E-05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0735025" calcext:value-type="float">
            <text:p>7.35E-05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09261" calcext:value-type="float">
            <text:p>9.26E-05</text:p>
          </table:table-cell>
          <table:table-cell table:number-columns-repeated="14"/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style-name="ce1" office:value-type="float" office:value="0.00014981709" calcext:value-type="float">
            <text:p>1.50E-04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15789875" calcext:value-type="float">
            <text:p>1.58E-04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19979041" calcext:value-type="float">
            <text:p>2.00E-04</text:p>
          </table:table-cell>
          <table:table-cell table:number-columns-repeated="14"/>
        </table:table-row>
        <table:table-row table:style-name="ro1">
          <table:table-cell office:value-type="float" office:value="32768" calcext:value-type="float">
            <text:p>32768</text:p>
          </table:table-cell>
          <table:table-cell table:style-name="ce1" office:value-type="float" office:value="0.00033323416" calcext:value-type="float">
            <text:p>3.33E-04</text:p>
          </table:table-cell>
          <table:table-cell office:value-type="float" office:value="32768" calcext:value-type="float">
            <text:p>32768</text:p>
          </table:table-cell>
          <table:table-cell table:style-name="ce1" office:value-type="float" office:value="0.00033022375" calcext:value-type="float">
            <text:p>3.30E-04</text:p>
          </table:table-cell>
          <table:table-cell office:value-type="float" office:value="32768" calcext:value-type="float">
            <text:p>32768</text:p>
          </table:table-cell>
          <table:table-cell table:style-name="ce1" office:value-type="float" office:value="0.00043681833" calcext:value-type="float">
            <text:p>4.37E-04</text:p>
          </table:table-cell>
          <table:table-cell table:number-columns-repeated="14"/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style-name="ce1" office:value-type="float" office:value="0.00070357958" calcext:value-type="float">
            <text:p>7.04E-04</text:p>
          </table:table-cell>
          <table:table-cell office:value-type="float" office:value="65536" calcext:value-type="float">
            <text:p>65536</text:p>
          </table:table-cell>
          <table:table-cell table:style-name="ce1" office:value-type="float" office:value="0.00098161167" calcext:value-type="float">
            <text:p>9.82E-04</text:p>
          </table:table-cell>
          <table:table-cell office:value-type="float" office:value="65536" calcext:value-type="float">
            <text:p>65536</text:p>
          </table:table-cell>
          <table:table-cell table:style-name="ce1" office:value-type="float" office:value="0.00090220417" calcext:value-type="float">
            <text:p>9.02E-04</text:p>
          </table:table-cell>
          <table:table-cell table:number-columns-repeated="14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0155823376" calcext:value-type="float">
            <text:p>0.00155823376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155670125" calcext:value-type="float">
            <text:p>0.00155670125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197501125" calcext:value-type="float">
            <text:p>0.00197501125</text:p>
          </table:table-cell>
          <table:table-cell table:number-columns-repeated="14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0405901333" calcext:value-type="float">
            <text:p>0.00405901333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406640501" calcext:value-type="float">
            <text:p>0.00406640501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505430334" calcext:value-type="float">
            <text:p>0.00505430334</text:p>
          </table:table-cell>
          <table:table-cell table:number-columns-repeated="14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0623979875" calcext:value-type="float">
            <text:p>0.00623979875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0614662418" calcext:value-type="float">
            <text:p>0.00614662418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1052452584" calcext:value-type="float">
            <text:p>0.01052452584</text:p>
          </table:table-cell>
          <table:table-cell table:number-columns-repeated="14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1399495" calcext:value-type="float">
            <text:p>0.0139949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1408572667" calcext:value-type="float">
            <text:p>0.01408572667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1897489082" calcext:value-type="float">
            <text:p>0.018974890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ddle</text:p>
          </table:table-cell>
          <table:table-cell/>
          <table:table-cell office:value-type="string" calcext:value-type="string">
            <text:p>Median(first,middle,last)</text:p>
          </table:table-cell>
          <table:table-cell/>
          <table:table-cell office:value-type="string" calcext:value-type="string">
            <text:p>random</text:p>
          </table:table-cell>
          <table:table-cell/>
          <table:table-cell office:value-type="string" calcext:value-type="string">
            <text:p>Average Ca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table:number-columns-repeated="14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office:value-type="float" office:value="0.00017582541" calcext:value-type="float">
            <text:p>1.76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16935374" calcext:value-type="float">
            <text:p>1.69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18697584" calcext:value-type="float">
            <text:p>1.87E-04</text:p>
          </table:table-cell>
          <table:table-cell table:number-columns-repeated="14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1" office:value-type="float" office:value="0.00015535084" calcext:value-type="float">
            <text:p>1.55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12381208" calcext:value-type="float">
            <text:p>1.24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18126" calcext:value-type="float">
            <text:p>1.81E-04</text:p>
          </table:table-cell>
          <table:table-cell table:number-columns-repeated="14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style-name="ce1" office:value-type="float" office:value="0.00027859624" calcext:value-type="float">
            <text:p>2.79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29306209" calcext:value-type="float">
            <text:p>2.93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35113709" calcext:value-type="float">
            <text:p>3.51E-04</text:p>
          </table:table-cell>
          <table:table-cell table:number-columns-repeated="14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style-name="ce1" office:value-type="float" office:value="0.00067423166" calcext:value-type="float">
            <text:p>6.74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64687166" calcext:value-type="float">
            <text:p>6.47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78479208" calcext:value-type="float">
            <text:p>7.85E-04</text:p>
          </table:table-cell>
          <table:table-cell table:number-columns-repeated="14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152746166" calcext:value-type="float">
            <text:p>0.00152746166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149447875" calcext:value-type="float">
            <text:p>0.00149447875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172100999" calcext:value-type="float">
            <text:p>0.00172100999</text:p>
          </table:table-cell>
          <table:table-cell table:number-columns-repeated="14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336620126" calcext:value-type="float">
            <text:p>0.0033662012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333916834" calcext:value-type="float">
            <text:p>0.0033391683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360405291" calcext:value-type="float">
            <text:p>0.00360405291</text:p>
          </table:table-cell>
          <table:table-cell table:number-columns-repeated="14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725270249" calcext:value-type="float">
            <text:p>0.00725270249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738042043" calcext:value-type="float">
            <text:p>0.00738042043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746594624" calcext:value-type="float">
            <text:p>0.00746594624</text:p>
          </table:table-cell>
          <table:table-cell table:number-columns-repeated="14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536266751" calcext:value-type="float">
            <text:p>0.01536266751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1558338792" calcext:value-type="float">
            <text:p>0.01558338792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1552773125" calcext:value-type="float">
            <text:p>0.01552773125</text:p>
          </table:table-cell>
          <table:table-cell table:number-columns-repeated="14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3509252749" calcext:value-type="float">
            <text:p>0.03509252749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3576571832" calcext:value-type="float">
            <text:p>0.035765718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3559633083" calcext:value-type="float">
            <text:p>0.03559633083</text:p>
          </table:table-cell>
          <table:table-cell table:number-columns-repeated="14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7075576124" calcext:value-type="float">
            <text:p>0.070755761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7208068875" calcext:value-type="float">
            <text:p>0.07208068875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713258775" calcext:value-type="float">
            <text:p>0.0713258775</text:p>
          </table:table-cell>
          <table:table-cell table:number-columns-repeated="14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1474882475" calcext:value-type="float">
            <text:p>0.147488247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4933841249" calcext:value-type="float">
            <text:p>0.14933841249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4898629001" calcext:value-type="float">
            <text:p>0.148986290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ddle</text:p>
          </table:table-cell>
          <table:table-cell/>
          <table:table-cell office:value-type="string" calcext:value-type="string">
            <text:p>Median(first,middle,last)</text:p>
          </table:table-cell>
          <table:table-cell/>
          <table:table-cell office:value-type="string" calcext:value-type="string">
            <text:p>random</text:p>
          </table:table-cell>
          <table:table-cell/>
          <table:table-cell office:value-type="string" calcext:value-type="string">
            <text:p>Best Ca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table:number-columns-repeated="14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office:value-type="float" office:value="0.00005129459" calcext:value-type="float">
            <text:p>5.13E-05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05271583" calcext:value-type="float">
            <text:p>5.27E-05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06230916" calcext:value-type="float">
            <text:p>6.23E-05</text:p>
          </table:table-cell>
          <table:table-cell table:number-columns-repeated="14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1" office:value-type="float" office:value="0.00006228333" calcext:value-type="float">
            <text:p>6.23E-05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5832708" calcext:value-type="float">
            <text:p>5.83E-05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3386376" calcext:value-type="float">
            <text:p>3.39E-05</text:p>
          </table:table-cell>
          <table:table-cell table:number-columns-repeated="14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style-name="ce1" office:value-type="float" office:value="0.00003562626" calcext:value-type="float">
            <text:p>3.56E-05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2380125" calcext:value-type="float">
            <text:p>2.38E-05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3367834" calcext:value-type="float">
            <text:p>3.37E-05</text:p>
          </table:table-cell>
          <table:table-cell table:number-columns-repeated="14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style-name="ce1" office:value-type="float" office:value="0.00005004125" calcext:value-type="float">
            <text:p>5.00E-05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05174041" calcext:value-type="float">
            <text:p>5.17E-05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07768083" calcext:value-type="float">
            <text:p>7.77E-05</text:p>
          </table:table-cell>
          <table:table-cell table:number-columns-repeated="14"/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style-name="ce1" office:value-type="float" office:value="0.00010559084" calcext:value-type="float">
            <text:p>1.06E-04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1042725" calcext:value-type="float">
            <text:p>1.04E-04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17820375" calcext:value-type="float">
            <text:p>1.78E-04</text:p>
          </table:table-cell>
          <table:table-cell table:number-columns-repeated="14"/>
        </table:table-row>
        <table:table-row table:style-name="ro1">
          <table:table-cell office:value-type="float" office:value="32768" calcext:value-type="float">
            <text:p>32768</text:p>
          </table:table-cell>
          <table:table-cell table:style-name="ce1" office:value-type="float" office:value="0.00023703875" calcext:value-type="float">
            <text:p>2.37E-04</text:p>
          </table:table-cell>
          <table:table-cell office:value-type="float" office:value="32768" calcext:value-type="float">
            <text:p>32768</text:p>
          </table:table-cell>
          <table:table-cell table:style-name="ce1" office:value-type="float" office:value="0.00023610709" calcext:value-type="float">
            <text:p>2.36E-04</text:p>
          </table:table-cell>
          <table:table-cell office:value-type="float" office:value="32768" calcext:value-type="float">
            <text:p>32768</text:p>
          </table:table-cell>
          <table:table-cell table:style-name="ce1" office:value-type="float" office:value="0.00040577583" calcext:value-type="float">
            <text:p>4.06E-04</text:p>
          </table:table-cell>
          <table:table-cell table:number-columns-repeated="14"/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style-name="ce1" office:value-type="float" office:value="0.00049807749" calcext:value-type="float">
            <text:p>4.98E-04</text:p>
          </table:table-cell>
          <table:table-cell office:value-type="float" office:value="65536" calcext:value-type="float">
            <text:p>65536</text:p>
          </table:table-cell>
          <table:table-cell table:style-name="ce1" office:value-type="float" office:value="0.00049394208" calcext:value-type="float">
            <text:p>4.94E-04</text:p>
          </table:table-cell>
          <table:table-cell office:value-type="float" office:value="65536" calcext:value-type="float">
            <text:p>65536</text:p>
          </table:table-cell>
          <table:table-cell table:style-name="ce1" office:value-type="float" office:value="0.00085522833" calcext:value-type="float">
            <text:p>8.55E-04</text:p>
          </table:table-cell>
          <table:table-cell table:number-columns-repeated="14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0117191374" calcext:value-type="float">
            <text:p>0.00117191374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117303084" calcext:value-type="float">
            <text:p>0.00117303084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1918955" calcext:value-type="float">
            <text:p>0.001918955</text:p>
          </table:table-cell>
          <table:table-cell table:number-columns-repeated="14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033481425" calcext:value-type="float">
            <text:p>0.0033481425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336628417" calcext:value-type="float">
            <text:p>0.00336628417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508068166" calcext:value-type="float">
            <text:p>0.00508068166</text:p>
          </table:table-cell>
          <table:table-cell table:number-columns-repeated="14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0443194541" calcext:value-type="float">
            <text:p>0.00443194541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0448736041" calcext:value-type="float">
            <text:p>0.00448736041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1047686417" calcext:value-type="float">
            <text:p>0.01047686417</text:p>
          </table:table-cell>
          <table:table-cell table:number-columns-repeated="14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1019031791" calcext:value-type="float">
            <text:p>0.0101903179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1021871" calcext:value-type="float">
            <text:p>0.0102187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2030378084" calcext:value-type="float">
            <text:p>0.02030378084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Best Merge</text:p>
          </table:table-cell>
          <table:table-cell/>
          <table:table-cell office:value-type="string" calcext:value-type="string">
            <text:p>Average Merge</text:p>
          </table:table-cell>
          <table:table-cell/>
          <table:table-cell office:value-type="string" calcext:value-type="string">
            <text:p>Worst Merge</text:p>
          </table:table-cell>
          <table:table-cell/>
          <table:table-cell office:value-type="string" calcext:value-type="string">
            <text:p>Best Quick</text:p>
          </table:table-cell>
          <table:table-cell/>
          <table:table-cell office:value-type="string" calcext:value-type="string">
            <text:p>Average Quick</text:p>
          </table:table-cell>
          <table:table-cell/>
          <table:table-cell office:value-type="string" calcext:value-type="string">
            <text:p>Worst Quic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office:value-type="float" office:value="0.00008176168" calcext:value-type="float">
            <text:p>8.18E-05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23301083" calcext:value-type="float">
            <text:p>2.33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27440416" calcext:value-type="float">
            <text:p>2.74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05166" calcext:value-type="float">
            <text:p>5.17E-05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18098958" calcext:value-type="float">
            <text:p>1.81E-0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0.00006824833" calcext:value-type="float">
            <text:p>6.82E-05</text:p>
          </table:table-cell>
          <table:table-cell table:number-columns-repeated="8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1" office:value-type="float" office:value="0.00016985333" calcext:value-type="float">
            <text:p>1.70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39110749" calcext:value-type="float">
            <text:p>3.91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29292208" calcext:value-type="float">
            <text:p>2.93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9587292" calcext:value-type="float">
            <text:p>9.59E-05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23260709" calcext:value-type="float">
            <text:p>2.33E-04</text:p>
          </table:table-cell>
          <table:table-cell office:value-type="float" office:value="2048" calcext:value-type="float">
            <text:p>2048</text:p>
          </table:table-cell>
          <table:table-cell table:style-name="ce1" office:value-type="float" office:value="0.00007701917" calcext:value-type="float">
            <text:p>7.70E-05</text:p>
          </table:table-cell>
          <table:table-cell table:number-columns-repeated="8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style-name="ce1" office:value-type="float" office:value="0.0000470025" calcext:value-type="float">
            <text:p>4.70E-05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33043541" calcext:value-type="float">
            <text:p>3.30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59758667" calcext:value-type="float">
            <text:p>5.98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2337417" calcext:value-type="float">
            <text:p>2.34E-05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34148125" calcext:value-type="float">
            <text:p>3.41E-0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0.00003522167" calcext:value-type="float">
            <text:p>3.52E-05</text:p>
          </table:table-cell>
          <table:table-cell table:number-columns-repeated="8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style-name="ce1" office:value-type="float" office:value="0.00010194917" calcext:value-type="float">
            <text:p>1.02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77570625" calcext:value-type="float">
            <text:p>7.76E-04</text:p>
          </table:table-cell>
          <table:table-cell office:value-type="float" office:value="8192" calcext:value-type="float">
            <text:p>8192</text:p>
          </table:table-cell>
          <table:table-cell office:value-type="float" office:value="0.00124379417" calcext:value-type="float">
            <text:p>0.00124379417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04989959" calcext:value-type="float">
            <text:p>4.99E-05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8145075" calcext:value-type="float">
            <text:p>8.15E-04</text:p>
          </table:table-cell>
          <table:table-cell office:value-type="float" office:value="8192" calcext:value-type="float">
            <text:p>8192</text:p>
          </table:table-cell>
          <table:table-cell table:style-name="ce1" office:value-type="float" office:value="0.00007216376" calcext:value-type="float">
            <text:p>7.22E-05</text:p>
          </table:table-cell>
          <table:table-cell table:number-columns-repeated="8"/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style-name="ce1" office:value-type="float" office:value="0.00023433333" calcext:value-type="float">
            <text:p>2.34E-04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169549583" calcext:value-type="float">
            <text:p>0.00169549583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253777833" calcext:value-type="float">
            <text:p>0.00253777833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10272416" calcext:value-type="float">
            <text:p>1.03E-04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187016209" calcext:value-type="float">
            <text:p>0.00187016209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0.00015729292" calcext:value-type="float">
            <text:p>1.57E-04</text:p>
          </table:table-cell>
          <table:table-cell table:number-columns-repeated="8"/>
        </table:table-row>
        <table:table-row table:style-name="ro1">
          <table:table-cell office:value-type="float" office:value="32768" calcext:value-type="float">
            <text:p>32768</text:p>
          </table:table-cell>
          <table:table-cell table:style-name="ce1" office:value-type="float" office:value="0.00048932084" calcext:value-type="float">
            <text:p>4.89E-0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398480874" calcext:value-type="float">
            <text:p>0.0039848087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508455584" calcext:value-type="float">
            <text:p>0.00508455584</text:p>
          </table:table-cell>
          <table:table-cell office:value-type="float" office:value="32768" calcext:value-type="float">
            <text:p>32768</text:p>
          </table:table-cell>
          <table:table-cell table:style-name="ce1" office:value-type="float" office:value="0.00023647416" calcext:value-type="float">
            <text:p>2.36E-0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409329791" calcext:value-type="float">
            <text:p>0.00409329791</text:p>
          </table:table-cell>
          <table:table-cell office:value-type="float" office:value="32768" calcext:value-type="float">
            <text:p>32768</text:p>
          </table:table-cell>
          <table:table-cell table:style-name="ce1" office:value-type="float" office:value="0.00033150084" calcext:value-type="float">
            <text:p>3.32E-04</text:p>
          </table:table-cell>
          <table:table-cell table:number-columns-repeated="8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111505583" calcext:value-type="float">
            <text:p>0.00111505583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821541001" calcext:value-type="float">
            <text:p>0.00821541001</text:p>
          </table:table-cell>
          <table:table-cell office:value-type="float" office:value="65536" calcext:value-type="float">
            <text:p>65536</text:p>
          </table:table-cell>
          <table:table-cell office:value-type="float" office:value="0.01029856834" calcext:value-type="float">
            <text:p>0.01029856834</text:p>
          </table:table-cell>
          <table:table-cell office:value-type="float" office:value="65536" calcext:value-type="float">
            <text:p>65536</text:p>
          </table:table-cell>
          <table:table-cell table:style-name="ce1" office:value-type="float" office:value="0.00049280042" calcext:value-type="float">
            <text:p>4.93E-04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882872708" calcext:value-type="float">
            <text:p>0.00882872708</text:p>
          </table:table-cell>
          <table:table-cell office:value-type="float" office:value="65536" calcext:value-type="float">
            <text:p>65536</text:p>
          </table:table-cell>
          <table:table-cell table:style-name="ce1" office:value-type="float" office:value="0.0007055575" calcext:value-type="float">
            <text:p>7.06E-04</text:p>
          </table:table-cell>
          <table:table-cell table:number-columns-repeated="8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0239498792" calcext:value-type="float">
            <text:p>0.00239498792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18081375" calcext:value-type="float">
            <text:p>0.018081375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2085726418" calcext:value-type="float">
            <text:p>0.02085726418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117203666" calcext:value-type="float">
            <text:p>0.00117203666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1786020166" calcext:value-type="float">
            <text:p>0.01786020166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156571207" calcext:value-type="float">
            <text:p>0.00156571207</text:p>
          </table:table-cell>
          <table:table-cell table:number-columns-repeated="8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4936577916" calcext:value-type="float">
            <text:p>0.04936577916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6378036333" calcext:value-type="float">
            <text:p>0.06378036333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8457608458" calcext:value-type="float">
            <text:p>0.08457608458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329077792" calcext:value-type="float">
            <text:p>0.00329077792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4088214334" calcext:value-type="float">
            <text:p>0.04088214334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409677251" calcext:value-type="float">
            <text:p>0.00409677251</text:p>
          </table:table-cell>
          <table:table-cell table:number-columns-repeated="8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12040788834" calcext:value-type="float">
            <text:p>0.12040788834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14698098542" calcext:value-type="float">
            <text:p>0.14698098542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19353176041" calcext:value-type="float">
            <text:p>0.19353176041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0468681875" calcext:value-type="float">
            <text:p>0.00468681875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8201173334" calcext:value-type="float">
            <text:p>0.08201173334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0615675417" calcext:value-type="float">
            <text:p>0.00615675417</text:p>
          </table:table-cell>
          <table:table-cell table:number-columns-repeated="8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30811317417" calcext:value-type="float">
            <text:p>0.30811317417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37578735291" calcext:value-type="float">
            <text:p>0.3757873529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44603389792" calcext:value-type="float">
            <text:p>0.4460338979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1009159833" calcext:value-type="float">
            <text:p>0.01009159833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7091041126" calcext:value-type="float">
            <text:p>0.1709104112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1400470041" calcext:value-type="float">
            <text:p>0.01400470041</text:p>
          </table:table-cell>
          <table:table-cell table:number-columns-repeated="8"/>
        </table:table-row>
        <table:table-row table:style-name="ro1">
          <table:table-cell/>
          <table:table-cell table:formula="of:=[.B119]/([.A119] * LOG([.A119]; 2))" office:value-type="float" office:value="0.0000000079845390625" calcext:value-type="float">
            <text:p>7.9845390625E-09</text:p>
          </table:table-cell>
          <table:table-cell table:number-columns-repeated="18"/>
        </table:table-row>
        <table:table-row table:style-name="ro1">
          <table:table-cell/>
          <table:table-cell table:formula="of:=[.B120]/([.A120] * LOG([.A120]; 2))" office:value-type="float" office:value="0.00000000753965420809659" calcext:value-type="float">
            <text:p>7.53965420809659E-09</text:p>
          </table:table-cell>
          <table:table-cell table:number-columns-repeated="18"/>
        </table:table-row>
        <table:table-row table:style-name="ro1">
          <table:table-cell/>
          <table:table-cell table:formula="of:=[.B121]/([.A121] * LOG([.A121]; 2))" office:value-type="float" office:value="0.000000000956268310546875" calcext:value-type="float">
            <text:p>9.56268310546875E-10</text:p>
          </table:table-cell>
          <table:table-cell table:number-columns-repeated="18"/>
        </table:table-row>
        <table:table-row table:style-name="ro1">
          <table:table-cell/>
          <table:table-cell table:formula="of:=[.B122]/([.A122] * LOG([.A122]; 2))" office:value-type="float" office:value="0.000000000957305157001202" calcext:value-type="float">
            <text:p>9.57305157001202E-10</text:p>
          </table:table-cell>
          <table:table-cell table:number-columns-repeated="18"/>
        </table:table-row>
        <table:table-row table:style-name="ro1">
          <table:table-cell/>
          <table:table-cell table:formula="of:=[.B123]/([.A123] * LOG([.A123]; 2))" office:value-type="float" office:value="0.00000000102161224365234" calcext:value-type="float">
            <text:p>1.02161224365234E-09</text:p>
          </table:table-cell>
          <table:table-cell table:number-columns-repeated="18"/>
        </table:table-row>
        <table:table-row table:style-name="ro1">
          <table:table-cell/>
          <table:table-cell table:formula="of:=[.B124]/([.A124] * LOG([.A124]; 2))" office:value-type="float" office:value="0.000000000995525797526042" calcext:value-type="float">
            <text:p>9.95525797526042E-10</text:p>
          </table:table-cell>
          <table:table-cell table:number-columns-repeated="18"/>
        </table:table-row>
        <table:table-row table:style-name="ro1">
          <table:table-cell/>
          <table:table-cell table:formula="of:=[.B125]/([.A125] * LOG([.A125]; 2))" office:value-type="float" office:value="0.00000000106340010643005" calcext:value-type="float">
            <text:p>1.06340010643005E-09</text:p>
          </table:table-cell>
          <table:table-cell table:number-columns-repeated="18"/>
        </table:table-row>
        <table:table-row table:style-name="ro1">
          <table:table-cell/>
          <table:table-cell table:formula="of:=[.B126]/([.A126] * LOG([.A126]; 2))" office:value-type="float" office:value="0.00000000107484163172105" calcext:value-type="float">
            <text:p>1.07484163172105E-09</text:p>
          </table:table-cell>
          <table:table-cell table:number-columns-repeated="18"/>
        </table:table-row>
        <table:table-row table:style-name="ro1">
          <table:table-cell/>
          <table:table-cell table:formula="of:=[.B127]/([.A127] * LOG([.A127]; 2))" office:value-type="float" office:value="0.0000000104619723765055" calcext:value-type="float">
            <text:p>1.04619723765055E-08</text:p>
          </table:table-cell>
          <table:table-cell table:number-columns-repeated="18"/>
        </table:table-row>
        <table:table-row table:style-name="ro1">
          <table:table-cell/>
          <table:table-cell table:formula="of:=[.B128]/([.A128] * LOG([.A128]; 2))" office:value-type="float" office:value="0.0000000120873590107968" calcext:value-type="float">
            <text:p>1.20873590107968E-08</text:p>
          </table:table-cell>
          <table:table-cell table:number-columns-repeated="18"/>
        </table:table-row>
        <table:table-row table:style-name="ro1">
          <table:table-cell/>
          <table:table-cell table:formula="of:=[.B129]/([.A129] * LOG([.A129]; 2))" office:value-type="float" office:value="0.0000000146919810376167" calcext:value-type="float">
            <text:p>1.46919810376167E-08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9">00/00/0000</text:date>, <text:time style:data-style-name="N2" text:time-value="10:12:56.904528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4T08:21:02.770000000</meta:creation-date>
    <dc:date>2025-11-29T12:44:15.861255000</dc:date>
    <meta:editing-duration>PT50M36S</meta:editing-duration>
    <meta:editing-cycles>5</meta:editing-cycles>
    <meta:generator>LibreOffice/25.8.2.2$MacOSX_AARCH64 LibreOffice_project/d401f2107ccab8f924a8e2df40f573aab7605b6f</meta:generator>
    <meta:document-statistic meta:table-count="1" meta:cell-count="1336"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5.535cm" svg:y="0.315cm" chart:style-name="ch2">
          <text:p>InsertionSort Threshold</text:p>
        </chart:title>
        <chart:legend chart:legend-position="end" svg:x="11.189cm" svg:y="2.276cm" style:legend-expansion="high" chart:style-name="ch3"/>
        <chart:plot-area chart:style-name="ch4" svg:x="1.324cm" svg:y="1.288cm" svg:width="9.545cm" svg:height="6.558cm">
          <chart:coordinate-region svg:x="3.056cm" svg:y="1.48cm" svg:width="7.047cm" svg:height="5.734cm"/>
          <chart:axis chart:dimension="x" chart:name="primary-x" chart:style-name="ch5">
            <chart:title svg:x="5.948cm" svg:y="8.027cm" chart:style-name="ch6">
              <text:p><text:span text:style-name="T1">n</text:span></text:p>
            </chart:title>
          </chart:axis>
          <chart:axis chart:dimension="y" chart:name="primary-y" chart:style-name="ch7">
            <chart:title svg:x="0.451cm" svg:y="5.174cm" chart:style-name="ch8">
              <text:p><text:span text:style-name="T1">Time(s)</text:span></text:p>
            </chart:title>
            <chart:grid chart:style-name="ch9" chart:class="major"/>
          </chart:axis>
          <chart:series chart:style-name="ch10" chart:values-cell-range-address="Sheet1.B26:Sheet1.B40" chart:label-cell-address="Sheet1.A24:Sheet1.A24" chart:class="chart:scatter">
            <chart:domain table:cell-range-address="Sheet1.A26:Sheet1.A40"/>
            <chart:data-point chart:repeated="15"/>
          </chart:series>
          <chart:series chart:style-name="ch11" chart:values-cell-range-address="Sheet1.D26:Sheet1.D40" chart:label-cell-address="Sheet1.C24:Sheet1.C24" chart:class="chart:scatter">
            <chart:domain table:cell-range-address="Sheet1.C26:Sheet1.C40"/>
            <chart:data-point chart:repeated="15"/>
          </chart:series>
          <chart:series chart:style-name="ch12" chart:values-cell-range-address="Sheet1.F26:Sheet1.F40" chart:label-cell-address="Sheet1.E24:Sheet1.E24" chart:class="chart:scatter">
            <chart:domain table:cell-range-address="Sheet1.E26:Sheet1.E40"/>
            <chart:data-point chart:repeated="15"/>
          </chart:series>
          <chart:series chart:style-name="ch13" chart:values-cell-range-address="Sheet1.H26:Sheet1.H40" chart:label-cell-address="Sheet1.G24:Sheet1.G24" chart:class="chart:scatter">
            <chart:domain table:cell-range-address="Sheet1.G26:Sheet1.G40"/>
            <chart:data-point chart:repeated="15"/>
          </chart:series>
          <chart:series chart:style-name="ch14" chart:values-cell-range-address="Sheet1.J26:Sheet1.J40" chart:label-cell-address="Sheet1.I24:Sheet1.I24" chart:class="chart:scatter">
            <chart:domain table:cell-range-address="Sheet1.I26:Sheet1.I40"/>
            <chart:data-point chart:repeated="15"/>
          </chart:series>
          <chart:series chart:style-name="ch15" chart:values-cell-range-address="Sheet1.L26:Sheet1.L40" chart:label-cell-address="Sheet1.K24:Sheet1.K24" chart:class="chart:scatter">
            <chart:domain table:cell-range-address="Sheet1.C26:Sheet1.C40"/>
            <chart:data-point chart:repeated="15"/>
          </chart:series>
          <chart:series chart:style-name="ch16" chart:values-cell-range-address="Sheet1.N26:Sheet1.N40" chart:label-cell-address="Sheet1.M24:Sheet1.M24" chart:class="chart:scatter">
            <chart:domain table:cell-range-address="Sheet1.M26:Sheet1.M40"/>
            <chart:data-point chart:repeated="15"/>
          </chart:series>
          <chart:series chart:style-name="ch17" chart:values-cell-range-address="Sheet1.P26:Sheet1.P40" chart:label-cell-address="Sheet1.O24:Sheet1.O24" chart:class="chart:scatter">
            <chart:domain table:cell-range-address="Sheet1.O26:Sheet1.O40"/>
            <chart:data-point chart:repeated="15"/>
          </chart:series>
          <chart:series chart:style-name="ch18" chart:values-cell-range-address="Sheet1.R26:Sheet1.R40" chart:label-cell-address="Sheet1.Q24:Sheet1.Q24" chart:class="chart:scatter">
            <chart:domain table:cell-range-address="Sheet1.P26:Sheet1.P40"/>
            <chart:data-point chart:repeated="1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 threshold</text:p>
                <draw:g>
                  <svg:desc>Sheet1.A24:Sheet1.A2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10</text:p>
                <draw:g>
                  <svg:desc>Sheet1.C24:Sheet1.C24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100</text:p>
                <draw:g>
                  <svg:desc>Sheet1.E24:Sheet1.E2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1000</text:p>
                <draw:g>
                  <svg:desc>Sheet1.G24:Sheet1.G24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10000</text:p>
                <draw:g>
                  <svg:desc>Sheet1.I24:Sheet1.I2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100000</text:p>
                <draw:g>
                  <svg:desc>Sheet1.K24:Sheet1.K24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1000000</text:p>
                <draw:g>
                  <svg:desc>Sheet1.M24:Sheet1.M24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10^7</text:p>
                <draw:g>
                  <svg:desc>Sheet1.O24:Sheet1.O24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10^8 (all insertion sort)</text:p>
                <draw:g>
                  <svg:desc>Sheet1.Q24:Sheet1.Q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4">
                <text:p>1024</text:p>
                <draw:g>
                  <svg:desc>Sheet1.A26:Sheet1.A40</svg:desc>
                </draw:g>
              </table:table-cell>
              <table:table-cell office:value-type="float" office:value="0.00047999">
                <text:p>0.00047999</text:p>
                <draw:g>
                  <svg:desc>Sheet1.B26:Sheet1.B40</svg:desc>
                </draw:g>
              </table:table-cell>
              <table:table-cell office:value-type="float" office:value="1024">
                <text:p>1024</text:p>
                <draw:g>
                  <svg:desc>Sheet1.C26:Sheet1.C40</svg:desc>
                </draw:g>
              </table:table-cell>
              <table:table-cell office:value-type="float" office:value="0.00038783">
                <text:p>0.00038783</text:p>
                <draw:g>
                  <svg:desc>Sheet1.D26:Sheet1.D40</svg:desc>
                </draw:g>
              </table:table-cell>
              <table:table-cell office:value-type="float" office:value="1024">
                <text:p>1024</text:p>
                <draw:g>
                  <svg:desc>Sheet1.E26:Sheet1.E40</svg:desc>
                </draw:g>
              </table:table-cell>
              <table:table-cell office:value-type="float" office:value="0.00046673">
                <text:p>0.00046673</text:p>
                <draw:g>
                  <svg:desc>Sheet1.F26:Sheet1.F40</svg:desc>
                </draw:g>
              </table:table-cell>
              <table:table-cell office:value-type="float" office:value="1024">
                <text:p>1024</text:p>
                <draw:g>
                  <svg:desc>Sheet1.G26:Sheet1.G40</svg:desc>
                </draw:g>
              </table:table-cell>
              <table:table-cell office:value-type="float" office:value="0.00021661">
                <text:p>0.00021661</text:p>
                <draw:g>
                  <svg:desc>Sheet1.H26:Sheet1.H40</svg:desc>
                </draw:g>
              </table:table-cell>
              <table:table-cell office:value-type="float" office:value="1024">
                <text:p>1024</text:p>
                <draw:g>
                  <svg:desc>Sheet1.I26:Sheet1.I40</svg:desc>
                </draw:g>
              </table:table-cell>
              <table:table-cell office:value-type="float" office:value="0.00003342">
                <text:p>0.00003342</text:p>
                <draw:g>
                  <svg:desc>Sheet1.J26:Sheet1.J40</svg:desc>
                </draw:g>
              </table:table-cell>
              <table:table-cell office:value-type="float" office:value="1024">
                <text:p>1024</text:p>
                <draw:g>
                  <svg:desc>Sheet1.C26:Sheet1.C40</svg:desc>
                </draw:g>
              </table:table-cell>
              <table:table-cell office:value-type="float" office:value="0.00003327">
                <text:p>0.00003327</text:p>
                <draw:g>
                  <svg:desc>Sheet1.L26:Sheet1.L40</svg:desc>
                </draw:g>
              </table:table-cell>
              <table:table-cell office:value-type="float" office:value="1024">
                <text:p>1024</text:p>
                <draw:g>
                  <svg:desc>Sheet1.M26:Sheet1.M40</svg:desc>
                </draw:g>
              </table:table-cell>
              <table:table-cell office:value-type="float" office:value="0.00003337">
                <text:p>0.00003337</text:p>
                <draw:g>
                  <svg:desc>Sheet1.N26:Sheet1.N40</svg:desc>
                </draw:g>
              </table:table-cell>
              <table:table-cell office:value-type="float" office:value="1024">
                <text:p>1024</text:p>
                <draw:g>
                  <svg:desc>Sheet1.O26:Sheet1.O40</svg:desc>
                </draw:g>
              </table:table-cell>
              <table:table-cell office:value-type="float" office:value="0.00003229">
                <text:p>0.00003229</text:p>
                <draw:g>
                  <svg:desc>Sheet1.P26:Sheet1.P40</svg:desc>
                </draw:g>
              </table:table-cell>
              <table:table-cell office:value-type="float" office:value="0.00003229">
                <text:p>0.00003229</text:p>
                <draw:g>
                  <svg:desc>Sheet1.P26:Sheet1.P40</svg:desc>
                </draw:g>
              </table:table-cell>
              <table:table-cell office:value-type="float" office:value="0.00003247">
                <text:p>0.00003247</text:p>
                <draw:g>
                  <svg:desc>Sheet1.R26:Sheet1.R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8">
                <text:p>2048</text:p>
              </table:table-cell>
              <table:table-cell office:value-type="float" office:value="0.00057773">
                <text:p>0.00057773</text:p>
              </table:table-cell>
              <table:table-cell office:value-type="float" office:value="2048">
                <text:p>2048</text:p>
              </table:table-cell>
              <table:table-cell office:value-type="float" office:value="0.00008096">
                <text:p>0.00008096</text:p>
              </table:table-cell>
              <table:table-cell office:value-type="float" office:value="2048">
                <text:p>2048</text:p>
              </table:table-cell>
              <table:table-cell office:value-type="float" office:value="0.00023779">
                <text:p>0.00023779</text:p>
              </table:table-cell>
              <table:table-cell office:value-type="float" office:value="2048">
                <text:p>2048</text:p>
              </table:table-cell>
              <table:table-cell office:value-type="float" office:value="0.00042241">
                <text:p>0.00042241</text:p>
              </table:table-cell>
              <table:table-cell office:value-type="float" office:value="2048">
                <text:p>2048</text:p>
              </table:table-cell>
              <table:table-cell office:value-type="float" office:value="0.00002918">
                <text:p>0.00002918</text:p>
              </table:table-cell>
              <table:table-cell office:value-type="float" office:value="2048">
                <text:p>2048</text:p>
              </table:table-cell>
              <table:table-cell office:value-type="float" office:value="0.00002855">
                <text:p>0.00002855</text:p>
              </table:table-cell>
              <table:table-cell office:value-type="float" office:value="2048">
                <text:p>2048</text:p>
              </table:table-cell>
              <table:table-cell office:value-type="float" office:value="0.00002821">
                <text:p>0.00002821</text:p>
              </table:table-cell>
              <table:table-cell office:value-type="float" office:value="2048">
                <text:p>2048</text:p>
              </table:table-cell>
              <table:table-cell office:value-type="float" office:value="0.00002832">
                <text:p>0.00002832</text:p>
              </table:table-cell>
              <table:table-cell office:value-type="float" office:value="0.00002832">
                <text:p>0.00002832</text:p>
              </table:table-cell>
              <table:table-cell office:value-type="float" office:value="0.00002831">
                <text:p>0.000028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6">
                <text:p>4096</text:p>
              </table:table-cell>
              <table:table-cell office:value-type="float" office:value="0.00023302">
                <text:p>0.00023302</text:p>
              </table:table-cell>
              <table:table-cell office:value-type="float" office:value="4096">
                <text:p>4096</text:p>
              </table:table-cell>
              <table:table-cell office:value-type="float" office:value="0.00017483">
                <text:p>0.00017483</text:p>
              </table:table-cell>
              <table:table-cell office:value-type="float" office:value="4096">
                <text:p>4096</text:p>
              </table:table-cell>
              <table:table-cell office:value-type="float" office:value="0.00063748">
                <text:p>0.00063748</text:p>
              </table:table-cell>
              <table:table-cell office:value-type="float" office:value="4096">
                <text:p>4096</text:p>
              </table:table-cell>
              <table:table-cell office:value-type="float" office:value="0.00054947">
                <text:p>0.00054947</text:p>
              </table:table-cell>
              <table:table-cell office:value-type="float" office:value="4096">
                <text:p>4096</text:p>
              </table:table-cell>
              <table:table-cell office:value-type="float" office:value="0.00005143">
                <text:p>0.00005143</text:p>
              </table:table-cell>
              <table:table-cell office:value-type="float" office:value="4096">
                <text:p>4096</text:p>
              </table:table-cell>
              <table:table-cell office:value-type="float" office:value="0.00005142">
                <text:p>0.00005142</text:p>
              </table:table-cell>
              <table:table-cell office:value-type="float" office:value="4096">
                <text:p>4096</text:p>
              </table:table-cell>
              <table:table-cell office:value-type="float" office:value="0.00005359">
                <text:p>0.00005359</text:p>
              </table:table-cell>
              <table:table-cell office:value-type="float" office:value="4096">
                <text:p>4096</text:p>
              </table:table-cell>
              <table:table-cell office:value-type="float" office:value="0.00005135">
                <text:p>0.00005135</text:p>
              </table:table-cell>
              <table:table-cell office:value-type="float" office:value="0.00005135">
                <text:p>0.00005135</text:p>
              </table:table-cell>
              <table:table-cell office:value-type="float" office:value="0.00005114">
                <text:p>0.00005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92">
                <text:p>8192</text:p>
              </table:table-cell>
              <table:table-cell office:value-type="float" office:value="0.00051203">
                <text:p>0.00051203</text:p>
              </table:table-cell>
              <table:table-cell office:value-type="float" office:value="8192">
                <text:p>8192</text:p>
              </table:table-cell>
              <table:table-cell office:value-type="float" office:value="0.00038917">
                <text:p>0.00038917</text:p>
              </table:table-cell>
              <table:table-cell office:value-type="float" office:value="8192">
                <text:p>8192</text:p>
              </table:table-cell>
              <table:table-cell office:value-type="float" office:value="0.00026805">
                <text:p>0.00026805</text:p>
              </table:table-cell>
              <table:table-cell office:value-type="float" office:value="8192">
                <text:p>8192</text:p>
              </table:table-cell>
              <table:table-cell office:value-type="float" office:value="0.0006281">
                <text:p>0.0006281</text:p>
              </table:table-cell>
              <table:table-cell office:value-type="float" office:value="8192">
                <text:p>8192</text:p>
              </table:table-cell>
              <table:table-cell office:value-type="float" office:value="0.00004474">
                <text:p>0.00004474</text:p>
              </table:table-cell>
              <table:table-cell office:value-type="float" office:value="8192">
                <text:p>8192</text:p>
              </table:table-cell>
              <table:table-cell office:value-type="float" office:value="0.00004419">
                <text:p>0.00004419</text:p>
              </table:table-cell>
              <table:table-cell office:value-type="float" office:value="8192">
                <text:p>8192</text:p>
              </table:table-cell>
              <table:table-cell office:value-type="float" office:value="0.00004622">
                <text:p>0.00004622</text:p>
              </table:table-cell>
              <table:table-cell office:value-type="float" office:value="8192">
                <text:p>8192</text:p>
              </table:table-cell>
              <table:table-cell office:value-type="float" office:value="0.00004927">
                <text:p>0.00004927</text:p>
              </table:table-cell>
              <table:table-cell office:value-type="float" office:value="0.00004927">
                <text:p>0.00004927</text:p>
              </table:table-cell>
              <table:table-cell office:value-type="float" office:value="0.00004602">
                <text:p>0.000046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84">
                <text:p>16384</text:p>
              </table:table-cell>
              <table:table-cell office:value-type="float" office:value="0.00104066">
                <text:p>0.00104066</text:p>
              </table:table-cell>
              <table:table-cell office:value-type="float" office:value="16384">
                <text:p>16384</text:p>
              </table:table-cell>
              <table:table-cell office:value-type="float" office:value="0.00081348">
                <text:p>0.00081348</text:p>
              </table:table-cell>
              <table:table-cell office:value-type="float" office:value="16384">
                <text:p>16384</text:p>
              </table:table-cell>
              <table:table-cell office:value-type="float" office:value="0.00058695">
                <text:p>0.00058695</text:p>
              </table:table-cell>
              <table:table-cell office:value-type="float" office:value="16384">
                <text:p>16384</text:p>
              </table:table-cell>
              <table:table-cell office:value-type="float" office:value="0.00037617">
                <text:p>0.00037617</text:p>
              </table:table-cell>
              <table:table-cell office:value-type="float" office:value="16384">
                <text:p>16384</text:p>
              </table:table-cell>
              <table:table-cell office:value-type="float" office:value="0.00113359">
                <text:p>0.00113359</text:p>
              </table:table-cell>
              <table:table-cell office:value-type="float" office:value="16384">
                <text:p>16384</text:p>
              </table:table-cell>
              <table:table-cell office:value-type="float" office:value="0.00007742">
                <text:p>0.00007742</text:p>
              </table:table-cell>
              <table:table-cell office:value-type="float" office:value="16384">
                <text:p>16384</text:p>
              </table:table-cell>
              <table:table-cell office:value-type="float" office:value="0.00007692">
                <text:p>0.00007692</text:p>
              </table:table-cell>
              <table:table-cell office:value-type="float" office:value="16384">
                <text:p>16384</text:p>
              </table:table-cell>
              <table:table-cell office:value-type="float" office:value="0.00007766">
                <text:p>0.00007766</text:p>
              </table:table-cell>
              <table:table-cell office:value-type="float" office:value="0.00007766">
                <text:p>0.00007766</text:p>
              </table:table-cell>
              <table:table-cell office:value-type="float" office:value="0.00007739">
                <text:p>0.000077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68">
                <text:p>32768</text:p>
              </table:table-cell>
              <table:table-cell office:value-type="float" office:value="0.00232148">
                <text:p>0.00232148</text:p>
              </table:table-cell>
              <table:table-cell office:value-type="float" office:value="32768">
                <text:p>32768</text:p>
              </table:table-cell>
              <table:table-cell office:value-type="float" office:value="0.00183381">
                <text:p>0.00183381</text:p>
              </table:table-cell>
              <table:table-cell office:value-type="float" office:value="32768">
                <text:p>32768</text:p>
              </table:table-cell>
              <table:table-cell office:value-type="float" office:value="0.00130993">
                <text:p>0.00130993</text:p>
              </table:table-cell>
              <table:table-cell office:value-type="float" office:value="32768">
                <text:p>32768</text:p>
              </table:table-cell>
              <table:table-cell office:value-type="float" office:value="0.00087736">
                <text:p>0.00087736</text:p>
              </table:table-cell>
              <table:table-cell office:value-type="float" office:value="32768">
                <text:p>32768</text:p>
              </table:table-cell>
              <table:table-cell office:value-type="float" office:value="0.0013589">
                <text:p>0.0013589</text:p>
              </table:table-cell>
              <table:table-cell office:value-type="float" office:value="32768">
                <text:p>32768</text:p>
              </table:table-cell>
              <table:table-cell office:value-type="float" office:value="0.00012852">
                <text:p>0.00012852</text:p>
              </table:table-cell>
              <table:table-cell office:value-type="float" office:value="32768">
                <text:p>32768</text:p>
              </table:table-cell>
              <table:table-cell office:value-type="float" office:value="0.00010723">
                <text:p>0.00010723</text:p>
              </table:table-cell>
              <table:table-cell office:value-type="float" office:value="32768">
                <text:p>32768</text:p>
              </table:table-cell>
              <table:table-cell office:value-type="float" office:value="0.0001065">
                <text:p>0.0001065</text:p>
              </table:table-cell>
              <table:table-cell office:value-type="float" office:value="0.0001065">
                <text:p>0.0001065</text:p>
              </table:table-cell>
              <table:table-cell office:value-type="float" office:value="0.00012143">
                <text:p>0.00012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536">
                <text:p>65536</text:p>
              </table:table-cell>
              <table:table-cell office:value-type="float" office:value="0.00487687">
                <text:p>0.00487687</text:p>
              </table:table-cell>
              <table:table-cell office:value-type="float" office:value="65536">
                <text:p>65536</text:p>
              </table:table-cell>
              <table:table-cell office:value-type="float" office:value="0.00396164">
                <text:p>0.00396164</text:p>
              </table:table-cell>
              <table:table-cell office:value-type="float" office:value="65536">
                <text:p>65536</text:p>
              </table:table-cell>
              <table:table-cell office:value-type="float" office:value="0.0029245">
                <text:p>0.0029245</text:p>
              </table:table-cell>
              <table:table-cell office:value-type="float" office:value="65536">
                <text:p>65536</text:p>
              </table:table-cell>
              <table:table-cell office:value-type="float" office:value="0.00203201">
                <text:p>0.00203201</text:p>
              </table:table-cell>
              <table:table-cell office:value-type="float" office:value="65536">
                <text:p>65536</text:p>
              </table:table-cell>
              <table:table-cell office:value-type="float" office:value="0.00314913">
                <text:p>0.00314913</text:p>
              </table:table-cell>
              <table:table-cell office:value-type="float" office:value="65536">
                <text:p>65536</text:p>
              </table:table-cell>
              <table:table-cell office:value-type="float" office:value="0.00018722">
                <text:p>0.00018722</text:p>
              </table:table-cell>
              <table:table-cell office:value-type="float" office:value="65536">
                <text:p>65536</text:p>
              </table:table-cell>
              <table:table-cell office:value-type="float" office:value="0.00017102">
                <text:p>0.00017102</text:p>
              </table:table-cell>
              <table:table-cell office:value-type="float" office:value="65536">
                <text:p>65536</text:p>
              </table:table-cell>
              <table:table-cell office:value-type="float" office:value="0.00016889">
                <text:p>0.00016889</text:p>
              </table:table-cell>
              <table:table-cell office:value-type="float" office:value="0.00016889">
                <text:p>0.00016889</text:p>
              </table:table-cell>
              <table:table-cell office:value-type="float" office:value="0.00017338">
                <text:p>0.000173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072">
                <text:p>131072</text:p>
              </table:table-cell>
              <table:table-cell office:value-type="float" office:value="0.01052219">
                <text:p>0.01052219</text:p>
              </table:table-cell>
              <table:table-cell office:value-type="float" office:value="131072">
                <text:p>131072</text:p>
              </table:table-cell>
              <table:table-cell office:value-type="float" office:value="0.00864501">
                <text:p>0.00864501</text:p>
              </table:table-cell>
              <table:table-cell office:value-type="float" office:value="131072">
                <text:p>131072</text:p>
              </table:table-cell>
              <table:table-cell office:value-type="float" office:value="0.00662065">
                <text:p>0.00662065</text:p>
              </table:table-cell>
              <table:table-cell office:value-type="float" office:value="131072">
                <text:p>131072</text:p>
              </table:table-cell>
              <table:table-cell office:value-type="float" office:value="0.00469254">
                <text:p>0.00469254</text:p>
              </table:table-cell>
              <table:table-cell office:value-type="float" office:value="131072">
                <text:p>131072</text:p>
              </table:table-cell>
              <table:table-cell office:value-type="float" office:value="0.00263776">
                <text:p>0.00263776</text:p>
              </table:table-cell>
              <table:table-cell office:value-type="float" office:value="131072">
                <text:p>131072</text:p>
              </table:table-cell>
              <table:table-cell office:value-type="float" office:value="0.00310524">
                <text:p>0.00310524</text:p>
              </table:table-cell>
              <table:table-cell office:value-type="float" office:value="131072">
                <text:p>131072</text:p>
              </table:table-cell>
              <table:table-cell office:value-type="float" office:value="0.00045136">
                <text:p>0.00045136</text:p>
              </table:table-cell>
              <table:table-cell office:value-type="float" office:value="131072">
                <text:p>131072</text:p>
              </table:table-cell>
              <table:table-cell office:value-type="float" office:value="0.00037249">
                <text:p>0.00037249</text:p>
              </table:table-cell>
              <table:table-cell office:value-type="float" office:value="0.00037249">
                <text:p>0.00037249</text:p>
              </table:table-cell>
              <table:table-cell office:value-type="float" office:value="0.00036688">
                <text:p>0.000366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2144">
                <text:p>262144</text:p>
              </table:table-cell>
              <table:table-cell office:value-type="float" office:value="0.02212609">
                <text:p>0.02212609</text:p>
              </table:table-cell>
              <table:table-cell office:value-type="float" office:value="262144">
                <text:p>262144</text:p>
              </table:table-cell>
              <table:table-cell office:value-type="float" office:value="0.01826014">
                <text:p>0.01826014</text:p>
              </table:table-cell>
              <table:table-cell office:value-type="float" office:value="262144">
                <text:p>262144</text:p>
              </table:table-cell>
              <table:table-cell office:value-type="float" office:value="0.0139531">
                <text:p>0.0139531</text:p>
              </table:table-cell>
              <table:table-cell office:value-type="float" office:value="262144">
                <text:p>262144</text:p>
              </table:table-cell>
              <table:table-cell office:value-type="float" office:value="0.01059883">
                <text:p>0.01059883</text:p>
              </table:table-cell>
              <table:table-cell office:value-type="float" office:value="262144">
                <text:p>262144</text:p>
              </table:table-cell>
              <table:table-cell office:value-type="float" office:value="0.00613327">
                <text:p>0.00613327</text:p>
              </table:table-cell>
              <table:table-cell office:value-type="float" office:value="262144">
                <text:p>262144</text:p>
              </table:table-cell>
              <table:table-cell office:value-type="float" office:value="0.00381534">
                <text:p>0.00381534</text:p>
              </table:table-cell>
              <table:table-cell office:value-type="float" office:value="262144">
                <text:p>262144</text:p>
              </table:table-cell>
              <table:table-cell office:value-type="float" office:value="0.00045156">
                <text:p>0.00045156</text:p>
              </table:table-cell>
              <table:table-cell office:value-type="float" office:value="262144">
                <text:p>262144</text:p>
              </table:table-cell>
              <table:table-cell office:value-type="float" office:value="0.00044946">
                <text:p>0.00044946</text:p>
              </table:table-cell>
              <table:table-cell office:value-type="float" office:value="0.00044946">
                <text:p>0.00044946</text:p>
              </table:table-cell>
              <table:table-cell office:value-type="float" office:value="0.00048174">
                <text:p>0.000481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4288">
                <text:p>524288</text:p>
              </table:table-cell>
              <table:table-cell office:value-type="float" office:value="0.10001624">
                <text:p>0.10001624</text:p>
              </table:table-cell>
              <table:table-cell office:value-type="float" office:value="524288">
                <text:p>524288</text:p>
              </table:table-cell>
              <table:table-cell office:value-type="float" office:value="0.08567457">
                <text:p>0.08567457</text:p>
              </table:table-cell>
              <table:table-cell office:value-type="float" office:value="524288">
                <text:p>524288</text:p>
              </table:table-cell>
              <table:table-cell office:value-type="float" office:value="0.06843435">
                <text:p>0.06843435</text:p>
              </table:table-cell>
              <table:table-cell office:value-type="float" office:value="524288">
                <text:p>524288</text:p>
              </table:table-cell>
              <table:table-cell office:value-type="float" office:value="0.05340237">
                <text:p>0.05340237</text:p>
              </table:table-cell>
              <table:table-cell office:value-type="float" office:value="524288">
                <text:p>524288</text:p>
              </table:table-cell>
              <table:table-cell office:value-type="float" office:value="0.03393615">
                <text:p>0.03393615</text:p>
              </table:table-cell>
              <table:table-cell office:value-type="float" office:value="524288">
                <text:p>524288</text:p>
              </table:table-cell>
              <table:table-cell office:value-type="float" office:value="0.01814354">
                <text:p>0.01814354</text:p>
              </table:table-cell>
              <table:table-cell office:value-type="float" office:value="524288">
                <text:p>524288</text:p>
              </table:table-cell>
              <table:table-cell office:value-type="float" office:value="0.0014842">
                <text:p>0.0014842</text:p>
              </table:table-cell>
              <table:table-cell office:value-type="float" office:value="524288">
                <text:p>524288</text:p>
              </table:table-cell>
              <table:table-cell office:value-type="float" office:value="0.00147569">
                <text:p>0.00147569</text:p>
              </table:table-cell>
              <table:table-cell office:value-type="float" office:value="0.00147569">
                <text:p>0.00147569</text:p>
              </table:table-cell>
              <table:table-cell office:value-type="float" office:value="0.00149237">
                <text:p>0.001492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48576">
                <text:p>1048576</text:p>
              </table:table-cell>
              <table:table-cell office:value-type="float" office:value="0.21242948">
                <text:p>0.21242948</text:p>
              </table:table-cell>
              <table:table-cell office:value-type="float" office:value="1048576">
                <text:p>1048576</text:p>
              </table:table-cell>
              <table:table-cell office:value-type="float" office:value="0.18405969">
                <text:p>0.18405969</text:p>
              </table:table-cell>
              <table:table-cell office:value-type="float" office:value="1048576">
                <text:p>1048576</text:p>
              </table:table-cell>
              <table:table-cell office:value-type="float" office:value="0.15116227">
                <text:p>0.15116227</text:p>
              </table:table-cell>
              <table:table-cell office:value-type="float" office:value="1048576">
                <text:p>1048576</text:p>
              </table:table-cell>
              <table:table-cell office:value-type="float" office:value="0.12002983">
                <text:p>0.12002983</text:p>
              </table:table-cell>
              <table:table-cell office:value-type="float" office:value="1048576">
                <text:p>1048576</text:p>
              </table:table-cell>
              <table:table-cell office:value-type="float" office:value="0.08188674">
                <text:p>0.08188674</text:p>
              </table:table-cell>
              <table:table-cell office:value-type="float" office:value="1048576">
                <text:p>1048576</text:p>
              </table:table-cell>
              <table:table-cell office:value-type="float" office:value="0.04984005">
                <text:p>0.04984005</text:p>
              </table:table-cell>
              <table:table-cell office:value-type="float" office:value="1048576">
                <text:p>1048576</text:p>
              </table:table-cell>
              <table:table-cell office:value-type="float" office:value="0.03943228">
                <text:p>0.03943228</text:p>
              </table:table-cell>
              <table:table-cell office:value-type="float" office:value="1048576">
                <text:p>1048576</text:p>
              </table:table-cell>
              <table:table-cell office:value-type="float" office:value="0.02112481">
                <text:p>0.02112481</text:p>
              </table:table-cell>
              <table:table-cell office:value-type="float" office:value="0.02112481">
                <text:p>0.02112481</text:p>
              </table:table-cell>
              <table:table-cell office:value-type="float" office:value="0.01567669">
                <text:p>0.015676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97152">
                <text:p>2097152</text:p>
              </table:table-cell>
              <table:table-cell office:value-type="float" office:value="0.44316271">
                <text:p>0.44316271</text:p>
              </table:table-cell>
              <table:table-cell office:value-type="float" office:value="2097152">
                <text:p>2097152</text:p>
              </table:table-cell>
              <table:table-cell office:value-type="float" office:value="0.38144665">
                <text:p>0.38144665</text:p>
              </table:table-cell>
              <table:table-cell office:value-type="float" office:value="2097152">
                <text:p>2097152</text:p>
              </table:table-cell>
              <table:table-cell office:value-type="float" office:value="0.32453972">
                <text:p>0.32453972</text:p>
              </table:table-cell>
              <table:table-cell office:value-type="float" office:value="2097152">
                <text:p>2097152</text:p>
              </table:table-cell>
              <table:table-cell office:value-type="float" office:value="0.26117468">
                <text:p>0.26117468</text:p>
              </table:table-cell>
              <table:table-cell office:value-type="float" office:value="2097152">
                <text:p>2097152</text:p>
              </table:table-cell>
              <table:table-cell office:value-type="float" office:value="0.175047">
                <text:p>0.175047</text:p>
              </table:table-cell>
              <table:table-cell office:value-type="float" office:value="2097152">
                <text:p>2097152</text:p>
              </table:table-cell>
              <table:table-cell office:value-type="float" office:value="0.11824276">
                <text:p>0.11824276</text:p>
              </table:table-cell>
              <table:table-cell office:value-type="float" office:value="2097152">
                <text:p>2097152</text:p>
              </table:table-cell>
              <table:table-cell office:value-type="float" office:value="0.05450765">
                <text:p>0.05450765</text:p>
              </table:table-cell>
              <table:table-cell office:value-type="float" office:value="2097152">
                <text:p>2097152</text:p>
              </table:table-cell>
              <table:table-cell office:value-type="float" office:value="0.01897299">
                <text:p>0.01897299</text:p>
              </table:table-cell>
              <table:table-cell office:value-type="float" office:value="0.01897299">
                <text:p>0.01897299</text:p>
              </table:table-cell>
              <table:table-cell office:value-type="float" office:value="0.00926839">
                <text:p>0.009268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94304">
                <text:p>4194304</text:p>
              </table:table-cell>
              <table:table-cell office:value-type="float" office:value="0.92825489">
                <text:p>0.92825489</text:p>
              </table:table-cell>
              <table:table-cell office:value-type="float" office:value="4194304">
                <text:p>4194304</text:p>
              </table:table-cell>
              <table:table-cell office:value-type="float" office:value="0.80587715">
                <text:p>0.80587715</text:p>
              </table:table-cell>
              <table:table-cell office:value-type="float" office:value="4194304">
                <text:p>4194304</text:p>
              </table:table-cell>
              <table:table-cell office:value-type="float" office:value="0.68790225">
                <text:p>0.68790225</text:p>
              </table:table-cell>
              <table:table-cell office:value-type="float" office:value="4194304">
                <text:p>4194304</text:p>
              </table:table-cell>
              <table:table-cell office:value-type="float" office:value="0.55281258">
                <text:p>0.55281258</text:p>
              </table:table-cell>
              <table:table-cell office:value-type="float" office:value="4194304">
                <text:p>4194304</text:p>
              </table:table-cell>
              <table:table-cell office:value-type="float" office:value="0.39244235">
                <text:p>0.39244235</text:p>
              </table:table-cell>
              <table:table-cell office:value-type="float" office:value="4194304">
                <text:p>4194304</text:p>
              </table:table-cell>
              <table:table-cell office:value-type="float" office:value="0.28653811">
                <text:p>0.28653811</text:p>
              </table:table-cell>
              <table:table-cell office:value-type="float" office:value="4194304">
                <text:p>4194304</text:p>
              </table:table-cell>
              <table:table-cell office:value-type="float" office:value="0.15395144">
                <text:p>0.15395144</text:p>
              </table:table-cell>
              <table:table-cell office:value-type="float" office:value="4194304">
                <text:p>4194304</text:p>
              </table:table-cell>
              <table:table-cell office:value-type="float" office:value="0.01927864">
                <text:p>0.01927864</text:p>
              </table:table-cell>
              <table:table-cell office:value-type="float" office:value="0.01927864">
                <text:p>0.01927864</text:p>
              </table:table-cell>
              <table:table-cell office:value-type="float" office:value="0.03607466">
                <text:p>0.036074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388608">
                <text:p>8388608</text:p>
              </table:table-cell>
              <table:table-cell office:value-type="float" office:value="1.94423625">
                <text:p>1.94423625</text:p>
              </table:table-cell>
              <table:table-cell office:value-type="float" office:value="8388608">
                <text:p>8388608</text:p>
              </table:table-cell>
              <table:table-cell office:value-type="float" office:value="1.69587297">
                <text:p>1.69587297</text:p>
              </table:table-cell>
              <table:table-cell office:value-type="float" office:value="8388608">
                <text:p>8388608</text:p>
              </table:table-cell>
              <table:table-cell office:value-type="float" office:value="1.48235481">
                <text:p>1.48235481</text:p>
              </table:table-cell>
              <table:table-cell office:value-type="float" office:value="8388608">
                <text:p>8388608</text:p>
              </table:table-cell>
              <table:table-cell office:value-type="float" office:value="1.18708863">
                <text:p>1.18708863</text:p>
              </table:table-cell>
              <table:table-cell office:value-type="float" office:value="8388608">
                <text:p>8388608</text:p>
              </table:table-cell>
              <table:table-cell office:value-type="float" office:value="0.88385134">
                <text:p>0.88385134</text:p>
              </table:table-cell>
              <table:table-cell office:value-type="float" office:value="8388608">
                <text:p>8388608</text:p>
              </table:table-cell>
              <table:table-cell office:value-type="float" office:value="0.6209824">
                <text:p>0.6209824</text:p>
              </table:table-cell>
              <table:table-cell office:value-type="float" office:value="8388608">
                <text:p>8388608</text:p>
              </table:table-cell>
              <table:table-cell office:value-type="float" office:value="0.37408696">
                <text:p>0.37408696</text:p>
              </table:table-cell>
              <table:table-cell office:value-type="float" office:value="8388608">
                <text:p>8388608</text:p>
              </table:table-cell>
              <table:table-cell office:value-type="float" office:value="0.03609886">
                <text:p>0.03609886</text:p>
              </table:table-cell>
              <table:table-cell office:value-type="float" office:value="0.03609886">
                <text:p>0.03609886</text:p>
              </table:table-cell>
              <table:table-cell office:value-type="float" office:value="0.0481072">
                <text:p>0.04810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777216">
                <text:p>16777216</text:p>
              </table:table-cell>
              <table:table-cell office:value-type="float" office:value="4.07791845">
                <text:p>4.07791845</text:p>
              </table:table-cell>
              <table:table-cell office:value-type="float" office:value="16777216">
                <text:p>16777216</text:p>
              </table:table-cell>
              <table:table-cell office:value-type="float" office:value="3.53209748">
                <text:p>3.53209748</text:p>
              </table:table-cell>
              <table:table-cell office:value-type="float" office:value="16777216">
                <text:p>16777216</text:p>
              </table:table-cell>
              <table:table-cell office:value-type="float" office:value="3.17620311">
                <text:p>3.17620311</text:p>
              </table:table-cell>
              <table:table-cell office:value-type="float" office:value="16777216">
                <text:p>16777216</text:p>
              </table:table-cell>
              <table:table-cell office:value-type="float" office:value="2.56023466">
                <text:p>2.56023466</text:p>
              </table:table-cell>
              <table:table-cell office:value-type="float" office:value="16777216">
                <text:p>16777216</text:p>
              </table:table-cell>
              <table:table-cell office:value-type="float" office:value="1.88502364">
                <text:p>1.88502364</text:p>
              </table:table-cell>
              <table:table-cell office:value-type="float" office:value="16777216">
                <text:p>16777216</text:p>
              </table:table-cell>
              <table:table-cell office:value-type="float" office:value="1.4433003">
                <text:p>1.4433003</text:p>
              </table:table-cell>
              <table:table-cell office:value-type="float" office:value="16777216">
                <text:p>16777216</text:p>
              </table:table-cell>
              <table:table-cell office:value-type="float" office:value="0.90360528">
                <text:p>0.90360528</text:p>
              </table:table-cell>
              <table:table-cell office:value-type="float" office:value="16777216">
                <text:p>16777216</text:p>
              </table:table-cell>
              <table:table-cell office:value-type="float" office:value="0.29360866">
                <text:p>0.29360866</text:p>
              </table:table-cell>
              <table:table-cell office:value-type="float" office:value="0.29360866">
                <text:p>0.29360866</text:p>
              </table:table-cell>
              <table:table-cell office:value-type="float" office:value="0.06195102">
                <text:p>0.061951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2.2$MacOSX_AARCH64 LibreOffice_project/d401f2107ccab8f924a8e2df40f573aab7605b6f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8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8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8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8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8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81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81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4.962cm" svg:y="0.315cm" chart:style-name="ch2">
          <text:p>Runtime(n) for diff thresholds</text:p>
        </chart:title>
        <chart:legend chart:legend-position="end" svg:x="12.955cm" svg:y="2.518cm" style:legend-expansion="high" chart:style-name="ch3"/>
        <chart:plot-area chart:style-name="ch4" svg:x="1.324cm" svg:y="1.288cm" svg:width="11.311cm" svg:height="6.558cm">
          <chart:coordinate-region svg:x="3.056cm" svg:y="1.48cm" svg:width="8.908cm" svg:height="5.734cm"/>
          <chart:axis chart:dimension="x" chart:name="primary-x" chart:style-name="ch5">
            <chart:title svg:x="6.831cm" svg:y="8.027cm" chart:style-name="ch2">
              <text:p><text:span text:style-name="T1">n</text:span></text:p>
            </chart:title>
          </chart:axis>
          <chart:axis chart:dimension="y" chart:name="primary-y" chart:style-name="ch6">
            <chart:title svg:x="0.451cm" svg:y="5.165cm" chart:style-name="ch7">
              <text:p><text:span text:style-name="T1">time (s)</text:span></text:p>
            </chart:title>
            <chart:grid chart:style-name="ch8" chart:class="major"/>
          </chart:axis>
          <chart:series chart:style-name="ch9" chart:values-cell-range-address="Sheet1.B63:Sheet1.B73" chart:label-cell-address="Sheet1.A61:Sheet1.A61" chart:class="chart:scatter">
            <chart:domain table:cell-range-address="Sheet1.A63:Sheet1.A73"/>
            <chart:data-point chart:repeated="11"/>
          </chart:series>
          <chart:series chart:style-name="ch10" chart:values-cell-range-address="Sheet1.D63:Sheet1.D73" chart:label-cell-address="Sheet1.C61:Sheet1.C61" chart:class="chart:scatter">
            <chart:domain table:cell-range-address="Sheet1.C63:Sheet1.C73"/>
            <chart:data-point chart:repeated="11"/>
          </chart:series>
          <chart:series chart:style-name="ch11" chart:values-cell-range-address="Sheet1.F63:Sheet1.F73" chart:label-cell-address="Sheet1.E61:Sheet1.E61" chart:class="chart:scatter">
            <chart:domain table:cell-range-address="Sheet1.E63:Sheet1.E73"/>
            <chart:data-point chart:repeated="11"/>
          </chart:series>
          <chart:series chart:style-name="ch12" chart:values-cell-range-address="Sheet1.H63:Sheet1.H73" chart:label-cell-address="Sheet1.G61:Sheet1.G61" chart:class="chart:scatter">
            <chart:domain table:cell-range-address="Sheet1.G63:Sheet1.G73"/>
            <chart:data-point chart:repeated="11"/>
          </chart:series>
          <chart:series chart:style-name="ch13" chart:values-cell-range-address="Sheet1.J63:Sheet1.J73" chart:label-cell-address="Sheet1.I61:Sheet1.I61" chart:class="chart:scatter">
            <chart:domain table:cell-range-address="Sheet1.I63:Sheet1.I73"/>
            <chart:data-point chart:repeated="11"/>
          </chart:series>
          <chart:series chart:style-name="ch14" chart:values-cell-range-address="Sheet1.L63:Sheet1.L73" chart:label-cell-address="Sheet1.K61:Sheet1.K61" chart:class="chart:scatter">
            <chart:domain table:cell-range-address="Sheet1.K63:Sheet1.K73"/>
            <chart:data-point chart:repeated="11"/>
          </chart:series>
          <chart:series chart:style-name="ch15" chart:values-cell-range-address="Sheet1.N63:Sheet1.N73" chart:label-cell-address="Sheet1.M61:Sheet1.M61" chart:class="chart:scatter">
            <chart:domain table:cell-range-address="Sheet1.M63:Sheet1.M73"/>
            <chart:data-point chart:repeated="11"/>
          </chart:series>
          <chart:series chart:style-name="ch16" chart:values-cell-range-address="Sheet1.P63:Sheet1.P73" chart:label-cell-address="Sheet1.O61:Sheet1.O61" chart:class="chart:scatter">
            <chart:domain table:cell-range-address="Sheet1.O63:Sheet1.O73"/>
            <chart:data-point chart:repeated="1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 threshold</text:p>
                <draw:g>
                  <svg:desc>Sheet1.A61:Sheet1.A6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10</text:p>
                <draw:g>
                  <svg:desc>Sheet1.C61:Sheet1.C6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50</text:p>
                <draw:g>
                  <svg:desc>Sheet1.E61:Sheet1.E6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100</text:p>
                <draw:g>
                  <svg:desc>Sheet1.G61:Sheet1.G6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200</text:p>
                <draw:g>
                  <svg:desc>Sheet1.I61:Sheet1.I61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250</text:p>
                <draw:g>
                  <svg:desc>Sheet1.K61:Sheet1.K6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375</text:p>
                <draw:g>
                  <svg:desc>Sheet1.M61:Sheet1.M61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500</text:p>
                <draw:g>
                  <svg:desc>Sheet1.O61:Sheet1.O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4">
                <text:p>1024</text:p>
                <draw:g>
                  <svg:desc>Sheet1.A63:Sheet1.A73</svg:desc>
                </draw:g>
              </table:table-cell>
              <table:table-cell office:value-type="float" office:value="0.00021031541">
                <text:p>0.00021031541</text:p>
                <draw:g>
                  <svg:desc>Sheet1.B63:Sheet1.B73</svg:desc>
                </draw:g>
              </table:table-cell>
              <table:table-cell office:value-type="float" office:value="1024">
                <text:p>1024</text:p>
                <draw:g>
                  <svg:desc>Sheet1.C63:Sheet1.C73</svg:desc>
                </draw:g>
              </table:table-cell>
              <table:table-cell office:value-type="float" office:value="0.00014672042">
                <text:p>0.00014672042</text:p>
                <draw:g>
                  <svg:desc>Sheet1.D63:Sheet1.D73</svg:desc>
                </draw:g>
              </table:table-cell>
              <table:table-cell office:value-type="float" office:value="1024">
                <text:p>1024</text:p>
                <draw:g>
                  <svg:desc>Sheet1.E63:Sheet1.E73</svg:desc>
                </draw:g>
              </table:table-cell>
              <table:table-cell office:value-type="float" office:value="0.0001126425">
                <text:p>0.0001126425</text:p>
                <draw:g>
                  <svg:desc>Sheet1.F63:Sheet1.F73</svg:desc>
                </draw:g>
              </table:table-cell>
              <table:table-cell office:value-type="float" office:value="1024">
                <text:p>1024</text:p>
                <draw:g>
                  <svg:desc>Sheet1.G63:Sheet1.G73</svg:desc>
                </draw:g>
              </table:table-cell>
              <table:table-cell office:value-type="float" office:value="0.00009619457">
                <text:p>0.00009619457</text:p>
                <draw:g>
                  <svg:desc>Sheet1.H63:Sheet1.H73</svg:desc>
                </draw:g>
              </table:table-cell>
              <table:table-cell office:value-type="float" office:value="1024">
                <text:p>1024</text:p>
                <draw:g>
                  <svg:desc>Sheet1.I63:Sheet1.I73</svg:desc>
                </draw:g>
              </table:table-cell>
              <table:table-cell office:value-type="float" office:value="0.00008104957">
                <text:p>0.00008104957</text:p>
                <draw:g>
                  <svg:desc>Sheet1.J63:Sheet1.J73</svg:desc>
                </draw:g>
              </table:table-cell>
              <table:table-cell office:value-type="float" office:value="1024">
                <text:p>1024</text:p>
                <draw:g>
                  <svg:desc>Sheet1.K63:Sheet1.K73</svg:desc>
                </draw:g>
              </table:table-cell>
              <table:table-cell office:value-type="float" office:value="0.00008817292">
                <text:p>0.00008817292</text:p>
                <draw:g>
                  <svg:desc>Sheet1.L63:Sheet1.L73</svg:desc>
                </draw:g>
              </table:table-cell>
              <table:table-cell office:value-type="float" office:value="1024">
                <text:p>1024</text:p>
                <draw:g>
                  <svg:desc>Sheet1.M63:Sheet1.M73</svg:desc>
                </draw:g>
              </table:table-cell>
              <table:table-cell office:value-type="float" office:value="0.00007499917">
                <text:p>0.00007499917</text:p>
                <draw:g>
                  <svg:desc>Sheet1.N63:Sheet1.N73</svg:desc>
                </draw:g>
              </table:table-cell>
              <table:table-cell office:value-type="float" office:value="1024">
                <text:p>1024</text:p>
                <draw:g>
                  <svg:desc>Sheet1.O63:Sheet1.O73</svg:desc>
                </draw:g>
              </table:table-cell>
              <table:table-cell office:value-type="float" office:value="0.00007427791">
                <text:p>0.00007427791</text:p>
                <draw:g>
                  <svg:desc>Sheet1.P63:Sheet1.P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8">
                <text:p>2048</text:p>
              </table:table-cell>
              <table:table-cell office:value-type="float" office:value="0.00010121791">
                <text:p>0.00010121791</text:p>
              </table:table-cell>
              <table:table-cell office:value-type="float" office:value="2048">
                <text:p>2048</text:p>
              </table:table-cell>
              <table:table-cell office:value-type="float" office:value="0.00027872084">
                <text:p>0.00027872084</text:p>
              </table:table-cell>
              <table:table-cell office:value-type="float" office:value="2048">
                <text:p>2048</text:p>
              </table:table-cell>
              <table:table-cell office:value-type="float" office:value="0.00009297791">
                <text:p>0.00009297791</text:p>
              </table:table-cell>
              <table:table-cell office:value-type="float" office:value="2048">
                <text:p>2048</text:p>
              </table:table-cell>
              <table:table-cell office:value-type="float" office:value="0.00002891083">
                <text:p>0.00002891083</text:p>
              </table:table-cell>
              <table:table-cell office:value-type="float" office:value="2048">
                <text:p>2048</text:p>
              </table:table-cell>
              <table:table-cell office:value-type="float" office:value="0.00002682625">
                <text:p>0.00002682625</text:p>
              </table:table-cell>
              <table:table-cell office:value-type="float" office:value="2048">
                <text:p>2048</text:p>
              </table:table-cell>
              <table:table-cell office:value-type="float" office:value="0.00002686207">
                <text:p>0.00002686207</text:p>
              </table:table-cell>
              <table:table-cell office:value-type="float" office:value="2048">
                <text:p>2048</text:p>
              </table:table-cell>
              <table:table-cell office:value-type="float" office:value="0.00008592876">
                <text:p>0.00008592876</text:p>
              </table:table-cell>
              <table:table-cell office:value-type="float" office:value="2048">
                <text:p>2048</text:p>
              </table:table-cell>
              <table:table-cell office:value-type="float" office:value="0.00001809084">
                <text:p>0.000018090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6">
                <text:p>4096</text:p>
              </table:table-cell>
              <table:table-cell office:value-type="float" office:value="0.00023148625">
                <text:p>0.00023148625</text:p>
              </table:table-cell>
              <table:table-cell office:value-type="float" office:value="4096">
                <text:p>4096</text:p>
              </table:table-cell>
              <table:table-cell office:value-type="float" office:value="0.00011016582">
                <text:p>0.00011016582</text:p>
              </table:table-cell>
              <table:table-cell office:value-type="float" office:value="4096">
                <text:p>4096</text:p>
              </table:table-cell>
              <table:table-cell office:value-type="float" office:value="0.00008742584">
                <text:p>0.00008742584</text:p>
              </table:table-cell>
              <table:table-cell office:value-type="float" office:value="4096">
                <text:p>4096</text:p>
              </table:table-cell>
              <table:table-cell office:value-type="float" office:value="0.00006967959">
                <text:p>0.00006967959</text:p>
              </table:table-cell>
              <table:table-cell office:value-type="float" office:value="4096">
                <text:p>4096</text:p>
              </table:table-cell>
              <table:table-cell office:value-type="float" office:value="0.00006016583">
                <text:p>0.00006016583</text:p>
              </table:table-cell>
              <table:table-cell office:value-type="float" office:value="4096">
                <text:p>4096</text:p>
              </table:table-cell>
              <table:table-cell office:value-type="float" office:value="0.00005828125">
                <text:p>0.00005828125</text:p>
              </table:table-cell>
              <table:table-cell office:value-type="float" office:value="4096">
                <text:p>4096</text:p>
              </table:table-cell>
              <table:table-cell office:value-type="float" office:value="0.00004912918">
                <text:p>0.00004912918</text:p>
              </table:table-cell>
              <table:table-cell office:value-type="float" office:value="4096">
                <text:p>4096</text:p>
              </table:table-cell>
              <table:table-cell office:value-type="float" office:value="0.00005015292">
                <text:p>0.000050152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92">
                <text:p>8192</text:p>
              </table:table-cell>
              <table:table-cell office:value-type="float" office:value="0.00050176125">
                <text:p>0.00050176125</text:p>
              </table:table-cell>
              <table:table-cell office:value-type="float" office:value="8192">
                <text:p>8192</text:p>
              </table:table-cell>
              <table:table-cell office:value-type="float" office:value="0.00025496624">
                <text:p>0.00025496624</text:p>
              </table:table-cell>
              <table:table-cell office:value-type="float" office:value="8192">
                <text:p>8192</text:p>
              </table:table-cell>
              <table:table-cell office:value-type="float" office:value="0.00020331291">
                <text:p>0.00020331291</text:p>
              </table:table-cell>
              <table:table-cell office:value-type="float" office:value="8192">
                <text:p>8192</text:p>
              </table:table-cell>
              <table:table-cell office:value-type="float" office:value="0.00024029208">
                <text:p>0.00024029208</text:p>
              </table:table-cell>
              <table:table-cell office:value-type="float" office:value="8192">
                <text:p>8192</text:p>
              </table:table-cell>
              <table:table-cell office:value-type="float" office:value="0.00014057584">
                <text:p>0.00014057584</text:p>
              </table:table-cell>
              <table:table-cell office:value-type="float" office:value="8192">
                <text:p>8192</text:p>
              </table:table-cell>
              <table:table-cell office:value-type="float" office:value="0.00014070625">
                <text:p>0.00014070625</text:p>
              </table:table-cell>
              <table:table-cell office:value-type="float" office:value="8192">
                <text:p>8192</text:p>
              </table:table-cell>
              <table:table-cell office:value-type="float" office:value="0.00011450875">
                <text:p>0.00011450875</text:p>
              </table:table-cell>
              <table:table-cell office:value-type="float" office:value="8192">
                <text:p>8192</text:p>
              </table:table-cell>
              <table:table-cell office:value-type="float" office:value="0.00011409916">
                <text:p>0.000114099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84">
                <text:p>16384</text:p>
              </table:table-cell>
              <table:table-cell office:value-type="float" office:value="0.00128022041">
                <text:p>0.00128022041</text:p>
              </table:table-cell>
              <table:table-cell office:value-type="float" office:value="16384">
                <text:p>16384</text:p>
              </table:table-cell>
              <table:table-cell office:value-type="float" office:value="0.00068559957">
                <text:p>0.00068559957</text:p>
              </table:table-cell>
              <table:table-cell office:value-type="float" office:value="16384">
                <text:p>16384</text:p>
              </table:table-cell>
              <table:table-cell office:value-type="float" office:value="0.00051503">
                <text:p>0.00051503</text:p>
              </table:table-cell>
              <table:table-cell office:value-type="float" office:value="16384">
                <text:p>16384</text:p>
              </table:table-cell>
              <table:table-cell office:value-type="float" office:value="0.00040954166">
                <text:p>0.00040954166</text:p>
              </table:table-cell>
              <table:table-cell office:value-type="float" office:value="16384">
                <text:p>16384</text:p>
              </table:table-cell>
              <table:table-cell office:value-type="float" office:value="0.00034220249">
                <text:p>0.00034220249</text:p>
              </table:table-cell>
              <table:table-cell office:value-type="float" office:value="16384">
                <text:p>16384</text:p>
              </table:table-cell>
              <table:table-cell office:value-type="float" office:value="0.00034774584">
                <text:p>0.00034774584</text:p>
              </table:table-cell>
              <table:table-cell office:value-type="float" office:value="16384">
                <text:p>16384</text:p>
              </table:table-cell>
              <table:table-cell office:value-type="float" office:value="0.00028646999">
                <text:p>0.00028646999</text:p>
              </table:table-cell>
              <table:table-cell office:value-type="float" office:value="16384">
                <text:p>16384</text:p>
              </table:table-cell>
              <table:table-cell office:value-type="float" office:value="0.00028591125">
                <text:p>0.00028591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68">
                <text:p>32768</text:p>
              </table:table-cell>
              <table:table-cell office:value-type="float" office:value="0.00284053875">
                <text:p>0.00284053875</text:p>
              </table:table-cell>
              <table:table-cell office:value-type="float" office:value="32768">
                <text:p>32768</text:p>
              </table:table-cell>
              <table:table-cell office:value-type="float" office:value="0.00145881876">
                <text:p>0.00145881876</text:p>
              </table:table-cell>
              <table:table-cell office:value-type="float" office:value="32768">
                <text:p>32768</text:p>
              </table:table-cell>
              <table:table-cell office:value-type="float" office:value="0.00108382375">
                <text:p>0.00108382375</text:p>
              </table:table-cell>
              <table:table-cell office:value-type="float" office:value="32768">
                <text:p>32768</text:p>
              </table:table-cell>
              <table:table-cell office:value-type="float" office:value="0.00086923791">
                <text:p>0.00086923791</text:p>
              </table:table-cell>
              <table:table-cell office:value-type="float" office:value="32768">
                <text:p>32768</text:p>
              </table:table-cell>
              <table:table-cell office:value-type="float" office:value="0.00082606376">
                <text:p>0.00082606376</text:p>
              </table:table-cell>
              <table:table-cell office:value-type="float" office:value="32768">
                <text:p>32768</text:p>
              </table:table-cell>
              <table:table-cell office:value-type="float" office:value="0.00074138916">
                <text:p>0.00074138916</text:p>
              </table:table-cell>
              <table:table-cell office:value-type="float" office:value="32768">
                <text:p>32768</text:p>
              </table:table-cell>
              <table:table-cell office:value-type="float" office:value="0.00074914917">
                <text:p>0.00074914917</text:p>
              </table:table-cell>
              <table:table-cell office:value-type="float" office:value="32768">
                <text:p>32768</text:p>
              </table:table-cell>
              <table:table-cell office:value-type="float" office:value="0.00064028416">
                <text:p>0.000640284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536">
                <text:p>65536</text:p>
              </table:table-cell>
              <table:table-cell office:value-type="float" office:value="0.00629654874">
                <text:p>0.00629654874</text:p>
              </table:table-cell>
              <table:table-cell office:value-type="float" office:value="65536">
                <text:p>65536</text:p>
              </table:table-cell>
              <table:table-cell office:value-type="float" office:value="0.00334974041">
                <text:p>0.00334974041</text:p>
              </table:table-cell>
              <table:table-cell office:value-type="float" office:value="65536">
                <text:p>65536</text:p>
              </table:table-cell>
              <table:table-cell office:value-type="float" office:value="0.00248884167">
                <text:p>0.00248884167</text:p>
              </table:table-cell>
              <table:table-cell office:value-type="float" office:value="65536">
                <text:p>65536</text:p>
              </table:table-cell>
              <table:table-cell office:value-type="float" office:value="0.00198434542">
                <text:p>0.00198434542</text:p>
              </table:table-cell>
              <table:table-cell office:value-type="float" office:value="65536">
                <text:p>65536</text:p>
              </table:table-cell>
              <table:table-cell office:value-type="float" office:value="0.00181628875">
                <text:p>0.00181628875</text:p>
              </table:table-cell>
              <table:table-cell office:value-type="float" office:value="65536">
                <text:p>65536</text:p>
              </table:table-cell>
              <table:table-cell office:value-type="float" office:value="0.00179981292">
                <text:p>0.00179981292</text:p>
              </table:table-cell>
              <table:table-cell office:value-type="float" office:value="65536">
                <text:p>65536</text:p>
              </table:table-cell>
              <table:table-cell office:value-type="float" office:value="0.00150826001">
                <text:p>0.00150826001</text:p>
              </table:table-cell>
              <table:table-cell office:value-type="float" office:value="65536">
                <text:p>65536</text:p>
              </table:table-cell>
              <table:table-cell office:value-type="float" office:value="0.00148581082">
                <text:p>0.001485810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072">
                <text:p>131072</text:p>
              </table:table-cell>
              <table:table-cell office:value-type="float" office:value="0.01354941084">
                <text:p>0.01354941084</text:p>
              </table:table-cell>
              <table:table-cell office:value-type="float" office:value="131072">
                <text:p>131072</text:p>
              </table:table-cell>
              <table:table-cell office:value-type="float" office:value="0.00750022041">
                <text:p>0.00750022041</text:p>
              </table:table-cell>
              <table:table-cell office:value-type="float" office:value="131072">
                <text:p>131072</text:p>
              </table:table-cell>
              <table:table-cell office:value-type="float" office:value="0.00552945918">
                <text:p>0.00552945918</text:p>
              </table:table-cell>
              <table:table-cell office:value-type="float" office:value="131072">
                <text:p>131072</text:p>
              </table:table-cell>
              <table:table-cell office:value-type="float" office:value="0.00443779042">
                <text:p>0.00443779042</text:p>
              </table:table-cell>
              <table:table-cell office:value-type="float" office:value="131072">
                <text:p>131072</text:p>
              </table:table-cell>
              <table:table-cell office:value-type="float" office:value="0.00386940541">
                <text:p>0.00386940541</text:p>
              </table:table-cell>
              <table:table-cell office:value-type="float" office:value="131072">
                <text:p>131072</text:p>
              </table:table-cell>
              <table:table-cell office:value-type="float" office:value="0.00380326917">
                <text:p>0.00380326917</text:p>
              </table:table-cell>
              <table:table-cell office:value-type="float" office:value="131072">
                <text:p>131072</text:p>
              </table:table-cell>
              <table:table-cell office:value-type="float" office:value="0.00335200833">
                <text:p>0.00335200833</text:p>
              </table:table-cell>
              <table:table-cell office:value-type="float" office:value="131072">
                <text:p>131072</text:p>
              </table:table-cell>
              <table:table-cell office:value-type="float" office:value="0.00353692917">
                <text:p>0.003536929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2144">
                <text:p>262144</text:p>
              </table:table-cell>
              <table:table-cell office:value-type="float" office:value="0.05600144876">
                <text:p>0.05600144876</text:p>
              </table:table-cell>
              <table:table-cell office:value-type="float" office:value="262144">
                <text:p>262144</text:p>
              </table:table-cell>
              <table:table-cell office:value-type="float" office:value="0.04159459376">
                <text:p>0.04159459376</text:p>
              </table:table-cell>
              <table:table-cell office:value-type="float" office:value="262144">
                <text:p>262144</text:p>
              </table:table-cell>
              <table:table-cell office:value-type="float" office:value="0.03369652334">
                <text:p>0.03369652334</text:p>
              </table:table-cell>
              <table:table-cell office:value-type="float" office:value="262144">
                <text:p>262144</text:p>
              </table:table-cell>
              <table:table-cell office:value-type="float" office:value="0.0328542175">
                <text:p>0.0328542175</text:p>
              </table:table-cell>
              <table:table-cell office:value-type="float" office:value="262144">
                <text:p>262144</text:p>
              </table:table-cell>
              <table:table-cell office:value-type="float" office:value="0.03616262209">
                <text:p>0.03616262209</text:p>
              </table:table-cell>
              <table:table-cell office:value-type="float" office:value="262144">
                <text:p>262144</text:p>
              </table:table-cell>
              <table:table-cell office:value-type="float" office:value="0.03408462333">
                <text:p>0.03408462333</text:p>
              </table:table-cell>
              <table:table-cell office:value-type="float" office:value="262144">
                <text:p>262144</text:p>
              </table:table-cell>
              <table:table-cell office:value-type="float" office:value="0.04268399541">
                <text:p>0.04268399541</text:p>
              </table:table-cell>
              <table:table-cell office:value-type="float" office:value="262144">
                <text:p>262144</text:p>
              </table:table-cell>
              <table:table-cell office:value-type="float" office:value="0.034956025">
                <text:p>0.0349560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4288">
                <text:p>524288</text:p>
              </table:table-cell>
              <table:table-cell office:value-type="float" office:value="0.12648846916">
                <text:p>0.12648846916</text:p>
              </table:table-cell>
              <table:table-cell office:value-type="float" office:value="524288">
                <text:p>524288</text:p>
              </table:table-cell>
              <table:table-cell office:value-type="float" office:value="0.09422217416">
                <text:p>0.09422217416</text:p>
              </table:table-cell>
              <table:table-cell office:value-type="float" office:value="524288">
                <text:p>524288</text:p>
              </table:table-cell>
              <table:table-cell office:value-type="float" office:value="0.08690225666">
                <text:p>0.08690225666</text:p>
              </table:table-cell>
              <table:table-cell office:value-type="float" office:value="524288">
                <text:p>524288</text:p>
              </table:table-cell>
              <table:table-cell office:value-type="float" office:value="0.08135120791">
                <text:p>0.08135120791</text:p>
              </table:table-cell>
              <table:table-cell office:value-type="float" office:value="524288">
                <text:p>524288</text:p>
              </table:table-cell>
              <table:table-cell office:value-type="float" office:value="0.08856336666">
                <text:p>0.08856336666</text:p>
              </table:table-cell>
              <table:table-cell office:value-type="float" office:value="524288">
                <text:p>524288</text:p>
              </table:table-cell>
              <table:table-cell office:value-type="float" office:value="0.08282043042">
                <text:p>0.08282043042</text:p>
              </table:table-cell>
              <table:table-cell office:value-type="float" office:value="524288">
                <text:p>524288</text:p>
              </table:table-cell>
              <table:table-cell office:value-type="float" office:value="0.11186093709">
                <text:p>0.11186093709</text:p>
              </table:table-cell>
              <table:table-cell office:value-type="float" office:value="524288">
                <text:p>524288</text:p>
              </table:table-cell>
              <table:table-cell office:value-type="float" office:value="0.09996953708">
                <text:p>0.099969537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48576">
                <text:p>1048576</text:p>
              </table:table-cell>
              <table:table-cell office:value-type="float" office:value="0.32682781917">
                <text:p>0.32682781917</text:p>
              </table:table-cell>
              <table:table-cell office:value-type="float" office:value="1048576">
                <text:p>1048576</text:p>
              </table:table-cell>
              <table:table-cell office:value-type="float" office:value="0.277680515">
                <text:p>0.277680515</text:p>
              </table:table-cell>
              <table:table-cell office:value-type="float" office:value="1048576">
                <text:p>1048576</text:p>
              </table:table-cell>
              <table:table-cell office:value-type="float" office:value="0.25174480416">
                <text:p>0.25174480416</text:p>
              </table:table-cell>
              <table:table-cell office:value-type="float" office:value="1048576">
                <text:p>1048576</text:p>
              </table:table-cell>
              <table:table-cell office:value-type="float" office:value="0.24658843584">
                <text:p>0.24658843584</text:p>
              </table:table-cell>
              <table:table-cell office:value-type="float" office:value="1048576">
                <text:p>1048576</text:p>
              </table:table-cell>
              <table:table-cell office:value-type="float" office:value="0.25109631291">
                <text:p>0.25109631291</text:p>
              </table:table-cell>
              <table:table-cell office:value-type="float" office:value="1048576">
                <text:p>1048576</text:p>
              </table:table-cell>
              <table:table-cell office:value-type="float" office:value="0.23967468791">
                <text:p>0.23967468791</text:p>
              </table:table-cell>
              <table:table-cell office:value-type="float" office:value="1048576">
                <text:p>1048576</text:p>
              </table:table-cell>
              <table:table-cell office:value-type="float" office:value="0.24080100084">
                <text:p>0.24080100084</text:p>
              </table:table-cell>
              <table:table-cell office:value-type="float" office:value="1048576">
                <text:p>1048576</text:p>
              </table:table-cell>
              <table:table-cell office:value-type="float" office:value="0.24306473875">
                <text:p>0.243064738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2.2$MacOSX_AARCH64 LibreOffice_project/d401f2107ccab8f924a8e2df40f573aab7605b6f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8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8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8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81cm" svg:height="9.001cm" xlink:href=".." xlink:type="simple" chart:class="chart:scatter" chart:style-name="ch1">
        <chart:title svg:x="5.754cm" svg:y="0.315cm" chart:style-name="ch2">
          <text:p>QuickSort w/ 3 pivots</text:p>
        </chart:title>
        <chart:legend chart:legend-position="end" svg:x="10.702cm" svg:y="3.725cm" style:legend-expansion="high" chart:style-name="ch3"/>
        <chart:plot-area chart:style-name="ch4" svg:x="1.323cm" svg:y="1.288cm" svg:width="9.06cm" svg:height="6.559cm">
          <chart:coordinate-region svg:x="3.055cm" svg:y="1.48cm" svg:width="7.193cm" svg:height="4.901cm"/>
          <chart:axis chart:dimension="x" chart:name="primary-x" chart:style-name="ch5">
            <chart:title svg:x="5.705cm" svg:y="8.028cm" chart:style-name="ch2">
              <text:p><text:span text:style-name="T1">n</text:span></text:p>
            </chart:title>
          </chart:axis>
          <chart:axis chart:dimension="y" chart:name="primary-y" chart:style-name="ch6">
            <chart:title svg:x="0.451cm" svg:y="5.12cm" chart:style-name="ch7">
              <text:p><text:span text:style-name="T1">time(s)</text:span></text:p>
            </chart:title>
            <chart:grid chart:style-name="ch8" chart:class="major"/>
          </chart:axis>
          <chart:series chart:style-name="ch9" chart:values-cell-range-address="Sheet1.B92:Sheet1.B102" chart:label-cell-address="Sheet1.A90:Sheet1.A91" chart:class="chart:scatter">
            <chart:domain table:cell-range-address="Sheet1.A92:Sheet1.A102"/>
            <chart:data-point chart:repeated="11"/>
          </chart:series>
          <chart:series chart:style-name="ch10" chart:values-cell-range-address="Sheet1.D92:Sheet1.D102" chart:label-cell-address="Sheet1.C90:Sheet1.C91" chart:class="chart:scatter">
            <chart:domain table:cell-range-address="Sheet1.C92:Sheet1.C102"/>
            <chart:data-point chart:repeated="11"/>
          </chart:series>
          <chart:series chart:style-name="ch11" chart:values-cell-range-address="Sheet1.F92:Sheet1.F102" chart:label-cell-address="Sheet1.E90:Sheet1.E91" chart:class="chart:scatter">
            <chart:domain table:cell-range-address="Sheet1.E92:Sheet1.E102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iddle n</text:p>
                <text:list>
                  <text:list-item>
                    <text:p>middle</text:p>
                  </text:list-item>
                  <text:list-item>
                    <text:p>n</text:p>
                  </text:list-item>
                </text:list>
                <draw:g>
                  <svg:desc>Sheet1.A90:Sheet1.A9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Median(first,middle,last) n</text:p>
                <text:list>
                  <text:list-item>
                    <text:p>Median(first,middle,last)</text:p>
                  </text:list-item>
                  <text:list-item>
                    <text:p>n</text:p>
                  </text:list-item>
                </text:list>
                <draw:g>
                  <svg:desc>Sheet1.C90:Sheet1.C9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random n</text:p>
                <text:list>
                  <text:list-item>
                    <text:p>random</text:p>
                  </text:list-item>
                  <text:list-item>
                    <text:p>n</text:p>
                  </text:list-item>
                </text:list>
                <draw:g>
                  <svg:desc>Sheet1.E90:Sheet1.E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4">
                <text:p>1024</text:p>
                <draw:g>
                  <svg:desc>Sheet1.A92:Sheet1.A102</svg:desc>
                </draw:g>
              </table:table-cell>
              <table:table-cell office:value-type="float" office:value="0.00017582541">
                <text:p>0.00017582541</text:p>
                <draw:g>
                  <svg:desc>Sheet1.B92:Sheet1.B102</svg:desc>
                </draw:g>
              </table:table-cell>
              <table:table-cell office:value-type="float" office:value="1024">
                <text:p>1024</text:p>
                <draw:g>
                  <svg:desc>Sheet1.C92:Sheet1.C102</svg:desc>
                </draw:g>
              </table:table-cell>
              <table:table-cell office:value-type="float" office:value="0.00016935374">
                <text:p>0.00016935374</text:p>
                <draw:g>
                  <svg:desc>Sheet1.D92:Sheet1.D102</svg:desc>
                </draw:g>
              </table:table-cell>
              <table:table-cell office:value-type="float" office:value="1024">
                <text:p>1024</text:p>
                <draw:g>
                  <svg:desc>Sheet1.E92:Sheet1.E102</svg:desc>
                </draw:g>
              </table:table-cell>
              <table:table-cell office:value-type="float" office:value="0.00018697584">
                <text:p>0.00018697584</text:p>
                <draw:g>
                  <svg:desc>Sheet1.F92:Sheet1.F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8">
                <text:p>2048</text:p>
              </table:table-cell>
              <table:table-cell office:value-type="float" office:value="0.00015535084">
                <text:p>0.00015535084</text:p>
              </table:table-cell>
              <table:table-cell office:value-type="float" office:value="2048">
                <text:p>2048</text:p>
              </table:table-cell>
              <table:table-cell office:value-type="float" office:value="0.00012381208">
                <text:p>0.00012381208</text:p>
              </table:table-cell>
              <table:table-cell office:value-type="float" office:value="2048">
                <text:p>2048</text:p>
              </table:table-cell>
              <table:table-cell office:value-type="float" office:value="0.00018126">
                <text:p>0.000181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6">
                <text:p>4096</text:p>
              </table:table-cell>
              <table:table-cell office:value-type="float" office:value="0.00027859624">
                <text:p>0.00027859624</text:p>
              </table:table-cell>
              <table:table-cell office:value-type="float" office:value="4096">
                <text:p>4096</text:p>
              </table:table-cell>
              <table:table-cell office:value-type="float" office:value="0.00029306209">
                <text:p>0.00029306209</text:p>
              </table:table-cell>
              <table:table-cell office:value-type="float" office:value="4096">
                <text:p>4096</text:p>
              </table:table-cell>
              <table:table-cell office:value-type="float" office:value="0.00035113709">
                <text:p>0.000351137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92">
                <text:p>8192</text:p>
              </table:table-cell>
              <table:table-cell office:value-type="float" office:value="0.00067423166">
                <text:p>0.00067423166</text:p>
              </table:table-cell>
              <table:table-cell office:value-type="float" office:value="8192">
                <text:p>8192</text:p>
              </table:table-cell>
              <table:table-cell office:value-type="float" office:value="0.00064687166">
                <text:p>0.00064687166</text:p>
              </table:table-cell>
              <table:table-cell office:value-type="float" office:value="8192">
                <text:p>8192</text:p>
              </table:table-cell>
              <table:table-cell office:value-type="float" office:value="0.00078479208">
                <text:p>0.000784792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84">
                <text:p>16384</text:p>
              </table:table-cell>
              <table:table-cell office:value-type="float" office:value="0.00152746166">
                <text:p>0.00152746166</text:p>
              </table:table-cell>
              <table:table-cell office:value-type="float" office:value="16384">
                <text:p>16384</text:p>
              </table:table-cell>
              <table:table-cell office:value-type="float" office:value="0.00149447875">
                <text:p>0.00149447875</text:p>
              </table:table-cell>
              <table:table-cell office:value-type="float" office:value="16384">
                <text:p>16384</text:p>
              </table:table-cell>
              <table:table-cell office:value-type="float" office:value="0.00172100999">
                <text:p>0.00172100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68">
                <text:p>32768</text:p>
              </table:table-cell>
              <table:table-cell office:value-type="float" office:value="0.00336620126">
                <text:p>0.00336620126</text:p>
              </table:table-cell>
              <table:table-cell office:value-type="float" office:value="32768">
                <text:p>32768</text:p>
              </table:table-cell>
              <table:table-cell office:value-type="float" office:value="0.00333916834">
                <text:p>0.00333916834</text:p>
              </table:table-cell>
              <table:table-cell office:value-type="float" office:value="32768">
                <text:p>32768</text:p>
              </table:table-cell>
              <table:table-cell office:value-type="float" office:value="0.00360405291">
                <text:p>0.003604052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536">
                <text:p>65536</text:p>
              </table:table-cell>
              <table:table-cell office:value-type="float" office:value="0.00725270249">
                <text:p>0.00725270249</text:p>
              </table:table-cell>
              <table:table-cell office:value-type="float" office:value="65536">
                <text:p>65536</text:p>
              </table:table-cell>
              <table:table-cell office:value-type="float" office:value="0.00738042043">
                <text:p>0.00738042043</text:p>
              </table:table-cell>
              <table:table-cell office:value-type="float" office:value="65536">
                <text:p>65536</text:p>
              </table:table-cell>
              <table:table-cell office:value-type="float" office:value="0.00746594624">
                <text:p>0.007465946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072">
                <text:p>131072</text:p>
              </table:table-cell>
              <table:table-cell office:value-type="float" office:value="0.01536266751">
                <text:p>0.01536266751</text:p>
              </table:table-cell>
              <table:table-cell office:value-type="float" office:value="131072">
                <text:p>131072</text:p>
              </table:table-cell>
              <table:table-cell office:value-type="float" office:value="0.01558338792">
                <text:p>0.01558338792</text:p>
              </table:table-cell>
              <table:table-cell office:value-type="float" office:value="131072">
                <text:p>131072</text:p>
              </table:table-cell>
              <table:table-cell office:value-type="float" office:value="0.01552773125">
                <text:p>0.01552773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2144">
                <text:p>262144</text:p>
              </table:table-cell>
              <table:table-cell office:value-type="float" office:value="0.03509252749">
                <text:p>0.03509252749</text:p>
              </table:table-cell>
              <table:table-cell office:value-type="float" office:value="262144">
                <text:p>262144</text:p>
              </table:table-cell>
              <table:table-cell office:value-type="float" office:value="0.03576571832">
                <text:p>0.03576571832</text:p>
              </table:table-cell>
              <table:table-cell office:value-type="float" office:value="262144">
                <text:p>262144</text:p>
              </table:table-cell>
              <table:table-cell office:value-type="float" office:value="0.03559633083">
                <text:p>0.035596330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4288">
                <text:p>524288</text:p>
              </table:table-cell>
              <table:table-cell office:value-type="float" office:value="0.07075576124">
                <text:p>0.07075576124</text:p>
              </table:table-cell>
              <table:table-cell office:value-type="float" office:value="524288">
                <text:p>524288</text:p>
              </table:table-cell>
              <table:table-cell office:value-type="float" office:value="0.07208068875">
                <text:p>0.07208068875</text:p>
              </table:table-cell>
              <table:table-cell office:value-type="float" office:value="524288">
                <text:p>524288</text:p>
              </table:table-cell>
              <table:table-cell office:value-type="float" office:value="0.0713258775">
                <text:p>0.07132587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48576">
                <text:p>1048576</text:p>
              </table:table-cell>
              <table:table-cell office:value-type="float" office:value="0.1474882475">
                <text:p>0.1474882475</text:p>
              </table:table-cell>
              <table:table-cell office:value-type="float" office:value="1048576">
                <text:p>1048576</text:p>
              </table:table-cell>
              <table:table-cell office:value-type="float" office:value="0.14933841249">
                <text:p>0.14933841249</text:p>
              </table:table-cell>
              <table:table-cell office:value-type="float" office:value="1048576">
                <text:p>1048576</text:p>
              </table:table-cell>
              <table:table-cell office:value-type="float" office:value="0.14898629001">
                <text:p>0.148986290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2.2$MacOSX_AARCH64 LibreOffice_project/d401f2107ccab8f924a8e2df40f573aab7605b6f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4.084cm" svg:y="0.315cm" chart:style-name="ch2">
          <text:p>Quicksort w/ 3 pivots 'Best Case' data</text:p>
        </chart:title>
        <chart:legend chart:legend-position="end" svg:x="10.721cm" svg:y="3.725cm" style:legend-expansion="high" chart:style-name="ch3"/>
        <chart:plot-area chart:style-name="ch4" svg:x="1.324cm" svg:y="1.288cm" svg:width="9.077cm" svg:height="6.558cm">
          <chart:coordinate-region svg:x="2.913cm" svg:y="1.48cm" svg:width="6.789cm" svg:height="5.734cm"/>
          <chart:axis chart:dimension="x" chart:name="primary-x" chart:style-name="ch5">
            <chart:title svg:x="5.255cm" svg:y="8.027cm" chart:style-name="ch2">
              <text:p><text:span text:style-name="T1">Time(s)</text:span></text:p>
            </chart:title>
          </chart:axis>
          <chart:axis chart:dimension="y" chart:name="primary-y" chart:style-name="ch6">
            <chart:title svg:x="0.451cm" svg:y="4.715cm" chart:style-name="ch7">
              <text:p><text:span text:style-name="T1">n</text:span></text:p>
            </chart:title>
            <chart:grid chart:style-name="ch8" chart:class="major"/>
          </chart:axis>
          <chart:series chart:style-name="ch9" chart:values-cell-range-address="Sheet1.A79:Sheet1.A89" chart:label-cell-address="Sheet1.A77:Sheet1.A78" chart:class="chart:scatter">
            <chart:domain table:cell-range-address="Sheet1.B79:Sheet1.B89"/>
            <chart:data-point chart:repeated="11"/>
          </chart:series>
          <chart:series chart:style-name="ch10" chart:values-cell-range-address="Sheet1.C79:Sheet1.C89" chart:label-cell-address="Sheet1.C77:Sheet1.C78" chart:class="chart:scatter">
            <chart:domain table:cell-range-address="Sheet1.D79:Sheet1.D89"/>
            <chart:data-point chart:repeated="11"/>
          </chart:series>
          <chart:series chart:style-name="ch11" chart:values-cell-range-address="Sheet1.E79:Sheet1.E89" chart:label-cell-address="Sheet1.E77:Sheet1.E78" chart:class="chart:scatter">
            <chart:domain table:cell-range-address="Sheet1.F79:Sheet1.F89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iddle n</text:p>
                <text:list>
                  <text:list-item>
                    <text:p>middle</text:p>
                  </text:list-item>
                  <text:list-item>
                    <text:p>n</text:p>
                  </text:list-item>
                </text:list>
                <draw:g>
                  <svg:desc>Sheet1.A77:Sheet1.A78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edian(first,middle,last) n</text:p>
                <text:list>
                  <text:list-item>
                    <text:p>Median(first,middle,last)</text:p>
                  </text:list-item>
                  <text:list-item>
                    <text:p>n</text:p>
                  </text:list-item>
                </text:list>
                <draw:g>
                  <svg:desc>Sheet1.C77:Sheet1.C78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random n</text:p>
                <text:list>
                  <text:list-item>
                    <text:p>random</text:p>
                  </text:list-item>
                  <text:list-item>
                    <text:p>n</text:p>
                  </text:list-item>
                </text:list>
                <draw:g>
                  <svg:desc>Sheet1.E77:Sheet1.E7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6499874">
                <text:p>0.00006499874</text:p>
                <draw:g>
                  <svg:desc>Sheet1.B79:Sheet1.B89</svg:desc>
                </draw:g>
              </table:table-cell>
              <table:table-cell office:value-type="float" office:value="1024">
                <text:p>1024</text:p>
                <draw:g>
                  <svg:desc>Sheet1.A79:Sheet1.A89</svg:desc>
                </draw:g>
              </table:table-cell>
              <table:table-cell office:value-type="float" office:value="0.00006898209">
                <text:p>0.00006898209</text:p>
                <draw:g>
                  <svg:desc>Sheet1.D79:Sheet1.D89</svg:desc>
                </draw:g>
              </table:table-cell>
              <table:table-cell office:value-type="float" office:value="1024">
                <text:p>1024</text:p>
                <draw:g>
                  <svg:desc>Sheet1.C79:Sheet1.C89</svg:desc>
                </draw:g>
              </table:table-cell>
              <table:table-cell office:value-type="float" office:value="0.00010644541">
                <text:p>0.00010644541</text:p>
                <draw:g>
                  <svg:desc>Sheet1.F79:Sheet1.F89</svg:desc>
                </draw:g>
              </table:table-cell>
              <table:table-cell office:value-type="float" office:value="1024">
                <text:p>1024</text:p>
                <draw:g>
                  <svg:desc>Sheet1.E79:Sheet1.E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7485334">
                <text:p>0.00007485334</text:p>
              </table:table-cell>
              <table:table-cell office:value-type="float" office:value="2048">
                <text:p>2048</text:p>
              </table:table-cell>
              <table:table-cell office:value-type="float" office:value="0.00008549416">
                <text:p>0.00008549416</text:p>
              </table:table-cell>
              <table:table-cell office:value-type="float" office:value="2048">
                <text:p>2048</text:p>
              </table:table-cell>
              <table:table-cell office:value-type="float" office:value="0.00007739875">
                <text:p>0.00007739875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3347541">
                <text:p>0.00003347541</text:p>
              </table:table-cell>
              <table:table-cell office:value-type="float" office:value="4096">
                <text:p>4096</text:p>
              </table:table-cell>
              <table:table-cell office:value-type="float" office:value="0.00003357834">
                <text:p>0.00003357834</text:p>
              </table:table-cell>
              <table:table-cell office:value-type="float" office:value="4096">
                <text:p>4096</text:p>
              </table:table-cell>
              <table:table-cell office:value-type="float" office:value="0.00004706792">
                <text:p>0.00004706792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7133999">
                <text:p>0.00007133999</text:p>
              </table:table-cell>
              <table:table-cell office:value-type="float" office:value="8192">
                <text:p>8192</text:p>
              </table:table-cell>
              <table:table-cell office:value-type="float" office:value="0.0000735025">
                <text:p>0.0000735025</text:p>
              </table:table-cell>
              <table:table-cell office:value-type="float" office:value="8192">
                <text:p>8192</text:p>
              </table:table-cell>
              <table:table-cell office:value-type="float" office:value="0.00009261">
                <text:p>0.00009261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14981709">
                <text:p>0.00014981709</text:p>
              </table:table-cell>
              <table:table-cell office:value-type="float" office:value="16384">
                <text:p>16384</text:p>
              </table:table-cell>
              <table:table-cell office:value-type="float" office:value="0.00015789875">
                <text:p>0.00015789875</text:p>
              </table:table-cell>
              <table:table-cell office:value-type="float" office:value="16384">
                <text:p>16384</text:p>
              </table:table-cell>
              <table:table-cell office:value-type="float" office:value="0.00019979041">
                <text:p>0.00019979041</text:p>
              </table:table-cell>
              <table:table-cell office:value-type="float" office:value="16384">
                <text:p>163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33323416">
                <text:p>0.00033323416</text:p>
              </table:table-cell>
              <table:table-cell office:value-type="float" office:value="32768">
                <text:p>32768</text:p>
              </table:table-cell>
              <table:table-cell office:value-type="float" office:value="0.00033022375">
                <text:p>0.00033022375</text:p>
              </table:table-cell>
              <table:table-cell office:value-type="float" office:value="32768">
                <text:p>32768</text:p>
              </table:table-cell>
              <table:table-cell office:value-type="float" office:value="0.00043681833">
                <text:p>0.00043681833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70357958">
                <text:p>0.00070357958</text:p>
              </table:table-cell>
              <table:table-cell office:value-type="float" office:value="65536">
                <text:p>65536</text:p>
              </table:table-cell>
              <table:table-cell office:value-type="float" office:value="0.00098161167">
                <text:p>0.00098161167</text:p>
              </table:table-cell>
              <table:table-cell office:value-type="float" office:value="65536">
                <text:p>65536</text:p>
              </table:table-cell>
              <table:table-cell office:value-type="float" office:value="0.00090220417">
                <text:p>0.00090220417</text:p>
              </table:table-cell>
              <table:table-cell office:value-type="float" office:value="65536">
                <text:p>655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55823376">
                <text:p>0.00155823376</text:p>
              </table:table-cell>
              <table:table-cell office:value-type="float" office:value="131072">
                <text:p>131072</text:p>
              </table:table-cell>
              <table:table-cell office:value-type="float" office:value="0.00155670125">
                <text:p>0.00155670125</text:p>
              </table:table-cell>
              <table:table-cell office:value-type="float" office:value="131072">
                <text:p>131072</text:p>
              </table:table-cell>
              <table:table-cell office:value-type="float" office:value="0.00197501125">
                <text:p>0.00197501125</text:p>
              </table:table-cell>
              <table:table-cell office:value-type="float" office:value="131072">
                <text:p>1310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405901333">
                <text:p>0.00405901333</text:p>
              </table:table-cell>
              <table:table-cell office:value-type="float" office:value="262144">
                <text:p>262144</text:p>
              </table:table-cell>
              <table:table-cell office:value-type="float" office:value="0.00406640501">
                <text:p>0.00406640501</text:p>
              </table:table-cell>
              <table:table-cell office:value-type="float" office:value="262144">
                <text:p>262144</text:p>
              </table:table-cell>
              <table:table-cell office:value-type="float" office:value="0.00505430334">
                <text:p>0.00505430334</text:p>
              </table:table-cell>
              <table:table-cell office:value-type="float" office:value="262144">
                <text:p>2621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623979875">
                <text:p>0.00623979875</text:p>
              </table:table-cell>
              <table:table-cell office:value-type="float" office:value="524288">
                <text:p>524288</text:p>
              </table:table-cell>
              <table:table-cell office:value-type="float" office:value="0.00614662418">
                <text:p>0.00614662418</text:p>
              </table:table-cell>
              <table:table-cell office:value-type="float" office:value="524288">
                <text:p>524288</text:p>
              </table:table-cell>
              <table:table-cell office:value-type="float" office:value="0.01052452584">
                <text:p>0.01052452584</text:p>
              </table:table-cell>
              <table:table-cell office:value-type="float" office:value="524288">
                <text:p>5242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399495">
                <text:p>0.01399495</text:p>
              </table:table-cell>
              <table:table-cell office:value-type="float" office:value="1048576">
                <text:p>1048576</text:p>
              </table:table-cell>
              <table:table-cell office:value-type="float" office:value="0.01408572667">
                <text:p>0.01408572667</text:p>
              </table:table-cell>
              <table:table-cell office:value-type="float" office:value="1048576">
                <text:p>1048576</text:p>
              </table:table-cell>
              <table:table-cell office:value-type="float" office:value="0.01897489082">
                <text:p>0.01897489082</text:p>
              </table:table-cell>
              <table:table-cell office:value-type="float" office:value="1048576">
                <text:p>10485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2.2$MacOSX_AARCH64 LibreOffice_project/d401f2107ccab8f924a8e2df40f573aab7605b6f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5.561cm" svg:y="0.315cm" chart:style-name="ch2">
          <text:p>Mergesort vs Quicksort</text:p>
        </chart:title>
        <chart:legend chart:legend-position="end" svg:x="12.306cm" svg:y="3.001cm" style:legend-expansion="high" chart:style-name="ch3"/>
        <chart:plot-area chart:style-name="ch4" svg:x="1.324cm" svg:y="1.288cm" svg:width="10.662cm" svg:height="6.558cm">
          <chart:coordinate-region svg:x="3.056cm" svg:y="1.48cm" svg:width="8.259cm" svg:height="5.734cm"/>
          <chart:axis chart:dimension="x" chart:name="primary-x" chart:style-name="ch5">
            <chart:title svg:x="6.507cm" svg:y="8.027cm" chart:style-name="ch2">
              <text:p><text:span text:style-name="T1">n</text:span></text:p>
            </chart:title>
          </chart:axis>
          <chart:axis chart:dimension="y" chart:name="primary-y" chart:style-name="ch6">
            <chart:title svg:x="0.451cm" svg:y="5.12cm" chart:style-name="ch7">
              <text:p><text:span text:style-name="T1">time(s)</text:span></text:p>
            </chart:title>
            <chart:grid chart:style-name="ch8" chart:class="major"/>
          </chart:axis>
          <chart:series chart:style-name="ch9" chart:values-cell-range-address="Sheet1.B119:Sheet1.B129" chart:label-cell-address="Sheet1.A117:Sheet1.A117" chart:class="chart:scatter">
            <chart:domain table:cell-range-address="Sheet1.A119:Sheet1.A129"/>
            <chart:data-point chart:repeated="11"/>
          </chart:series>
          <chart:series chart:style-name="ch10" chart:values-cell-range-address="Sheet1.D119:Sheet1.D129" chart:label-cell-address="Sheet1.C117:Sheet1.C117" chart:class="chart:scatter">
            <chart:domain table:cell-range-address="Sheet1.C119:Sheet1.C129"/>
            <chart:data-point chart:repeated="11"/>
          </chart:series>
          <chart:series chart:style-name="ch11" chart:values-cell-range-address="Sheet1.F119:Sheet1.F129" chart:label-cell-address="Sheet1.E117:Sheet1.E117" chart:class="chart:scatter">
            <chart:domain table:cell-range-address="Sheet1.E119:Sheet1.E129"/>
            <chart:data-point chart:repeated="11"/>
          </chart:series>
          <chart:series chart:style-name="ch12" chart:values-cell-range-address="Sheet1.H119:Sheet1.H129" chart:label-cell-address="Sheet1.G117:Sheet1.G117" chart:class="chart:scatter">
            <chart:domain table:cell-range-address="Sheet1.G119:Sheet1.G129"/>
            <chart:data-point chart:repeated="11"/>
          </chart:series>
          <chart:series chart:style-name="ch13" chart:values-cell-range-address="Sheet1.J119:Sheet1.J129" chart:label-cell-address="Sheet1.I117:Sheet1.I117" chart:class="chart:scatter">
            <chart:domain table:cell-range-address="Sheet1.I119:Sheet1.I129"/>
            <chart:data-point chart:repeated="11"/>
          </chart:series>
          <chart:series chart:style-name="ch14" chart:values-cell-range-address="Sheet1.L119:Sheet1.L129" chart:label-cell-address="Sheet1.K117:Sheet1.K117" chart:class="chart:scatter">
            <chart:domain table:cell-range-address="Sheet1.K119:Sheet1.K129"/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est Merge</text:p>
                <draw:g>
                  <svg:desc>Sheet1.A117:Sheet1.A11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verage Merge</text:p>
                <draw:g>
                  <svg:desc>Sheet1.C117:Sheet1.C117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Worst Merge</text:p>
                <draw:g>
                  <svg:desc>Sheet1.E117:Sheet1.E117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Best Quick</text:p>
                <draw:g>
                  <svg:desc>Sheet1.G117:Sheet1.G117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Average Quick</text:p>
                <draw:g>
                  <svg:desc>Sheet1.I117:Sheet1.I117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Worst Quick</text:p>
                <draw:g>
                  <svg:desc>Sheet1.K117:Sheet1.K1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4">
                <text:p>1024</text:p>
                <draw:g>
                  <svg:desc>Sheet1.A119:Sheet1.A129</svg:desc>
                </draw:g>
              </table:table-cell>
              <table:table-cell office:value-type="float" office:value="0.00008176168">
                <text:p>0.00008176168</text:p>
                <draw:g>
                  <svg:desc>Sheet1.B119:Sheet1.B129</svg:desc>
                </draw:g>
              </table:table-cell>
              <table:table-cell office:value-type="float" office:value="1024">
                <text:p>1024</text:p>
                <draw:g>
                  <svg:desc>Sheet1.C119:Sheet1.C129</svg:desc>
                </draw:g>
              </table:table-cell>
              <table:table-cell office:value-type="float" office:value="0.00023301083">
                <text:p>0.00023301083</text:p>
                <draw:g>
                  <svg:desc>Sheet1.D119:Sheet1.D129</svg:desc>
                </draw:g>
              </table:table-cell>
              <table:table-cell office:value-type="float" office:value="1024">
                <text:p>1024</text:p>
                <draw:g>
                  <svg:desc>Sheet1.E119:Sheet1.E129</svg:desc>
                </draw:g>
              </table:table-cell>
              <table:table-cell office:value-type="float" office:value="0.00027440416">
                <text:p>0.00027440416</text:p>
                <draw:g>
                  <svg:desc>Sheet1.F119:Sheet1.F129</svg:desc>
                </draw:g>
              </table:table-cell>
              <table:table-cell office:value-type="float" office:value="1024">
                <text:p>1024</text:p>
                <draw:g>
                  <svg:desc>Sheet1.G119:Sheet1.G129</svg:desc>
                </draw:g>
              </table:table-cell>
              <table:table-cell office:value-type="float" office:value="0.00005166">
                <text:p>0.00005166</text:p>
                <draw:g>
                  <svg:desc>Sheet1.H119:Sheet1.H129</svg:desc>
                </draw:g>
              </table:table-cell>
              <table:table-cell office:value-type="float" office:value="1024">
                <text:p>1024</text:p>
                <draw:g>
                  <svg:desc>Sheet1.I119:Sheet1.I129</svg:desc>
                </draw:g>
              </table:table-cell>
              <table:table-cell office:value-type="float" office:value="0.00018098958">
                <text:p>0.00018098958</text:p>
                <draw:g>
                  <svg:desc>Sheet1.J119:Sheet1.J129</svg:desc>
                </draw:g>
              </table:table-cell>
              <table:table-cell office:value-type="float" office:value="1024">
                <text:p>1024</text:p>
                <draw:g>
                  <svg:desc>Sheet1.K119:Sheet1.K129</svg:desc>
                </draw:g>
              </table:table-cell>
              <table:table-cell office:value-type="float" office:value="0.00006824833">
                <text:p>0.00006824833</text:p>
                <draw:g>
                  <svg:desc>Sheet1.L119:Sheet1.L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8">
                <text:p>2048</text:p>
              </table:table-cell>
              <table:table-cell office:value-type="float" office:value="0.00016985333">
                <text:p>0.00016985333</text:p>
              </table:table-cell>
              <table:table-cell office:value-type="float" office:value="2048">
                <text:p>2048</text:p>
              </table:table-cell>
              <table:table-cell office:value-type="float" office:value="0.00039110749">
                <text:p>0.00039110749</text:p>
              </table:table-cell>
              <table:table-cell office:value-type="float" office:value="2048">
                <text:p>2048</text:p>
              </table:table-cell>
              <table:table-cell office:value-type="float" office:value="0.00029292208">
                <text:p>0.00029292208</text:p>
              </table:table-cell>
              <table:table-cell office:value-type="float" office:value="2048">
                <text:p>2048</text:p>
              </table:table-cell>
              <table:table-cell office:value-type="float" office:value="0.00009587292">
                <text:p>0.00009587292</text:p>
              </table:table-cell>
              <table:table-cell office:value-type="float" office:value="2048">
                <text:p>2048</text:p>
              </table:table-cell>
              <table:table-cell office:value-type="float" office:value="0.00023260709">
                <text:p>0.00023260709</text:p>
              </table:table-cell>
              <table:table-cell office:value-type="float" office:value="2048">
                <text:p>2048</text:p>
              </table:table-cell>
              <table:table-cell office:value-type="float" office:value="0.00007701917">
                <text:p>0.000077019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6">
                <text:p>4096</text:p>
              </table:table-cell>
              <table:table-cell office:value-type="float" office:value="0.0000470025">
                <text:p>0.0000470025</text:p>
              </table:table-cell>
              <table:table-cell office:value-type="float" office:value="4096">
                <text:p>4096</text:p>
              </table:table-cell>
              <table:table-cell office:value-type="float" office:value="0.00033043541">
                <text:p>0.00033043541</text:p>
              </table:table-cell>
              <table:table-cell office:value-type="float" office:value="4096">
                <text:p>4096</text:p>
              </table:table-cell>
              <table:table-cell office:value-type="float" office:value="0.00059758667">
                <text:p>0.00059758667</text:p>
              </table:table-cell>
              <table:table-cell office:value-type="float" office:value="4096">
                <text:p>4096</text:p>
              </table:table-cell>
              <table:table-cell office:value-type="float" office:value="0.00002337417">
                <text:p>0.00002337417</text:p>
              </table:table-cell>
              <table:table-cell office:value-type="float" office:value="4096">
                <text:p>4096</text:p>
              </table:table-cell>
              <table:table-cell office:value-type="float" office:value="0.00034148125">
                <text:p>0.00034148125</text:p>
              </table:table-cell>
              <table:table-cell office:value-type="float" office:value="4096">
                <text:p>4096</text:p>
              </table:table-cell>
              <table:table-cell office:value-type="float" office:value="0.00003522167">
                <text:p>0.000035221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92">
                <text:p>8192</text:p>
              </table:table-cell>
              <table:table-cell office:value-type="float" office:value="0.00010194917">
                <text:p>0.00010194917</text:p>
              </table:table-cell>
              <table:table-cell office:value-type="float" office:value="8192">
                <text:p>8192</text:p>
              </table:table-cell>
              <table:table-cell office:value-type="float" office:value="0.00077570625">
                <text:p>0.00077570625</text:p>
              </table:table-cell>
              <table:table-cell office:value-type="float" office:value="8192">
                <text:p>8192</text:p>
              </table:table-cell>
              <table:table-cell office:value-type="float" office:value="0.00124379417">
                <text:p>0.00124379417</text:p>
              </table:table-cell>
              <table:table-cell office:value-type="float" office:value="8192">
                <text:p>8192</text:p>
              </table:table-cell>
              <table:table-cell office:value-type="float" office:value="0.00004989959">
                <text:p>0.00004989959</text:p>
              </table:table-cell>
              <table:table-cell office:value-type="float" office:value="8192">
                <text:p>8192</text:p>
              </table:table-cell>
              <table:table-cell office:value-type="float" office:value="0.0008145075">
                <text:p>0.0008145075</text:p>
              </table:table-cell>
              <table:table-cell office:value-type="float" office:value="8192">
                <text:p>8192</text:p>
              </table:table-cell>
              <table:table-cell office:value-type="float" office:value="0.00007216376">
                <text:p>0.000072163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84">
                <text:p>16384</text:p>
              </table:table-cell>
              <table:table-cell office:value-type="float" office:value="0.00023433333">
                <text:p>0.00023433333</text:p>
              </table:table-cell>
              <table:table-cell office:value-type="float" office:value="16384">
                <text:p>16384</text:p>
              </table:table-cell>
              <table:table-cell office:value-type="float" office:value="0.00169549583">
                <text:p>0.00169549583</text:p>
              </table:table-cell>
              <table:table-cell office:value-type="float" office:value="16384">
                <text:p>16384</text:p>
              </table:table-cell>
              <table:table-cell office:value-type="float" office:value="0.00253777833">
                <text:p>0.00253777833</text:p>
              </table:table-cell>
              <table:table-cell office:value-type="float" office:value="16384">
                <text:p>16384</text:p>
              </table:table-cell>
              <table:table-cell office:value-type="float" office:value="0.00010272416">
                <text:p>0.00010272416</text:p>
              </table:table-cell>
              <table:table-cell office:value-type="float" office:value="16384">
                <text:p>16384</text:p>
              </table:table-cell>
              <table:table-cell office:value-type="float" office:value="0.00187016209">
                <text:p>0.00187016209</text:p>
              </table:table-cell>
              <table:table-cell office:value-type="float" office:value="16384">
                <text:p>16384</text:p>
              </table:table-cell>
              <table:table-cell office:value-type="float" office:value="0.00015729292">
                <text:p>0.000157292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68">
                <text:p>32768</text:p>
              </table:table-cell>
              <table:table-cell office:value-type="float" office:value="0.00048932084">
                <text:p>0.00048932084</text:p>
              </table:table-cell>
              <table:table-cell office:value-type="float" office:value="32768">
                <text:p>32768</text:p>
              </table:table-cell>
              <table:table-cell office:value-type="float" office:value="0.00398480874">
                <text:p>0.00398480874</text:p>
              </table:table-cell>
              <table:table-cell office:value-type="float" office:value="32768">
                <text:p>32768</text:p>
              </table:table-cell>
              <table:table-cell office:value-type="float" office:value="0.00508455584">
                <text:p>0.00508455584</text:p>
              </table:table-cell>
              <table:table-cell office:value-type="float" office:value="32768">
                <text:p>32768</text:p>
              </table:table-cell>
              <table:table-cell office:value-type="float" office:value="0.00023647416">
                <text:p>0.00023647416</text:p>
              </table:table-cell>
              <table:table-cell office:value-type="float" office:value="32768">
                <text:p>32768</text:p>
              </table:table-cell>
              <table:table-cell office:value-type="float" office:value="0.00409329791">
                <text:p>0.00409329791</text:p>
              </table:table-cell>
              <table:table-cell office:value-type="float" office:value="32768">
                <text:p>32768</text:p>
              </table:table-cell>
              <table:table-cell office:value-type="float" office:value="0.00033150084">
                <text:p>0.000331500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536">
                <text:p>65536</text:p>
              </table:table-cell>
              <table:table-cell office:value-type="float" office:value="0.00111505583">
                <text:p>0.00111505583</text:p>
              </table:table-cell>
              <table:table-cell office:value-type="float" office:value="65536">
                <text:p>65536</text:p>
              </table:table-cell>
              <table:table-cell office:value-type="float" office:value="0.00821541001">
                <text:p>0.00821541001</text:p>
              </table:table-cell>
              <table:table-cell office:value-type="float" office:value="65536">
                <text:p>65536</text:p>
              </table:table-cell>
              <table:table-cell office:value-type="float" office:value="0.01029856834">
                <text:p>0.01029856834</text:p>
              </table:table-cell>
              <table:table-cell office:value-type="float" office:value="65536">
                <text:p>65536</text:p>
              </table:table-cell>
              <table:table-cell office:value-type="float" office:value="0.00049280042">
                <text:p>0.00049280042</text:p>
              </table:table-cell>
              <table:table-cell office:value-type="float" office:value="65536">
                <text:p>65536</text:p>
              </table:table-cell>
              <table:table-cell office:value-type="float" office:value="0.00882872708">
                <text:p>0.00882872708</text:p>
              </table:table-cell>
              <table:table-cell office:value-type="float" office:value="65536">
                <text:p>65536</text:p>
              </table:table-cell>
              <table:table-cell office:value-type="float" office:value="0.0007055575">
                <text:p>0.00070555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072">
                <text:p>131072</text:p>
              </table:table-cell>
              <table:table-cell office:value-type="float" office:value="0.00239498792">
                <text:p>0.00239498792</text:p>
              </table:table-cell>
              <table:table-cell office:value-type="float" office:value="131072">
                <text:p>131072</text:p>
              </table:table-cell>
              <table:table-cell office:value-type="float" office:value="0.018081375">
                <text:p>0.018081375</text:p>
              </table:table-cell>
              <table:table-cell office:value-type="float" office:value="131072">
                <text:p>131072</text:p>
              </table:table-cell>
              <table:table-cell office:value-type="float" office:value="0.02085726418">
                <text:p>0.02085726418</text:p>
              </table:table-cell>
              <table:table-cell office:value-type="float" office:value="131072">
                <text:p>131072</text:p>
              </table:table-cell>
              <table:table-cell office:value-type="float" office:value="0.00117203666">
                <text:p>0.00117203666</text:p>
              </table:table-cell>
              <table:table-cell office:value-type="float" office:value="131072">
                <text:p>131072</text:p>
              </table:table-cell>
              <table:table-cell office:value-type="float" office:value="0.01786020166">
                <text:p>0.01786020166</text:p>
              </table:table-cell>
              <table:table-cell office:value-type="float" office:value="131072">
                <text:p>131072</text:p>
              </table:table-cell>
              <table:table-cell office:value-type="float" office:value="0.00156571207">
                <text:p>0.001565712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2144">
                <text:p>262144</text:p>
              </table:table-cell>
              <table:table-cell office:value-type="float" office:value="0.04936577916">
                <text:p>0.04936577916</text:p>
              </table:table-cell>
              <table:table-cell office:value-type="float" office:value="262144">
                <text:p>262144</text:p>
              </table:table-cell>
              <table:table-cell office:value-type="float" office:value="0.06378036333">
                <text:p>0.06378036333</text:p>
              </table:table-cell>
              <table:table-cell office:value-type="float" office:value="262144">
                <text:p>262144</text:p>
              </table:table-cell>
              <table:table-cell office:value-type="float" office:value="0.08457608458">
                <text:p>0.08457608458</text:p>
              </table:table-cell>
              <table:table-cell office:value-type="float" office:value="262144">
                <text:p>262144</text:p>
              </table:table-cell>
              <table:table-cell office:value-type="float" office:value="0.00329077792">
                <text:p>0.00329077792</text:p>
              </table:table-cell>
              <table:table-cell office:value-type="float" office:value="262144">
                <text:p>262144</text:p>
              </table:table-cell>
              <table:table-cell office:value-type="float" office:value="0.04088214334">
                <text:p>0.04088214334</text:p>
              </table:table-cell>
              <table:table-cell office:value-type="float" office:value="262144">
                <text:p>262144</text:p>
              </table:table-cell>
              <table:table-cell office:value-type="float" office:value="0.00409677251">
                <text:p>0.004096772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4288">
                <text:p>524288</text:p>
              </table:table-cell>
              <table:table-cell office:value-type="float" office:value="0.12040788834">
                <text:p>0.12040788834</text:p>
              </table:table-cell>
              <table:table-cell office:value-type="float" office:value="524288">
                <text:p>524288</text:p>
              </table:table-cell>
              <table:table-cell office:value-type="float" office:value="0.14698098542">
                <text:p>0.14698098542</text:p>
              </table:table-cell>
              <table:table-cell office:value-type="float" office:value="524288">
                <text:p>524288</text:p>
              </table:table-cell>
              <table:table-cell office:value-type="float" office:value="0.19353176041">
                <text:p>0.19353176041</text:p>
              </table:table-cell>
              <table:table-cell office:value-type="float" office:value="524288">
                <text:p>524288</text:p>
              </table:table-cell>
              <table:table-cell office:value-type="float" office:value="0.00468681875">
                <text:p>0.00468681875</text:p>
              </table:table-cell>
              <table:table-cell office:value-type="float" office:value="524288">
                <text:p>524288</text:p>
              </table:table-cell>
              <table:table-cell office:value-type="float" office:value="0.08201173334">
                <text:p>0.08201173334</text:p>
              </table:table-cell>
              <table:table-cell office:value-type="float" office:value="524288">
                <text:p>524288</text:p>
              </table:table-cell>
              <table:table-cell office:value-type="float" office:value="0.00615675417">
                <text:p>0.006156754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48576">
                <text:p>1048576</text:p>
              </table:table-cell>
              <table:table-cell office:value-type="float" office:value="0.30811317417">
                <text:p>0.30811317417</text:p>
              </table:table-cell>
              <table:table-cell office:value-type="float" office:value="1048576">
                <text:p>1048576</text:p>
              </table:table-cell>
              <table:table-cell office:value-type="float" office:value="0.37578735291">
                <text:p>0.37578735291</text:p>
              </table:table-cell>
              <table:table-cell office:value-type="float" office:value="1048576">
                <text:p>1048576</text:p>
              </table:table-cell>
              <table:table-cell office:value-type="float" office:value="0.44603389792">
                <text:p>0.44603389792</text:p>
              </table:table-cell>
              <table:table-cell office:value-type="float" office:value="1048576">
                <text:p>1048576</text:p>
              </table:table-cell>
              <table:table-cell office:value-type="float" office:value="0.01009159833">
                <text:p>0.01009159833</text:p>
              </table:table-cell>
              <table:table-cell office:value-type="float" office:value="1048576">
                <text:p>1048576</text:p>
              </table:table-cell>
              <table:table-cell office:value-type="float" office:value="0.17091041126">
                <text:p>0.17091041126</text:p>
              </table:table-cell>
              <table:table-cell office:value-type="float" office:value="1048576">
                <text:p>1048576</text:p>
              </table:table-cell>
              <table:table-cell office:value-type="float" office:value="0.01400470041">
                <text:p>0.0140047004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2.2$MacOSX_AARCH64 LibreOffice_project/d401f2107ccab8f924a8e2df40f573aab7605b6f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4.095cm" svg:y="0.315cm" chart:style-name="ch2">
          <text:p>How close to a constant value is this?</text:p>
        </chart:title>
        <chart:legend chart:legend-position="end" svg:x="12.898cm" svg:y="4.208cm" style:legend-expansion="high" chart:style-name="ch3"/>
        <chart:plot-area chart:style-name="ch4" svg:x="1.324cm" svg:y="1.288cm" svg:width="11.254cm" svg:height="6.558cm">
          <chart:coordinate-region svg:x="3.582cm" svg:y="1.48cm" svg:width="8.325cm" svg:height="5.734cm"/>
          <chart:axis chart:dimension="x" chart:name="primary-x" chart:style-name="ch5">
            <chart:title svg:x="6.803cm" svg:y="8.027cm" chart:style-name="ch2">
              <text:p><text:span text:style-name="T1">n</text:span></text:p>
            </chart:title>
          </chart:axis>
          <chart:axis chart:dimension="y" chart:name="primary-y" chart:style-name="ch6">
            <chart:title svg:x="0.451cm" svg:y="5.021cm" chart:style-name="ch7">
              <text:p><text:span text:style-name="T1">t/nlgn</text:span></text:p>
            </chart:title>
            <chart:grid chart:style-name="ch8" chart:class="major"/>
          </chart:axis>
          <chart:series chart:style-name="ch9" chart:values-cell-range-address="Sheet1.B130:Sheet1.B140" chart:label-cell-address="Sheet1.A117:Sheet1.A117" chart:class="chart:scatter">
            <chart:domain table:cell-range-address="Sheet1.A119:Sheet1.A129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est Merge</text:p>
                <draw:g>
                  <svg:desc>Sheet1.A117:Sheet1.A1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4">
                <text:p>1024</text:p>
                <draw:g>
                  <svg:desc>Sheet1.A119:Sheet1.A129</svg:desc>
                </draw:g>
              </table:table-cell>
              <table:table-cell office:value-type="float" office:value="0.0000000079845390625">
                <text:p>0.0000000079845390625</text:p>
                <draw:g>
                  <svg:desc>Sheet1.B130:Sheet1.B1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8">
                <text:p>2048</text:p>
              </table:table-cell>
              <table:table-cell office:value-type="float" office:value="0.00000000753965420809659">
                <text:p>0.000000007539654208096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6">
                <text:p>4096</text:p>
              </table:table-cell>
              <table:table-cell office:value-type="float" office:value="0.000000000956268310546875">
                <text:p>0.000000000956268310546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92">
                <text:p>8192</text:p>
              </table:table-cell>
              <table:table-cell office:value-type="float" office:value="0.000000000957305157001202">
                <text:p>0.0000000009573051570012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84">
                <text:p>16384</text:p>
              </table:table-cell>
              <table:table-cell office:value-type="float" office:value="0.00000000102161224365234">
                <text:p>0.000000001021612243652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68">
                <text:p>32768</text:p>
              </table:table-cell>
              <table:table-cell office:value-type="float" office:value="0.000000000995525797526042">
                <text:p>0.0000000009955257975260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536">
                <text:p>65536</text:p>
              </table:table-cell>
              <table:table-cell office:value-type="float" office:value="0.00000000106340010643005">
                <text:p>0.00000000106340010643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072">
                <text:p>131072</text:p>
              </table:table-cell>
              <table:table-cell office:value-type="float" office:value="0.00000000107484163172105">
                <text:p>0.000000001074841631721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2144">
                <text:p>262144</text:p>
              </table:table-cell>
              <table:table-cell office:value-type="float" office:value="0.0000000104619723765055">
                <text:p>0.00000001046197237650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4288">
                <text:p>524288</text:p>
              </table:table-cell>
              <table:table-cell office:value-type="float" office:value="0.0000000120873590107968">
                <text:p>0.00000001208735901079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48576">
                <text:p>1048576</text:p>
              </table:table-cell>
              <table:table-cell office:value-type="float" office:value="0.0000000146919810376167">
                <text:p>0.00000001469198103761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2.2$MacOSX_AARCH64 LibreOffice_project/d401f2107ccab8f924a8e2df40f573aab7605b6f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