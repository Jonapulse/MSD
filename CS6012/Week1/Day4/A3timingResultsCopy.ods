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3012in" svg:height="3.5421in" svg:x="5.4043in" svg:y="0.085in">
            <draw:object draw:notify-on-update-of-ranges="Sheet1.A1:Sheet1.A1 Sheet1.A2:Sheet1.A19 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2in" svg:height="3.5421in" svg:x="5.3504in" svg:y="4.0669in">
            <draw:object draw:notify-on-update-of-ranges="Sheet1.A21:Sheet1.A21 Sheet1.A22:Sheet1.A44 Sheet1.B21:Sheet1.B21 Sheet1.B22:Sheet1.B44 Sheet1.C21:Sheet1.C21 Sheet1.C22:Sheet1.C44 Sheet1.D21:Sheet1.D21 Sheet1.D22:Sheet1.D44 Sheet1.E21:Sheet1.E21 Sheet1.E22:Sheet1.E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421in" svg:x="11.7598in" svg:y="4.0748in">
            <draw:object draw:notify-on-update-of-ranges="Sheet1.B21:Sheet1.B21 Sheet1.B22:Sheet1.B44 Sheet1.C21:Sheet1.C21 Sheet1.C22:Sheet1.C44 Sheet1.D21:Sheet1.D21 Sheet1.D22:Sheet1.D44 Sheet1.E21:Sheet1.E21 Sheet1.E22:Sheet1.E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12in" svg:height="3.5421in" svg:x="11.961in" svg:y="0.2394in">
            <draw:object draw:notify-on-update-of-ranges="Sheet1.B2:Sheet1.B19 Sheet1.C2:Sheet1.C19 Sheet1.D2:Sheet1.D19 Sheet1.E2:Sheet1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/ NlgN</text:p>
          </table:table-cell>
          <table:table-cell office:value-type="string" calcext:value-type="string">
            <text:p>Time / lgN</text:p>
          </table:table-cell>
          <table:table-cell office:value-type="string" calcext:value-type="string">
            <text:p>Time / 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formula="of:=[.B2]/([.A2]*LOG([.A2]; 2))" office:value-type="float" office:value="1.88143747289988" calcext:value-type="float">
            <text:p>1.88143747289988</text:p>
          </table:table-cell>
          <table:table-cell table:formula="of:=[.B2]/(LOG([.A2]; 2))" office:value-type="float" office:value="188.143747289988" calcext:value-type="float">
            <text:p>188.143747289988</text:p>
          </table:table-cell>
          <table:table-cell table:formula="of:=[.B2]/[.A2]"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80" calcext:value-type="float">
            <text:p>2280</text:p>
          </table:table-cell>
          <table:table-cell table:formula="of:=[.B3]/([.A3]*LOG([.A3]; 2))" office:value-type="float" office:value="2.10269487322794" calcext:value-type="float">
            <text:p>2.10269487322794</text:p>
          </table:table-cell>
          <table:table-cell table:formula="of:=[.B3]/(LOG([.A3]; 2))" office:value-type="float" office:value="315.404230984191" calcext:value-type="float">
            <text:p>315.404230984191</text:p>
          </table:table-cell>
          <table:table-cell table:formula="of:=[.B3]/[.A3]" office:value-type="float" office:value="15.2" calcext:value-type="float">
            <text:p>15.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340" calcext:value-type="float">
            <text:p>2340</text:p>
          </table:table-cell>
          <table:table-cell table:formula="of:=[.B4]/([.A4]*LOG([.A4]; 2))" office:value-type="float" office:value="1.33098172901104" calcext:value-type="float">
            <text:p>1.33098172901104</text:p>
          </table:table-cell>
          <table:table-cell table:formula="of:=[.B4]/(LOG([.A4]; 2))" office:value-type="float" office:value="299.470889027484" calcext:value-type="float">
            <text:p>299.470889027484</text:p>
          </table:table-cell>
          <table:table-cell table:formula="of:=[.B4]/[.A4]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480" calcext:value-type="float">
            <text:p>480</text:p>
          </table:table-cell>
          <table:table-cell table:formula="of:=[.B5]/([.A5]*LOG([.A5]; 2))" office:value-type="float" office:value="0.169631938305088" calcext:value-type="float">
            <text:p>0.169631938305088</text:p>
          </table:table-cell>
          <table:table-cell table:formula="of:=[.B5]/(LOG([.A5]; 2))" office:value-type="float" office:value="57.1659632088147" calcext:value-type="float">
            <text:p>57.1659632088147</text:p>
          </table:table-cell>
          <table:table-cell table:formula="of:=[.B5]/[.A5]" office:value-type="float" office:value="1.42433234421365" calcext:value-type="float">
            <text:p>1.42433234421365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440" calcext:value-type="float">
            <text:p>440</text:p>
          </table:table-cell>
          <table:table-cell table:formula="of:=[.B6]/([.A6]*LOG([.A6]; 2))" office:value-type="float" office:value="0.0968012734464074" calcext:value-type="float">
            <text:p>0.0968012734464074</text:p>
          </table:table-cell>
          <table:table-cell table:formula="of:=[.B6]/(LOG([.A6]; 2))" office:value-type="float" office:value="48.9814443638821" calcext:value-type="float">
            <text:p>48.9814443638821</text:p>
          </table:table-cell>
          <table:table-cell table:formula="of:=[.B6]/[.A6]" office:value-type="float" office:value="0.869565217391304" calcext:value-type="float">
            <text:p>0.86956521739130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390" calcext:value-type="float">
            <text:p>390</text:p>
          </table:table-cell>
          <table:table-cell table:formula="of:=[.B7]/([.A7]*LOG([.A7]; 2))" office:value-type="float" office:value="0.0537036320029876" calcext:value-type="float">
            <text:p>0.0537036320029876</text:p>
          </table:table-cell>
          <table:table-cell table:formula="of:=[.B7]/(LOG([.A7]; 2))" office:value-type="float" office:value="40.7610566902676" calcext:value-type="float">
            <text:p>40.7610566902676</text:p>
          </table:table-cell>
          <table:table-cell table:formula="of:=[.B7]/[.A7]" office:value-type="float" office:value="0.513833992094862" calcext:value-type="float">
            <text:p>0.513833992094862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470" calcext:value-type="float">
            <text:p>470</text:p>
          </table:table-cell>
          <table:table-cell table:formula="of:=[.B8]/([.A8]*LOG([.A8]; 2))" office:value-type="float" office:value="0.040640227943805" calcext:value-type="float">
            <text:p>0.040640227943805</text:p>
          </table:table-cell>
          <table:table-cell table:formula="of:=[.B8]/(LOG([.A8]; 2))" office:value-type="float" office:value="46.2892196279939" calcext:value-type="float">
            <text:p>46.2892196279939</text:p>
          </table:table-cell>
          <table:table-cell table:formula="of:=[.B8]/[.A8]" office:value-type="float" office:value="0.412642669007902" calcext:value-type="float">
            <text:p>0.412642669007902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480" calcext:value-type="float">
            <text:p>480</text:p>
          </table:table-cell>
          <table:table-cell table:formula="of:=[.B9]/([.A9]*LOG([.A9]; 2))" office:value-type="float" office:value="0.0261713569012307" calcext:value-type="float">
            <text:p>0.0261713569012307</text:p>
          </table:table-cell>
          <table:table-cell table:formula="of:=[.B9]/(LOG([.A9]; 2))" office:value-type="float" office:value="44.7006775873021" calcext:value-type="float">
            <text:p>44.7006775873021</text:p>
          </table:table-cell>
          <table:table-cell table:formula="of:=[.B9]/[.A9]" office:value-type="float" office:value="0.281030444964871" calcext:value-type="float">
            <text:p>0.281030444964871</text:p>
          </table:table-cell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float" office:value="470" calcext:value-type="float">
            <text:p>470</text:p>
          </table:table-cell>
          <table:table-cell table:formula="of:=[.B10]/([.A10]*LOG([.A10]; 2))" office:value-type="float" office:value="0.0162014962600546" calcext:value-type="float">
            <text:p>0.0162014962600546</text:p>
          </table:table-cell>
          <table:table-cell table:formula="of:=[.B10]/(LOG([.A10]; 2))" office:value-type="float" office:value="41.5082334182599" calcext:value-type="float">
            <text:p>41.5082334182599</text:p>
          </table:table-cell>
          <table:table-cell table:formula="of:=[.B10]/[.A10]" office:value-type="float" office:value="0.183450429352069" calcext:value-type="float">
            <text:p>0.183450429352069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390" calcext:value-type="float">
            <text:p>390</text:p>
          </table:table-cell>
          <table:table-cell table:formula="of:=[.B11]/([.A11]*LOG([.A11]; 2))" office:value-type="float" office:value="0.00851977416665535" calcext:value-type="float">
            <text:p>0.00851977416665535</text:p>
          </table:table-cell>
          <table:table-cell table:formula="of:=[.B11]/(LOG([.A11]; 2))" office:value-type="float" office:value="32.7500118966232" calcext:value-type="float">
            <text:p>32.7500118966232</text:p>
          </table:table-cell>
          <table:table-cell table:formula="of:=[.B11]/[.A11]" office:value-type="float" office:value="0.101456815816857" calcext:value-type="float">
            <text:p>0.101456815816857</text:p>
          </table:table-cell>
        </table:table-row>
        <table:table-row table:style-name="ro2">
          <table:table-cell office:value-type="float" office:value="5766" calcext:value-type="float">
            <text:p>5766</text:p>
          </table:table-cell>
          <table:table-cell office:value-type="float" office:value="420" calcext:value-type="float">
            <text:p>420</text:p>
          </table:table-cell>
          <table:table-cell table:formula="of:=[.B12]/([.A12]*LOG([.A12]; 2))" office:value-type="float" office:value="0.00583036263153594" calcext:value-type="float">
            <text:p>0.00583036263153594</text:p>
          </table:table-cell>
          <table:table-cell table:formula="of:=[.B12]/(LOG([.A12]; 2))" office:value-type="float" office:value="33.6178709334362" calcext:value-type="float">
            <text:p>33.6178709334362</text:p>
          </table:table-cell>
          <table:table-cell table:formula="of:=[.B12]/[.A12]" office:value-type="float" office:value="0.072840790842872" calcext:value-type="float">
            <text:p>0.072840790842872</text:p>
          </table:table-cell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460" calcext:value-type="float">
            <text:p>460</text:p>
          </table:table-cell>
          <table:table-cell table:formula="of:=[.B13]/([.A13]*LOG([.A13]; 2))" office:value-type="float" office:value="0.00406668050753282" calcext:value-type="float">
            <text:p>0.00406668050753282</text:p>
          </table:table-cell>
          <table:table-cell table:formula="of:=[.B13]/(LOG([.A13]; 2))" office:value-type="float" office:value="35.1727197096514" calcext:value-type="float">
            <text:p>35.1727197096514</text:p>
          </table:table-cell>
          <table:table-cell table:formula="of:=[.B13]/[.A13]" office:value-type="float" office:value="0.0531853393455891" calcext:value-type="float">
            <text:p>0.0531853393455891</text:p>
          </table:table-cell>
        </table:table-row>
        <table:table-row table:style-name="ro2">
          <table:table-cell office:value-type="float" office:value="12974" calcext:value-type="float">
            <text:p>12974</text:p>
          </table:table-cell>
          <table:table-cell office:value-type="float" office:value="1070" calcext:value-type="float">
            <text:p>1070</text:p>
          </table:table-cell>
          <table:table-cell table:formula="of:=[.B14]/([.A14]*LOG([.A14]; 2))" office:value-type="float" office:value="0.00603605439052057" calcext:value-type="float">
            <text:p>0.00603605439052057</text:p>
          </table:table-cell>
          <table:table-cell table:formula="of:=[.B14]/(LOG([.A14]; 2))" office:value-type="float" office:value="78.3117696626138" calcext:value-type="float">
            <text:p>78.3117696626138</text:p>
          </table:table-cell>
          <table:table-cell table:formula="of:=[.B14]/[.A14]" office:value-type="float" office:value="0.082472637582858" calcext:value-type="float">
            <text:p>0.082472637582858</text:p>
          </table:table-cell>
        </table:table-row>
        <table:table-row table:style-name="ro2">
          <table:table-cell office:value-type="float" office:value="19461" calcext:value-type="float">
            <text:p>19461</text:p>
          </table:table-cell>
          <table:table-cell office:value-type="float" office:value="430" calcext:value-type="float">
            <text:p>430</text:p>
          </table:table-cell>
          <table:table-cell table:formula="of:=[.B15]/([.A15]*LOG([.A15]; 2))" office:value-type="float" office:value="0.00155074470295332" calcext:value-type="float">
            <text:p>0.00155074470295332</text:p>
          </table:table-cell>
          <table:table-cell table:formula="of:=[.B15]/(LOG([.A15]; 2))" office:value-type="float" office:value="30.1790426641746" calcext:value-type="float">
            <text:p>30.1790426641746</text:p>
          </table:table-cell>
          <table:table-cell table:formula="of:=[.B15]/[.A15]" office:value-type="float" office:value="0.0220954729972766" calcext:value-type="float">
            <text:p>0.0220954729972766</text:p>
          </table:table-cell>
        </table:table-row>
        <table:table-row table:style-name="ro2">
          <table:table-cell office:value-type="float" office:value="29192" calcext:value-type="float">
            <text:p>29192</text:p>
          </table:table-cell>
          <table:table-cell office:value-type="float" office:value="460" calcext:value-type="float">
            <text:p>460</text:p>
          </table:table-cell>
          <table:table-cell table:formula="of:=[.B16]/([.A16]*LOG([.A16]; 2))" office:value-type="float" office:value="0.00106232310539101" calcext:value-type="float">
            <text:p>0.00106232310539101</text:p>
          </table:table-cell>
          <table:table-cell table:formula="of:=[.B16]/(LOG([.A16]; 2))" office:value-type="float" office:value="31.0113360925745" calcext:value-type="float">
            <text:p>31.0113360925745</text:p>
          </table:table-cell>
          <table:table-cell table:formula="of:=[.B16]/[.A16]" office:value-type="float" office:value="0.0157577418470814" calcext:value-type="float">
            <text:p>0.0157577418470814</text:p>
          </table:table-cell>
        </table:table-row>
        <table:table-row table:style-name="ro2">
          <table:table-cell office:value-type="float" office:value="43789" calcext:value-type="float">
            <text:p>43789</text:p>
          </table:table-cell>
          <table:table-cell office:value-type="float" office:value="460" calcext:value-type="float">
            <text:p>460</text:p>
          </table:table-cell>
          <table:table-cell table:formula="of:=[.B17]/([.A17]*LOG([.A17]; 2))" office:value-type="float" office:value="0.000681328963122015" calcext:value-type="float">
            <text:p>0.000681328963122015</text:p>
          </table:table-cell>
          <table:table-cell table:formula="of:=[.B17]/(LOG([.A17]; 2))" office:value-type="float" office:value="29.8347139661499" calcext:value-type="float">
            <text:p>29.8347139661499</text:p>
          </table:table-cell>
          <table:table-cell table:formula="of:=[.B17]/[.A17]" office:value-type="float" office:value="0.010504921327274" calcext:value-type="float">
            <text:p>0.010504921327274</text:p>
          </table:table-cell>
        </table:table-row>
        <table:table-row table:style-name="ro2">
          <table:table-cell office:value-type="float" office:value="65684" calcext:value-type="float">
            <text:p>65684</text:p>
          </table:table-cell>
          <table:table-cell office:value-type="float" office:value="430" calcext:value-type="float">
            <text:p>430</text:p>
          </table:table-cell>
          <table:table-cell table:formula="of:=[.B18]/([.A18]*LOG([.A18]; 2))" office:value-type="float" office:value="0.000409072754302958" calcext:value-type="float">
            <text:p>0.000409072754302958</text:p>
          </table:table-cell>
          <table:table-cell table:formula="of:=[.B18]/(LOG([.A18]; 2))" office:value-type="float" office:value="26.8695347936355" calcext:value-type="float">
            <text:p>26.8695347936355</text:p>
          </table:table-cell>
          <table:table-cell table:formula="of:=[.B18]/[.A18]" office:value-type="float" office:value="0.00654649534133122" calcext:value-type="float">
            <text:p>0.00654649534133122</text:p>
          </table:table-cell>
        </table:table-row>
        <table:table-row table:style-name="ro2">
          <table:table-cell office:value-type="float" office:value="98526" calcext:value-type="float">
            <text:p>98526</text:p>
          </table:table-cell>
          <table:table-cell office:value-type="float" office:value="430" calcext:value-type="float">
            <text:p>430</text:p>
          </table:table-cell>
          <table:table-cell table:formula="of:=[.B19]/([.A19]*LOG([.A19]; 2))" office:value-type="float" office:value="0.000263098213786703" calcext:value-type="float">
            <text:p>0.000263098213786703</text:p>
          </table:table-cell>
          <table:table-cell table:formula="of:=[.B19]/(LOG([.A19]; 2))" office:value-type="float" office:value="25.9220146115487" calcext:value-type="float">
            <text:p>25.9220146115487</text:p>
          </table:table-cell>
          <table:table-cell table:formula="of:=[.B19]/[.A19]" office:value-type="float" office:value="0.00436433022755415" calcext:value-type="float">
            <text:p>0.00436433022755415</text:p>
          </table:table-cell>
        </table:table-row>
        <table:table-row table:style-name="ro2">
          <table:table-cell office:value-type="string" calcext:value-type="string">
            <text:p>##### Test 2 ##########################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/ NlgN</text:p>
          </table:table-cell>
          <table:table-cell office:value-type="string" calcext:value-type="string">
            <text:p>Time / lgN</text:p>
          </table:table-cell>
          <table:table-cell office:value-type="string" calcext:value-type="string">
            <text:p>Time / 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40" calcext:value-type="float">
            <text:p>1140</text:p>
          </table:table-cell>
          <table:table-cell table:formula="of:=[.B22]/([.A22]*LOG([.A22]; 2))" office:value-type="float" office:value="1.71587097528469" calcext:value-type="float">
            <text:p>1.71587097528469</text:p>
          </table:table-cell>
          <table:table-cell table:formula="of:=[.B22]/(LOG([.A22]; 2))" office:value-type="float" office:value="171.587097528469" calcext:value-type="float">
            <text:p>171.587097528469</text:p>
          </table:table-cell>
          <table:table-cell table:formula="of:=[.B22]/[.A22]"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720" calcext:value-type="float">
            <text:p>1720</text:p>
          </table:table-cell>
          <table:table-cell table:formula="of:=[.B23]/([.A23]*LOG([.A23]; 2))" office:value-type="float" office:value="1.58624350085617" calcext:value-type="float">
            <text:p>1.58624350085617</text:p>
          </table:table-cell>
          <table:table-cell table:formula="of:=[.B23]/(LOG([.A23]; 2))" office:value-type="float" office:value="237.936525128425" calcext:value-type="float">
            <text:p>237.936525128425</text:p>
          </table:table-cell>
          <table:table-cell table:formula="of:=[.B23]/[.A23]" office:value-type="float" office:value="11.4666666666667" calcext:value-type="float">
            <text:p>11.4666666666667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790" calcext:value-type="float">
            <text:p>1790</text:p>
          </table:table-cell>
          <table:table-cell table:formula="of:=[.B24]/([.A24]*LOG([.A24]; 2))" office:value-type="float" office:value="1.01814414313238" calcext:value-type="float">
            <text:p>1.01814414313238</text:p>
          </table:table-cell>
          <table:table-cell table:formula="of:=[.B24]/(LOG([.A24]; 2))" office:value-type="float" office:value="229.082432204785" calcext:value-type="float">
            <text:p>229.082432204785</text:p>
          </table:table-cell>
          <table:table-cell table:formula="of:=[.B24]/[.A24]" office:value-type="float" office:value="7.95555555555556" calcext:value-type="float">
            <text:p>7.95555555555556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90" calcext:value-type="float">
            <text:p>390</text:p>
          </table:table-cell>
          <table:table-cell table:formula="of:=[.B25]/([.A25]*LOG([.A25]; 2))" office:value-type="float" office:value="0.137825949872884" calcext:value-type="float">
            <text:p>0.137825949872884</text:p>
          </table:table-cell>
          <table:table-cell table:formula="of:=[.B25]/(LOG([.A25]; 2))" office:value-type="float" office:value="46.447345107162" calcext:value-type="float">
            <text:p>46.447345107162</text:p>
          </table:table-cell>
          <table:table-cell table:formula="of:=[.B25]/[.A25]" office:value-type="float" office:value="1.15727002967359" calcext:value-type="float">
            <text:p>1.15727002967359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360" calcext:value-type="float">
            <text:p>360</text:p>
          </table:table-cell>
          <table:table-cell table:formula="of:=[.B26]/([.A26]*LOG([.A26]; 2))" office:value-type="float" office:value="0.0792010419106969" calcext:value-type="float">
            <text:p>0.0792010419106969</text:p>
          </table:table-cell>
          <table:table-cell table:formula="of:=[.B26]/(LOG([.A26]; 2))" office:value-type="float" office:value="40.0757272068127" calcext:value-type="float">
            <text:p>40.0757272068127</text:p>
          </table:table-cell>
          <table:table-cell table:formula="of:=[.B26]/[.A26]" office:value-type="float" office:value="0.711462450592885" calcext:value-type="float">
            <text:p>0.711462450592885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280" calcext:value-type="float">
            <text:p>280</text:p>
          </table:table-cell>
          <table:table-cell table:formula="of:=[.B27]/([.A27]*LOG([.A27]; 2))" office:value-type="float" office:value="0.0385564537457347" calcext:value-type="float">
            <text:p>0.0385564537457347</text:p>
          </table:table-cell>
          <table:table-cell table:formula="of:=[.B27]/(LOG([.A27]; 2))" office:value-type="float" office:value="29.2643483930126" calcext:value-type="float">
            <text:p>29.2643483930126</text:p>
          </table:table-cell>
          <table:table-cell table:formula="of:=[.B27]/[.A27]" office:value-type="float" office:value="0.368906455862978" calcext:value-type="float">
            <text:p>0.368906455862978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380" calcext:value-type="float">
            <text:p>380</text:p>
          </table:table-cell>
          <table:table-cell table:formula="of:=[.B28]/([.A28]*LOG([.A28]; 2))" office:value-type="float" office:value="0.0328580566354168" calcext:value-type="float">
            <text:p>0.0328580566354168</text:p>
          </table:table-cell>
          <table:table-cell table:formula="of:=[.B28]/(LOG([.A28]; 2))" office:value-type="float" office:value="37.4253265077397" calcext:value-type="float">
            <text:p>37.4253265077397</text:p>
          </table:table-cell>
          <table:table-cell table:formula="of:=[.B28]/[.A28]" office:value-type="float" office:value="0.333625987708516" calcext:value-type="float">
            <text:p>0.333625987708516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310" calcext:value-type="float">
            <text:p>310</text:p>
          </table:table-cell>
          <table:table-cell table:formula="of:=[.B29]/([.A29]*LOG([.A29]; 2))" office:value-type="float" office:value="0.0169023346653782" calcext:value-type="float">
            <text:p>0.0169023346653782</text:p>
          </table:table-cell>
          <table:table-cell table:formula="of:=[.B29]/(LOG([.A29]; 2))" office:value-type="float" office:value="28.8691876084659" calcext:value-type="float">
            <text:p>28.8691876084659</text:p>
          </table:table-cell>
          <table:table-cell table:formula="of:=[.B29]/[.A29]" office:value-type="float" office:value="0.181498829039813" calcext:value-type="float">
            <text:p>0.181498829039813</text:p>
          </table:table-cell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float" office:value="400" calcext:value-type="float">
            <text:p>400</text:p>
          </table:table-cell>
          <table:table-cell table:formula="of:=[.B30]/([.A30]*LOG([.A30]; 2))" office:value-type="float" office:value="0.0137885074553656" calcext:value-type="float">
            <text:p>0.0137885074553656</text:p>
          </table:table-cell>
          <table:table-cell table:formula="of:=[.B30]/(LOG([.A30]; 2))" office:value-type="float" office:value="35.3261561006467" calcext:value-type="float">
            <text:p>35.3261561006467</text:p>
          </table:table-cell>
          <table:table-cell table:formula="of:=[.B30]/[.A30]" office:value-type="float" office:value="0.156128024980484" calcext:value-type="float">
            <text:p>0.156128024980484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340" calcext:value-type="float">
            <text:p>340</text:p>
          </table:table-cell>
          <table:table-cell table:formula="of:=[.B31]/([.A31]*LOG([.A31]; 2))" office:value-type="float" office:value="0.00742749542734056" calcext:value-type="float">
            <text:p>0.00742749542734056</text:p>
          </table:table-cell>
          <table:table-cell table:formula="of:=[.B31]/(LOG([.A31]; 2))" office:value-type="float" office:value="28.5512924226971" calcext:value-type="float">
            <text:p>28.5512924226971</text:p>
          </table:table-cell>
          <table:table-cell table:formula="of:=[.B31]/[.A31]" office:value-type="float" office:value="0.0884495317377732" calcext:value-type="float">
            <text:p>0.0884495317377732</text:p>
          </table:table-cell>
        </table:table-row>
        <table:table-row table:style-name="ro2">
          <table:table-cell office:value-type="float" office:value="5766" calcext:value-type="float">
            <text:p>5766</text:p>
          </table:table-cell>
          <table:table-cell office:value-type="float" office:value="370" calcext:value-type="float">
            <text:p>370</text:p>
          </table:table-cell>
          <table:table-cell table:formula="of:=[.B32]/([.A32]*LOG([.A32]; 2))" office:value-type="float" office:value="0.00513627184206737" calcext:value-type="float">
            <text:p>0.00513627184206737</text:p>
          </table:table-cell>
          <table:table-cell table:formula="of:=[.B32]/(LOG([.A32]; 2))" office:value-type="float" office:value="29.6157434413605" calcext:value-type="float">
            <text:p>29.6157434413605</text:p>
          </table:table-cell>
          <table:table-cell table:formula="of:=[.B32]/[.A32]" office:value-type="float" office:value="0.0641692681234825" calcext:value-type="float">
            <text:p>0.0641692681234825</text:p>
          </table:table-cell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280" calcext:value-type="float">
            <text:p>280</text:p>
          </table:table-cell>
          <table:table-cell table:formula="of:=[.B33]/([.A33]*LOG([.A33]; 2))" office:value-type="float" office:value="0.00247537074371563" calcext:value-type="float">
            <text:p>0.00247537074371563</text:p>
          </table:table-cell>
          <table:table-cell table:formula="of:=[.B33]/(LOG([.A33]; 2))" office:value-type="float" office:value="21.4094815623965" calcext:value-type="float">
            <text:p>21.4094815623965</text:p>
          </table:table-cell>
          <table:table-cell table:formula="of:=[.B33]/[.A33]" office:value-type="float" office:value="0.0323736848190542" calcext:value-type="float">
            <text:p>0.0323736848190542</text:p>
          </table:table-cell>
        </table:table-row>
        <table:table-row table:style-name="ro2">
          <table:table-cell office:value-type="float" office:value="12974" calcext:value-type="float">
            <text:p>12974</text:p>
          </table:table-cell>
          <table:table-cell office:value-type="float" office:value="1050" calcext:value-type="float">
            <text:p>1050</text:p>
          </table:table-cell>
          <table:table-cell table:formula="of:=[.B34]/([.A34]*LOG([.A34]; 2))" office:value-type="float" office:value="0.00592323094396878" calcext:value-type="float">
            <text:p>0.00592323094396878</text:p>
          </table:table-cell>
          <table:table-cell table:formula="of:=[.B34]/(LOG([.A34]; 2))" office:value-type="float" office:value="76.847998267051" calcext:value-type="float">
            <text:p>76.847998267051</text:p>
          </table:table-cell>
          <table:table-cell table:formula="of:=[.B34]/[.A34]" office:value-type="float" office:value="0.0809310929551411" calcext:value-type="float">
            <text:p>0.0809310929551411</text:p>
          </table:table-cell>
        </table:table-row>
        <table:table-row table:style-name="ro2">
          <table:table-cell office:value-type="float" office:value="19461" calcext:value-type="float">
            <text:p>19461</text:p>
          </table:table-cell>
          <table:table-cell office:value-type="float" office:value="390" calcext:value-type="float">
            <text:p>390</text:p>
          </table:table-cell>
          <table:table-cell table:formula="of:=[.B35]/([.A35]*LOG([.A35]; 2))" office:value-type="float" office:value="0.00140648938174836" calcext:value-type="float">
            <text:p>0.00140648938174836</text:p>
          </table:table-cell>
          <table:table-cell table:formula="of:=[.B35]/(LOG([.A35]; 2))" office:value-type="float" office:value="27.3716898582049" calcext:value-type="float">
            <text:p>27.3716898582049</text:p>
          </table:table-cell>
          <table:table-cell table:formula="of:=[.B35]/[.A35]" office:value-type="float" office:value="0.0200400801603206" calcext:value-type="float">
            <text:p>0.0200400801603206</text:p>
          </table:table-cell>
        </table:table-row>
        <table:table-row table:style-name="ro2">
          <table:table-cell office:value-type="float" office:value="29192" calcext:value-type="float">
            <text:p>29192</text:p>
          </table:table-cell>
          <table:table-cell office:value-type="float" office:value="370" calcext:value-type="float">
            <text:p>370</text:p>
          </table:table-cell>
          <table:table-cell table:formula="of:=[.B36]/([.A36]*LOG([.A36]; 2))" office:value-type="float" office:value="0.000854477280423206" calcext:value-type="float">
            <text:p>0.000854477280423206</text:p>
          </table:table-cell>
          <table:table-cell table:formula="of:=[.B36]/(LOG([.A36]; 2))" office:value-type="float" office:value="24.9439007701142" calcext:value-type="float">
            <text:p>24.9439007701142</text:p>
          </table:table-cell>
          <table:table-cell table:formula="of:=[.B36]/[.A36]" office:value-type="float" office:value="0.0126747053987394" calcext:value-type="float">
            <text:p>0.0126747053987394</text:p>
          </table:table-cell>
        </table:table-row>
        <table:table-row table:style-name="ro2">
          <table:table-cell office:value-type="float" office:value="43789" calcext:value-type="float">
            <text:p>43789</text:p>
          </table:table-cell>
          <table:table-cell office:value-type="float" office:value="430" calcext:value-type="float">
            <text:p>430</text:p>
          </table:table-cell>
          <table:table-cell table:formula="of:=[.B37]/([.A37]*LOG([.A37]; 2))" office:value-type="float" office:value="0.000636894465527101" calcext:value-type="float">
            <text:p>0.000636894465527101</text:p>
          </table:table-cell>
          <table:table-cell table:formula="of:=[.B37]/(LOG([.A37]; 2))" office:value-type="float" office:value="27.8889717509662" calcext:value-type="float">
            <text:p>27.8889717509662</text:p>
          </table:table-cell>
          <table:table-cell table:formula="of:=[.B37]/[.A37]" office:value-type="float" office:value="0.00981981776245176" calcext:value-type="float">
            <text:p>0.00981981776245176</text:p>
          </table:table-cell>
        </table:table-row>
        <table:table-row table:style-name="ro2">
          <table:table-cell office:value-type="float" office:value="65684" calcext:value-type="float">
            <text:p>65684</text:p>
          </table:table-cell>
          <table:table-cell office:value-type="float" office:value="430" calcext:value-type="float">
            <text:p>430</text:p>
          </table:table-cell>
          <table:table-cell table:formula="of:=[.B38]/([.A38]*LOG([.A38]; 2))" office:value-type="float" office:value="0.000409072754302958" calcext:value-type="float">
            <text:p>0.000409072754302958</text:p>
          </table:table-cell>
          <table:table-cell table:formula="of:=[.B38]/(LOG([.A38]; 2))" office:value-type="float" office:value="26.8695347936355" calcext:value-type="float">
            <text:p>26.8695347936355</text:p>
          </table:table-cell>
          <table:table-cell table:formula="of:=[.B38]/[.A38]" office:value-type="float" office:value="0.00654649534133122" calcext:value-type="float">
            <text:p>0.00654649534133122</text:p>
          </table:table-cell>
        </table:table-row>
        <table:table-row table:style-name="ro2">
          <table:table-cell office:value-type="float" office:value="98526" calcext:value-type="float">
            <text:p>98526</text:p>
          </table:table-cell>
          <table:table-cell office:value-type="float" office:value="440" calcext:value-type="float">
            <text:p>440</text:p>
          </table:table-cell>
          <table:table-cell table:formula="of:=[.B39]/([.A39]*LOG([.A39]; 2))" office:value-type="float" office:value="0.000269216776898021" calcext:value-type="float">
            <text:p>0.000269216776898021</text:p>
          </table:table-cell>
          <table:table-cell table:formula="of:=[.B39]/(LOG([.A39]; 2))" office:value-type="float" office:value="26.5248521606545" calcext:value-type="float">
            <text:p>26.5248521606545</text:p>
          </table:table-cell>
          <table:table-cell table:formula="of:=[.B39]/[.A39]" office:value-type="float" office:value="0.00446582627935773" calcext:value-type="float">
            <text:p>0.00446582627935773</text:p>
          </table:table-cell>
        </table:table-row>
        <table:table-row table:style-name="ro2">
          <table:table-cell office:value-type="float" office:value="147789" calcext:value-type="float">
            <text:p>147789</text:p>
          </table:table-cell>
          <table:table-cell office:value-type="float" office:value="400" calcext:value-type="float">
            <text:p>400</text:p>
          </table:table-cell>
          <table:table-cell table:formula="of:=[.B40]/([.A40]*LOG([.A40]; 2))" office:value-type="float" office:value="0.000157603977895447" calcext:value-type="float">
            <text:p>0.000157603977895447</text:p>
          </table:table-cell>
          <table:table-cell table:formula="of:=[.B40]/(LOG([.A40]; 2))" office:value-type="float" office:value="23.2921342891902" calcext:value-type="float">
            <text:p>23.2921342891902</text:p>
          </table:table-cell>
          <table:table-cell table:formula="of:=[.B40]/[.A40]" office:value-type="float" office:value="0.00270656138142893" calcext:value-type="float">
            <text:p>0.00270656138142893</text:p>
          </table:table-cell>
        </table:table-row>
        <table:table-row table:style-name="ro2">
          <table:table-cell office:value-type="float" office:value="221683" calcext:value-type="float">
            <text:p>221683</text:p>
          </table:table-cell>
          <table:table-cell office:value-type="float" office:value="420" calcext:value-type="float">
            <text:p>420</text:p>
          </table:table-cell>
          <table:table-cell table:formula="of:=[.B41]/([.A41]*LOG([.A41]; 2))" office:value-type="float" office:value="0.00010668895436384" calcext:value-type="float">
            <text:p>0.00010668895436384</text:p>
          </table:table-cell>
          <table:table-cell table:formula="of:=[.B41]/(LOG([.A41]; 2))" office:value-type="float" office:value="23.6511274702392" calcext:value-type="float">
            <text:p>23.6511274702392</text:p>
          </table:table-cell>
          <table:table-cell table:formula="of:=[.B41]/[.A41]" office:value-type="float" office:value="0.00189459724020335" calcext:value-type="float">
            <text:p>0.00189459724020335</text:p>
          </table:table-cell>
        </table:table-row>
        <table:table-row table:style-name="ro2">
          <table:table-cell office:value-type="float" office:value="332525" calcext:value-type="float">
            <text:p>332525</text:p>
          </table:table-cell>
          <table:table-cell office:value-type="float" office:value="400" calcext:value-type="float">
            <text:p>400</text:p>
          </table:table-cell>
          <table:table-cell table:formula="of:=[.B42]/([.A42]*LOG([.A42]; 2))" office:value-type="float" office:value="0.0000655787112606424" calcext:value-type="float">
            <text:p>6.55787112606424E-05</text:p>
          </table:table-cell>
          <table:table-cell table:formula="of:=[.B42]/(LOG([.A42]; 2))" office:value-type="float" office:value="21.8065609619451" calcext:value-type="float">
            <text:p>21.8065609619451</text:p>
          </table:table-cell>
          <table:table-cell table:formula="of:=[.B42]/[.A42]" office:value-type="float" office:value="0.00120291707390422" calcext:value-type="float">
            <text:p>0.00120291707390422</text:p>
          </table:table-cell>
        </table:table-row>
        <table:table-row table:style-name="ro2">
          <table:table-cell office:value-type="float" office:value="498788" calcext:value-type="float">
            <text:p>498788</text:p>
          </table:table-cell>
          <table:table-cell office:value-type="float" office:value="490" calcext:value-type="float">
            <text:p>490</text:p>
          </table:table-cell>
          <table:table-cell table:formula="of:=[.B43]/([.A43]*LOG([.A43]; 2))" office:value-type="float" office:value="0.0000519007714973014" calcext:value-type="float">
            <text:p>5.19007714973014E-05</text:p>
          </table:table-cell>
          <table:table-cell table:formula="of:=[.B43]/(LOG([.A43]; 2))" office:value-type="float" office:value="25.887482013596" calcext:value-type="float">
            <text:p>25.887482013596</text:p>
          </table:table-cell>
          <table:table-cell table:formula="of:=[.B43]/[.A43]" office:value-type="float" office:value="0.00098238129225242" calcext:value-type="float">
            <text:p>0.00098238129225242</text:p>
          </table:table-cell>
        </table:table-row>
        <table:table-row table:style-name="ro2">
          <table:table-cell office:value-type="float" office:value="748182" calcext:value-type="float">
            <text:p>748182</text:p>
          </table:table-cell>
          <table:table-cell office:value-type="float" office:value="380" calcext:value-type="float">
            <text:p>380</text:p>
          </table:table-cell>
          <table:table-cell table:formula="of:=[.B44]/([.A44]*LOG([.A44]; 2))" office:value-type="float" office:value="0.0000260286494684828" calcext:value-type="float">
            <text:p>2.60286494684828E-05</text:p>
          </table:table-cell>
          <table:table-cell table:formula="of:=[.B44]/(LOG([.A44]; 2))" office:value-type="float" office:value="19.4741670166284" calcext:value-type="float">
            <text:p>19.4741670166284</text:p>
          </table:table-cell>
          <table:table-cell table:formula="of:=[.B44]/[.A44]" office:value-type="float" office:value="0.000507897810960435" calcext:value-type="float">
            <text:p>0.0005078978109604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9:21:04.8210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09:21:04.953580000</meta:creation-date>
    <meta:editing-duration>PT7M1S</meta:editing-duration>
    <meta:editing-cycles>2</meta:editing-cycles>
    <meta:generator>LibreOffice/25.8.2.2$MacOSX_AARCH64 LibreOffice_project/d401f2107ccab8f924a8e2df40f573aab7605b6f</meta:generator>
    <dc:date>2025-11-12T09:27:58.749924000</dc:date>
    <meta:document-statistic meta:table-count="3" meta:cell-count="21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line" chart:style-name="ch1">
        <chart:legend chart:legend-position="end" svg:x="12.848cm" svg:y="3.241cm" style:legend-expansion="high" chart:style-name="ch2"/>
        <chart:plot-area chart:style-name="ch3" svg:x="0.262cm" svg:y="0.081cm" svg:width="12.206cm" svg:height="8.638cm">
          <chart:coordinate-region svg:x="1.66cm" svg:y="0.273cm" svg:width="10.615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9" chart:label-cell-address="Sheet1.A1:Sheet1.A1" chart:class="chart:line">
            <chart:data-point chart:repeated="18"/>
          </chart:series>
          <chart:series chart:style-name="ch7" chart:values-cell-range-address="Sheet1.B2:Sheet1.B19" chart:label-cell-address="Sheet1.B1:Sheet1.B1" chart:class="chart:line">
            <chart:data-point chart:repeated="18"/>
          </chart:series>
          <chart:series chart:style-name="ch8" chart:values-cell-range-address="Sheet1.C2:Sheet1.C19" chart:label-cell-address="Sheet1.C1:Sheet1.C1" chart:class="chart:line">
            <chart:data-point chart:repeated="18"/>
          </chart:series>
          <chart:series chart:style-name="ch9" chart:values-cell-range-address="Sheet1.D2:Sheet1.D19" chart:label-cell-address="Sheet1.D1:Sheet1.D1" chart:class="chart:line">
            <chart:data-point chart:repeated="18"/>
          </chart:series>
          <chart:series chart:style-name="ch10" chart:values-cell-range-address="Sheet1.E2:Sheet1.E19" chart:label-cell-address="Sheet1.E1:Sheet1.E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  <table:table-cell office:value-type="string">
                <text:p>Time / NlgN</text:p>
                <draw:g>
                  <svg:desc>Sheet1.C1:Sheet1.C1</svg:desc>
                </draw:g>
              </table:table-cell>
              <table:table-cell office:value-type="string">
                <text:p>Time / lgN</text:p>
                <draw:g>
                  <svg:desc>Sheet1.D1:Sheet1.D1</svg:desc>
                </draw:g>
              </table:table-cell>
              <table:table-cell office:value-type="string">
                <text:p>Time / 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1250">
                <text:p>1250</text:p>
                <draw:g>
                  <svg:desc>Sheet1.B2:Sheet1.B19</svg:desc>
                </draw:g>
              </table:table-cell>
              <table:table-cell office:value-type="float" office:value="1.88143747289988">
                <text:p>1.88143747289988</text:p>
                <draw:g>
                  <svg:desc>Sheet1.C2:Sheet1.C19</svg:desc>
                </draw:g>
              </table:table-cell>
              <table:table-cell office:value-type="float" office:value="188.143747289988">
                <text:p>188.143747289988</text:p>
                <draw:g>
                  <svg:desc>Sheet1.D2:Sheet1.D19</svg:desc>
                </draw:g>
              </table:table-cell>
              <table:table-cell office:value-type="float" office:value="12.5">
                <text:p>12.5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280">
                <text:p>2280</text:p>
              </table:table-cell>
              <table:table-cell office:value-type="float" office:value="2.10269487322794">
                <text:p>2.10269487322794</text:p>
              </table:table-cell>
              <table:table-cell office:value-type="float" office:value="315.404230984191">
                <text:p>315.40423098419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2340">
                <text:p>2340</text:p>
              </table:table-cell>
              <table:table-cell office:value-type="float" office:value="1.33098172901104">
                <text:p>1.33098172901104</text:p>
              </table:table-cell>
              <table:table-cell office:value-type="float" office:value="299.470889027484">
                <text:p>299.47088902748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">
                <text:p>337</text:p>
              </table:table-cell>
              <table:table-cell office:value-type="float" office:value="480">
                <text:p>480</text:p>
              </table:table-cell>
              <table:table-cell office:value-type="float" office:value="0.169631938305088">
                <text:p>0.169631938305088</text:p>
              </table:table-cell>
              <table:table-cell office:value-type="float" office:value="57.1659632088147">
                <text:p>57.1659632088147</text:p>
              </table:table-cell>
              <table:table-cell office:value-type="float" office:value="1.42433234421365">
                <text:p>1.4243323442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6">
                <text:p>506</text:p>
              </table:table-cell>
              <table:table-cell office:value-type="float" office:value="440">
                <text:p>440</text:p>
              </table:table-cell>
              <table:table-cell office:value-type="float" office:value="0.0968012734464074">
                <text:p>0.0968012734464074</text:p>
              </table:table-cell>
              <table:table-cell office:value-type="float" office:value="48.9814443638821">
                <text:p>48.981444363882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390">
                <text:p>390</text:p>
              </table:table-cell>
              <table:table-cell office:value-type="float" office:value="0.0537036320029876">
                <text:p>0.0537036320029876</text:p>
              </table:table-cell>
              <table:table-cell office:value-type="float" office:value="40.7610566902676">
                <text:p>40.7610566902676</text:p>
              </table:table-cell>
              <table:table-cell office:value-type="float" office:value="0.513833992094862">
                <text:p>0.513833992094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9">
                <text:p>1139</text:p>
              </table:table-cell>
              <table:table-cell office:value-type="float" office:value="470">
                <text:p>470</text:p>
              </table:table-cell>
              <table:table-cell office:value-type="float" office:value="0.040640227943805">
                <text:p>0.040640227943805</text:p>
              </table:table-cell>
              <table:table-cell office:value-type="float" office:value="46.2892196279939">
                <text:p>46.2892196279939</text:p>
              </table:table-cell>
              <table:table-cell office:value-type="float" office:value="0.412642669007902">
                <text:p>0.412642669007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8">
                <text:p>1708</text:p>
              </table:table-cell>
              <table:table-cell office:value-type="float" office:value="480">
                <text:p>480</text:p>
              </table:table-cell>
              <table:table-cell office:value-type="float" office:value="0.0261713569012307">
                <text:p>0.0261713569012307</text:p>
              </table:table-cell>
              <table:table-cell office:value-type="float" office:value="44.7006775873021">
                <text:p>44.7006775873021</text:p>
              </table:table-cell>
              <table:table-cell office:value-type="float" office:value="0.281030444964871">
                <text:p>0.281030444964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2">
                <text:p>2562</text:p>
              </table:table-cell>
              <table:table-cell office:value-type="float" office:value="470">
                <text:p>470</text:p>
              </table:table-cell>
              <table:table-cell office:value-type="float" office:value="0.0162014962600546">
                <text:p>0.0162014962600546</text:p>
              </table:table-cell>
              <table:table-cell office:value-type="float" office:value="41.5082334182599">
                <text:p>41.5082334182599</text:p>
              </table:table-cell>
              <table:table-cell office:value-type="float" office:value="0.183450429352069">
                <text:p>0.183450429352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4">
                <text:p>3844</text:p>
              </table:table-cell>
              <table:table-cell office:value-type="float" office:value="390">
                <text:p>390</text:p>
              </table:table-cell>
              <table:table-cell office:value-type="float" office:value="0.00851977416665535">
                <text:p>0.00851977416665535</text:p>
              </table:table-cell>
              <table:table-cell office:value-type="float" office:value="32.7500118966232">
                <text:p>32.7500118966232</text:p>
              </table:table-cell>
              <table:table-cell office:value-type="float" office:value="0.101456815816857">
                <text:p>0.101456815816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6">
                <text:p>5766</text:p>
              </table:table-cell>
              <table:table-cell office:value-type="float" office:value="420">
                <text:p>420</text:p>
              </table:table-cell>
              <table:table-cell office:value-type="float" office:value="0.00583036263153594">
                <text:p>0.00583036263153594</text:p>
              </table:table-cell>
              <table:table-cell office:value-type="float" office:value="33.6178709334362">
                <text:p>33.6178709334362</text:p>
              </table:table-cell>
              <table:table-cell office:value-type="float" office:value="0.072840790842872">
                <text:p>0.072840790842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9">
                <text:p>8649</text:p>
              </table:table-cell>
              <table:table-cell office:value-type="float" office:value="460">
                <text:p>460</text:p>
              </table:table-cell>
              <table:table-cell office:value-type="float" office:value="0.00406668050753282">
                <text:p>0.00406668050753282</text:p>
              </table:table-cell>
              <table:table-cell office:value-type="float" office:value="35.1727197096514">
                <text:p>35.1727197096514</text:p>
              </table:table-cell>
              <table:table-cell office:value-type="float" office:value="0.0531853393455891">
                <text:p>0.0531853393455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74">
                <text:p>12974</text:p>
              </table:table-cell>
              <table:table-cell office:value-type="float" office:value="1070">
                <text:p>1070</text:p>
              </table:table-cell>
              <table:table-cell office:value-type="float" office:value="0.00603605439052057">
                <text:p>0.00603605439052057</text:p>
              </table:table-cell>
              <table:table-cell office:value-type="float" office:value="78.3117696626138">
                <text:p>78.3117696626138</text:p>
              </table:table-cell>
              <table:table-cell office:value-type="float" office:value="0.082472637582858">
                <text:p>0.08247263758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1">
                <text:p>19461</text:p>
              </table:table-cell>
              <table:table-cell office:value-type="float" office:value="430">
                <text:p>430</text:p>
              </table:table-cell>
              <table:table-cell office:value-type="float" office:value="0.00155074470295332">
                <text:p>0.00155074470295332</text:p>
              </table:table-cell>
              <table:table-cell office:value-type="float" office:value="30.1790426641746">
                <text:p>30.1790426641746</text:p>
              </table:table-cell>
              <table:table-cell office:value-type="float" office:value="0.0220954729972766">
                <text:p>0.022095472997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92">
                <text:p>29192</text:p>
              </table:table-cell>
              <table:table-cell office:value-type="float" office:value="460">
                <text:p>460</text:p>
              </table:table-cell>
              <table:table-cell office:value-type="float" office:value="0.00106232310539101">
                <text:p>0.00106232310539101</text:p>
              </table:table-cell>
              <table:table-cell office:value-type="float" office:value="31.0113360925745">
                <text:p>31.0113360925745</text:p>
              </table:table-cell>
              <table:table-cell office:value-type="float" office:value="0.0157577418470814">
                <text:p>0.0157577418470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789">
                <text:p>43789</text:p>
              </table:table-cell>
              <table:table-cell office:value-type="float" office:value="460">
                <text:p>460</text:p>
              </table:table-cell>
              <table:table-cell office:value-type="float" office:value="0.000681328963122015">
                <text:p>0.000681328963122015</text:p>
              </table:table-cell>
              <table:table-cell office:value-type="float" office:value="29.8347139661499">
                <text:p>29.8347139661499</text:p>
              </table:table-cell>
              <table:table-cell office:value-type="float" office:value="0.010504921327274">
                <text:p>0.010504921327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684">
                <text:p>65684</text:p>
              </table:table-cell>
              <table:table-cell office:value-type="float" office:value="430">
                <text:p>430</text:p>
              </table:table-cell>
              <table:table-cell office:value-type="float" office:value="0.000409072754302958">
                <text:p>0.000409072754302958</text:p>
              </table:table-cell>
              <table:table-cell office:value-type="float" office:value="26.8695347936355">
                <text:p>26.8695347936355</text:p>
              </table:table-cell>
              <table:table-cell office:value-type="float" office:value="0.00654649534133122">
                <text:p>0.0065464953413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526">
                <text:p>98526</text:p>
              </table:table-cell>
              <table:table-cell office:value-type="float" office:value="430">
                <text:p>430</text:p>
              </table:table-cell>
              <table:table-cell office:value-type="float" office:value="0.000263098213786703">
                <text:p>0.000263098213786703</text:p>
              </table:table-cell>
              <table:table-cell office:value-type="float" office:value="25.9220146115487">
                <text:p>25.9220146115487</text:p>
              </table:table-cell>
              <table:table-cell office:value-type="float" office:value="0.00436433022755415">
                <text:p>0.0043643302275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line" chart:style-name="ch1">
        <chart:legend chart:legend-position="end" svg:x="12.848cm" svg:y="3.241cm" style:legend-expansion="high" chart:style-name="ch2"/>
        <chart:plot-area chart:style-name="ch3" svg:x="0.32cm" svg:y="0.179cm" svg:width="12.208cm" svg:height="8.64cm">
          <chart:coordinate-region svg:x="1.718cm" svg:y="0.372cm" svg:width="10.617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44" chart:label-cell-address="Sheet1.A21:Sheet1.A21" chart:class="chart:line">
            <chart:data-point chart:repeated="23"/>
          </chart:series>
          <chart:series chart:style-name="ch7" chart:values-cell-range-address="Sheet1.B22:Sheet1.B44" chart:label-cell-address="Sheet1.B21:Sheet1.B21" chart:class="chart:line">
            <chart:data-point chart:repeated="23"/>
          </chart:series>
          <chart:series chart:style-name="ch8" chart:values-cell-range-address="Sheet1.C22:Sheet1.C44" chart:label-cell-address="Sheet1.C21:Sheet1.C21" chart:class="chart:line">
            <chart:data-point chart:repeated="23"/>
          </chart:series>
          <chart:series chart:style-name="ch9" chart:values-cell-range-address="Sheet1.D22:Sheet1.D44" chart:label-cell-address="Sheet1.D21:Sheet1.D21" chart:class="chart:line">
            <chart:data-point chart:repeated="23"/>
          </chart:series>
          <chart:series chart:style-name="ch10" chart:values-cell-range-address="Sheet1.E22:Sheet1.E44" chart:label-cell-address="Sheet1.E21:Sheet1.E21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21:Sheet1.A21</svg:desc>
                </draw:g>
              </table:table-cell>
              <table:table-cell office:value-type="string">
                <text:p>Time</text:p>
                <draw:g>
                  <svg:desc>Sheet1.B21:Sheet1.B21</svg:desc>
                </draw:g>
              </table:table-cell>
              <table:table-cell office:value-type="string">
                <text:p>Time / NlgN</text:p>
                <draw:g>
                  <svg:desc>Sheet1.C21:Sheet1.C21</svg:desc>
                </draw:g>
              </table:table-cell>
              <table:table-cell office:value-type="string">
                <text:p>Time / lgN</text:p>
                <draw:g>
                  <svg:desc>Sheet1.D21:Sheet1.D21</svg:desc>
                </draw:g>
              </table:table-cell>
              <table:table-cell office:value-type="string">
                <text:p>Time / N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2:Sheet1.A44</svg:desc>
                </draw:g>
              </table:table-cell>
              <table:table-cell office:value-type="float" office:value="1140">
                <text:p>1140</text:p>
                <draw:g>
                  <svg:desc>Sheet1.B22:Sheet1.B44</svg:desc>
                </draw:g>
              </table:table-cell>
              <table:table-cell office:value-type="float" office:value="1.71587097528469">
                <text:p>1.71587097528469</text:p>
                <draw:g>
                  <svg:desc>Sheet1.C22:Sheet1.C44</svg:desc>
                </draw:g>
              </table:table-cell>
              <table:table-cell office:value-type="float" office:value="171.587097528469">
                <text:p>171.587097528469</text:p>
                <draw:g>
                  <svg:desc>Sheet1.D22:Sheet1.D44</svg:desc>
                </draw:g>
              </table:table-cell>
              <table:table-cell office:value-type="float" office:value="11.4">
                <text:p>11.4</text:p>
                <draw:g>
                  <svg:desc>Sheet1.E2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720">
                <text:p>1720</text:p>
              </table:table-cell>
              <table:table-cell office:value-type="float" office:value="1.58624350085617">
                <text:p>1.58624350085617</text:p>
              </table:table-cell>
              <table:table-cell office:value-type="float" office:value="237.936525128425">
                <text:p>237.936525128425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1790">
                <text:p>1790</text:p>
              </table:table-cell>
              <table:table-cell office:value-type="float" office:value="1.01814414313238">
                <text:p>1.01814414313238</text:p>
              </table:table-cell>
              <table:table-cell office:value-type="float" office:value="229.082432204785">
                <text:p>229.082432204785</text:p>
              </table:table-cell>
              <table:table-cell office:value-type="float" office:value="7.95555555555556">
                <text:p>7.9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">
                <text:p>337</text:p>
              </table:table-cell>
              <table:table-cell office:value-type="float" office:value="390">
                <text:p>390</text:p>
              </table:table-cell>
              <table:table-cell office:value-type="float" office:value="0.137825949872884">
                <text:p>0.137825949872884</text:p>
              </table:table-cell>
              <table:table-cell office:value-type="float" office:value="46.447345107162">
                <text:p>46.447345107162</text:p>
              </table:table-cell>
              <table:table-cell office:value-type="float" office:value="1.15727002967359">
                <text:p>1.15727002967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6">
                <text:p>506</text:p>
              </table:table-cell>
              <table:table-cell office:value-type="float" office:value="360">
                <text:p>360</text:p>
              </table:table-cell>
              <table:table-cell office:value-type="float" office:value="0.0792010419106969">
                <text:p>0.0792010419106969</text:p>
              </table:table-cell>
              <table:table-cell office:value-type="float" office:value="40.0757272068127">
                <text:p>40.0757272068127</text:p>
              </table:table-cell>
              <table:table-cell office:value-type="float" office:value="0.711462450592885">
                <text:p>0.711462450592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280">
                <text:p>280</text:p>
              </table:table-cell>
              <table:table-cell office:value-type="float" office:value="0.0385564537457347">
                <text:p>0.0385564537457347</text:p>
              </table:table-cell>
              <table:table-cell office:value-type="float" office:value="29.2643483930126">
                <text:p>29.2643483930126</text:p>
              </table:table-cell>
              <table:table-cell office:value-type="float" office:value="0.368906455862978">
                <text:p>0.368906455862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9">
                <text:p>1139</text:p>
              </table:table-cell>
              <table:table-cell office:value-type="float" office:value="380">
                <text:p>380</text:p>
              </table:table-cell>
              <table:table-cell office:value-type="float" office:value="0.0328580566354168">
                <text:p>0.0328580566354168</text:p>
              </table:table-cell>
              <table:table-cell office:value-type="float" office:value="37.4253265077397">
                <text:p>37.4253265077397</text:p>
              </table:table-cell>
              <table:table-cell office:value-type="float" office:value="0.333625987708516">
                <text:p>0.333625987708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8">
                <text:p>1708</text:p>
              </table:table-cell>
              <table:table-cell office:value-type="float" office:value="310">
                <text:p>310</text:p>
              </table:table-cell>
              <table:table-cell office:value-type="float" office:value="0.0169023346653782">
                <text:p>0.0169023346653782</text:p>
              </table:table-cell>
              <table:table-cell office:value-type="float" office:value="28.8691876084659">
                <text:p>28.8691876084659</text:p>
              </table:table-cell>
              <table:table-cell office:value-type="float" office:value="0.181498829039813">
                <text:p>0.18149882903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2">
                <text:p>2562</text:p>
              </table:table-cell>
              <table:table-cell office:value-type="float" office:value="400">
                <text:p>400</text:p>
              </table:table-cell>
              <table:table-cell office:value-type="float" office:value="0.0137885074553656">
                <text:p>0.0137885074553656</text:p>
              </table:table-cell>
              <table:table-cell office:value-type="float" office:value="35.3261561006467">
                <text:p>35.3261561006467</text:p>
              </table:table-cell>
              <table:table-cell office:value-type="float" office:value="0.156128024980484">
                <text:p>0.156128024980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4">
                <text:p>3844</text:p>
              </table:table-cell>
              <table:table-cell office:value-type="float" office:value="340">
                <text:p>340</text:p>
              </table:table-cell>
              <table:table-cell office:value-type="float" office:value="0.00742749542734056">
                <text:p>0.00742749542734056</text:p>
              </table:table-cell>
              <table:table-cell office:value-type="float" office:value="28.5512924226971">
                <text:p>28.5512924226971</text:p>
              </table:table-cell>
              <table:table-cell office:value-type="float" office:value="0.0884495317377732">
                <text:p>0.0884495317377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6">
                <text:p>5766</text:p>
              </table:table-cell>
              <table:table-cell office:value-type="float" office:value="370">
                <text:p>370</text:p>
              </table:table-cell>
              <table:table-cell office:value-type="float" office:value="0.00513627184206737">
                <text:p>0.00513627184206737</text:p>
              </table:table-cell>
              <table:table-cell office:value-type="float" office:value="29.6157434413605">
                <text:p>29.6157434413605</text:p>
              </table:table-cell>
              <table:table-cell office:value-type="float" office:value="0.0641692681234825">
                <text:p>0.0641692681234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9">
                <text:p>8649</text:p>
              </table:table-cell>
              <table:table-cell office:value-type="float" office:value="280">
                <text:p>280</text:p>
              </table:table-cell>
              <table:table-cell office:value-type="float" office:value="0.00247537074371563">
                <text:p>0.00247537074371563</text:p>
              </table:table-cell>
              <table:table-cell office:value-type="float" office:value="21.4094815623965">
                <text:p>21.4094815623965</text:p>
              </table:table-cell>
              <table:table-cell office:value-type="float" office:value="0.0323736848190542">
                <text:p>0.0323736848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74">
                <text:p>12974</text:p>
              </table:table-cell>
              <table:table-cell office:value-type="float" office:value="1050">
                <text:p>1050</text:p>
              </table:table-cell>
              <table:table-cell office:value-type="float" office:value="0.00592323094396878">
                <text:p>0.00592323094396878</text:p>
              </table:table-cell>
              <table:table-cell office:value-type="float" office:value="76.847998267051">
                <text:p>76.847998267051</text:p>
              </table:table-cell>
              <table:table-cell office:value-type="float" office:value="0.0809310929551411">
                <text:p>0.080931092955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1">
                <text:p>19461</text:p>
              </table:table-cell>
              <table:table-cell office:value-type="float" office:value="390">
                <text:p>390</text:p>
              </table:table-cell>
              <table:table-cell office:value-type="float" office:value="0.00140648938174836">
                <text:p>0.00140648938174836</text:p>
              </table:table-cell>
              <table:table-cell office:value-type="float" office:value="27.3716898582049">
                <text:p>27.3716898582049</text:p>
              </table:table-cell>
              <table:table-cell office:value-type="float" office:value="0.0200400801603206">
                <text:p>0.0200400801603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92">
                <text:p>29192</text:p>
              </table:table-cell>
              <table:table-cell office:value-type="float" office:value="370">
                <text:p>370</text:p>
              </table:table-cell>
              <table:table-cell office:value-type="float" office:value="0.000854477280423206">
                <text:p>0.000854477280423206</text:p>
              </table:table-cell>
              <table:table-cell office:value-type="float" office:value="24.9439007701142">
                <text:p>24.9439007701142</text:p>
              </table:table-cell>
              <table:table-cell office:value-type="float" office:value="0.0126747053987394">
                <text:p>0.0126747053987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789">
                <text:p>43789</text:p>
              </table:table-cell>
              <table:table-cell office:value-type="float" office:value="430">
                <text:p>430</text:p>
              </table:table-cell>
              <table:table-cell office:value-type="float" office:value="0.000636894465527101">
                <text:p>0.000636894465527101</text:p>
              </table:table-cell>
              <table:table-cell office:value-type="float" office:value="27.8889717509662">
                <text:p>27.8889717509662</text:p>
              </table:table-cell>
              <table:table-cell office:value-type="float" office:value="0.00981981776245176">
                <text:p>0.00981981776245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684">
                <text:p>65684</text:p>
              </table:table-cell>
              <table:table-cell office:value-type="float" office:value="430">
                <text:p>430</text:p>
              </table:table-cell>
              <table:table-cell office:value-type="float" office:value="0.000409072754302958">
                <text:p>0.000409072754302958</text:p>
              </table:table-cell>
              <table:table-cell office:value-type="float" office:value="26.8695347936355">
                <text:p>26.8695347936355</text:p>
              </table:table-cell>
              <table:table-cell office:value-type="float" office:value="0.00654649534133122">
                <text:p>0.0065464953413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526">
                <text:p>98526</text:p>
              </table:table-cell>
              <table:table-cell office:value-type="float" office:value="440">
                <text:p>440</text:p>
              </table:table-cell>
              <table:table-cell office:value-type="float" office:value="0.000269216776898021">
                <text:p>0.000269216776898021</text:p>
              </table:table-cell>
              <table:table-cell office:value-type="float" office:value="26.5248521606545">
                <text:p>26.5248521606545</text:p>
              </table:table-cell>
              <table:table-cell office:value-type="float" office:value="0.00446582627935773">
                <text:p>0.00446582627935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89">
                <text:p>147789</text:p>
              </table:table-cell>
              <table:table-cell office:value-type="float" office:value="400">
                <text:p>400</text:p>
              </table:table-cell>
              <table:table-cell office:value-type="float" office:value="0.000157603977895447">
                <text:p>0.000157603977895447</text:p>
              </table:table-cell>
              <table:table-cell office:value-type="float" office:value="23.2921342891902">
                <text:p>23.2921342891902</text:p>
              </table:table-cell>
              <table:table-cell office:value-type="float" office:value="0.00270656138142893">
                <text:p>0.00270656138142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683">
                <text:p>221683</text:p>
              </table:table-cell>
              <table:table-cell office:value-type="float" office:value="420">
                <text:p>420</text:p>
              </table:table-cell>
              <table:table-cell office:value-type="float" office:value="0.00010668895436384">
                <text:p>0.00010668895436384</text:p>
              </table:table-cell>
              <table:table-cell office:value-type="float" office:value="23.6511274702392">
                <text:p>23.6511274702392</text:p>
              </table:table-cell>
              <table:table-cell office:value-type="float" office:value="0.00189459724020335">
                <text:p>0.00189459724020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525">
                <text:p>332525</text:p>
              </table:table-cell>
              <table:table-cell office:value-type="float" office:value="400">
                <text:p>400</text:p>
              </table:table-cell>
              <table:table-cell office:value-type="float" office:value="0.0000655787112606424">
                <text:p>0.0000655787112606424</text:p>
              </table:table-cell>
              <table:table-cell office:value-type="float" office:value="21.8065609619451">
                <text:p>21.8065609619451</text:p>
              </table:table-cell>
              <table:table-cell office:value-type="float" office:value="0.00120291707390422">
                <text:p>0.00120291707390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8788">
                <text:p>498788</text:p>
              </table:table-cell>
              <table:table-cell office:value-type="float" office:value="490">
                <text:p>490</text:p>
              </table:table-cell>
              <table:table-cell office:value-type="float" office:value="0.0000519007714973014">
                <text:p>0.0000519007714973014</text:p>
              </table:table-cell>
              <table:table-cell office:value-type="float" office:value="25.887482013596">
                <text:p>25.887482013596</text:p>
              </table:table-cell>
              <table:table-cell office:value-type="float" office:value="0.00098238129225242">
                <text:p>0.00098238129225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182">
                <text:p>748182</text:p>
              </table:table-cell>
              <table:table-cell office:value-type="float" office:value="380">
                <text:p>380</text:p>
              </table:table-cell>
              <table:table-cell office:value-type="float" office:value="0.0000260286494684828">
                <text:p>0.0000260286494684828</text:p>
              </table:table-cell>
              <table:table-cell office:value-type="float" office:value="19.4741670166284">
                <text:p>19.4741670166284</text:p>
              </table:table-cell>
              <table:table-cell office:value-type="float" office:value="0.000507897810960435">
                <text:p>0.000507897810960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line" chart:style-name="ch1">
        <chart:legend chart:legend-position="end" svg:x="12.848cm" svg:y="3.483cm" style:legend-expansion="high" chart:style-name="ch2"/>
        <chart:plot-area chart:style-name="ch3" svg:x="0.32cm" svg:y="0.179cm" svg:width="12.208cm" svg:height="8.64cm">
          <chart:coordinate-region svg:x="1.336cm" svg:y="0.371cm" svg:width="10.999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:Sheet1.B44" chart:label-cell-address="Sheet1.B21:Sheet1.B21" chart:class="chart:line">
            <chart:data-point chart:repeated="23"/>
          </chart:series>
          <chart:series chart:style-name="ch7" chart:values-cell-range-address="Sheet1.C22:Sheet1.C44" chart:label-cell-address="Sheet1.C21:Sheet1.C21" chart:class="chart:line">
            <chart:data-point chart:repeated="23"/>
          </chart:series>
          <chart:series chart:style-name="ch8" chart:values-cell-range-address="Sheet1.D22:Sheet1.D44" chart:label-cell-address="Sheet1.D21:Sheet1.D21" chart:class="chart:line">
            <chart:data-point chart:repeated="23"/>
          </chart:series>
          <chart:series chart:style-name="ch9" chart:values-cell-range-address="Sheet1.E22:Sheet1.E44" chart:label-cell-address="Sheet1.E21:Sheet1.E2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1:Sheet1.B21</svg:desc>
                </draw:g>
              </table:table-cell>
              <table:table-cell office:value-type="string">
                <text:p>Time / NlgN</text:p>
                <draw:g>
                  <svg:desc>Sheet1.C21:Sheet1.C21</svg:desc>
                </draw:g>
              </table:table-cell>
              <table:table-cell office:value-type="string">
                <text:p>Time / lgN</text:p>
                <draw:g>
                  <svg:desc>Sheet1.D21:Sheet1.D21</svg:desc>
                </draw:g>
              </table:table-cell>
              <table:table-cell office:value-type="string">
                <text:p>Time / N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0">
                <text:p>1140</text:p>
                <draw:g>
                  <svg:desc>Sheet1.B22:Sheet1.B44</svg:desc>
                </draw:g>
              </table:table-cell>
              <table:table-cell office:value-type="float" office:value="1.71587097528469">
                <text:p>1.71587097528469</text:p>
                <draw:g>
                  <svg:desc>Sheet1.C22:Sheet1.C44</svg:desc>
                </draw:g>
              </table:table-cell>
              <table:table-cell office:value-type="float" office:value="171.587097528469">
                <text:p>171.587097528469</text:p>
                <draw:g>
                  <svg:desc>Sheet1.D22:Sheet1.D44</svg:desc>
                </draw:g>
              </table:table-cell>
              <table:table-cell office:value-type="float" office:value="11.4">
                <text:p>11.4</text:p>
                <draw:g>
                  <svg:desc>Sheet1.E2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0">
                <text:p>1720</text:p>
              </table:table-cell>
              <table:table-cell office:value-type="float" office:value="1.58624350085617">
                <text:p>1.58624350085617</text:p>
              </table:table-cell>
              <table:table-cell office:value-type="float" office:value="237.936525128425">
                <text:p>237.936525128425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0">
                <text:p>1790</text:p>
              </table:table-cell>
              <table:table-cell office:value-type="float" office:value="1.01814414313238">
                <text:p>1.01814414313238</text:p>
              </table:table-cell>
              <table:table-cell office:value-type="float" office:value="229.082432204785">
                <text:p>229.082432204785</text:p>
              </table:table-cell>
              <table:table-cell office:value-type="float" office:value="7.95555555555556">
                <text:p>7.9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0.137825949872884">
                <text:p>0.137825949872884</text:p>
              </table:table-cell>
              <table:table-cell office:value-type="float" office:value="46.447345107162">
                <text:p>46.447345107162</text:p>
              </table:table-cell>
              <table:table-cell office:value-type="float" office:value="1.15727002967359">
                <text:p>1.15727002967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0.0792010419106969">
                <text:p>0.0792010419106969</text:p>
              </table:table-cell>
              <table:table-cell office:value-type="float" office:value="40.0757272068127">
                <text:p>40.0757272068127</text:p>
              </table:table-cell>
              <table:table-cell office:value-type="float" office:value="0.711462450592885">
                <text:p>0.711462450592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">
                <text:p>280</text:p>
              </table:table-cell>
              <table:table-cell office:value-type="float" office:value="0.0385564537457347">
                <text:p>0.0385564537457347</text:p>
              </table:table-cell>
              <table:table-cell office:value-type="float" office:value="29.2643483930126">
                <text:p>29.2643483930126</text:p>
              </table:table-cell>
              <table:table-cell office:value-type="float" office:value="0.368906455862978">
                <text:p>0.368906455862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">
                <text:p>380</text:p>
              </table:table-cell>
              <table:table-cell office:value-type="float" office:value="0.0328580566354168">
                <text:p>0.0328580566354168</text:p>
              </table:table-cell>
              <table:table-cell office:value-type="float" office:value="37.4253265077397">
                <text:p>37.4253265077397</text:p>
              </table:table-cell>
              <table:table-cell office:value-type="float" office:value="0.333625987708516">
                <text:p>0.333625987708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0.0169023346653782">
                <text:p>0.0169023346653782</text:p>
              </table:table-cell>
              <table:table-cell office:value-type="float" office:value="28.8691876084659">
                <text:p>28.8691876084659</text:p>
              </table:table-cell>
              <table:table-cell office:value-type="float" office:value="0.181498829039813">
                <text:p>0.18149882903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137885074553656">
                <text:p>0.0137885074553656</text:p>
              </table:table-cell>
              <table:table-cell office:value-type="float" office:value="35.3261561006467">
                <text:p>35.3261561006467</text:p>
              </table:table-cell>
              <table:table-cell office:value-type="float" office:value="0.156128024980484">
                <text:p>0.156128024980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742749542734056">
                <text:p>0.00742749542734056</text:p>
              </table:table-cell>
              <table:table-cell office:value-type="float" office:value="28.5512924226971">
                <text:p>28.5512924226971</text:p>
              </table:table-cell>
              <table:table-cell office:value-type="float" office:value="0.0884495317377732">
                <text:p>0.0884495317377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">
                <text:p>370</text:p>
              </table:table-cell>
              <table:table-cell office:value-type="float" office:value="0.00513627184206737">
                <text:p>0.00513627184206737</text:p>
              </table:table-cell>
              <table:table-cell office:value-type="float" office:value="29.6157434413605">
                <text:p>29.6157434413605</text:p>
              </table:table-cell>
              <table:table-cell office:value-type="float" office:value="0.0641692681234825">
                <text:p>0.0641692681234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0.00247537074371563">
                <text:p>0.00247537074371563</text:p>
              </table:table-cell>
              <table:table-cell office:value-type="float" office:value="21.4094815623965">
                <text:p>21.4094815623965</text:p>
              </table:table-cell>
              <table:table-cell office:value-type="float" office:value="0.0323736848190542">
                <text:p>0.0323736848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0.00592323094396878">
                <text:p>0.00592323094396878</text:p>
              </table:table-cell>
              <table:table-cell office:value-type="float" office:value="76.847998267051">
                <text:p>76.847998267051</text:p>
              </table:table-cell>
              <table:table-cell office:value-type="float" office:value="0.0809310929551411">
                <text:p>0.080931092955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0.00140648938174836">
                <text:p>0.00140648938174836</text:p>
              </table:table-cell>
              <table:table-cell office:value-type="float" office:value="27.3716898582049">
                <text:p>27.3716898582049</text:p>
              </table:table-cell>
              <table:table-cell office:value-type="float" office:value="0.0200400801603206">
                <text:p>0.0200400801603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">
                <text:p>370</text:p>
              </table:table-cell>
              <table:table-cell office:value-type="float" office:value="0.000854477280423206">
                <text:p>0.000854477280423206</text:p>
              </table:table-cell>
              <table:table-cell office:value-type="float" office:value="24.9439007701142">
                <text:p>24.9439007701142</text:p>
              </table:table-cell>
              <table:table-cell office:value-type="float" office:value="0.0126747053987394">
                <text:p>0.0126747053987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0.000636894465527101">
                <text:p>0.000636894465527101</text:p>
              </table:table-cell>
              <table:table-cell office:value-type="float" office:value="27.8889717509662">
                <text:p>27.8889717509662</text:p>
              </table:table-cell>
              <table:table-cell office:value-type="float" office:value="0.00981981776245176">
                <text:p>0.00981981776245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0">
                <text:p>430</text:p>
              </table:table-cell>
              <table:table-cell office:value-type="float" office:value="0.000409072754302958">
                <text:p>0.000409072754302958</text:p>
              </table:table-cell>
              <table:table-cell office:value-type="float" office:value="26.8695347936355">
                <text:p>26.8695347936355</text:p>
              </table:table-cell>
              <table:table-cell office:value-type="float" office:value="0.00654649534133122">
                <text:p>0.0065464953413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0.000269216776898021">
                <text:p>0.000269216776898021</text:p>
              </table:table-cell>
              <table:table-cell office:value-type="float" office:value="26.5248521606545">
                <text:p>26.5248521606545</text:p>
              </table:table-cell>
              <table:table-cell office:value-type="float" office:value="0.00446582627935773">
                <text:p>0.00446582627935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0.000157603977895447">
                <text:p>0.000157603977895447</text:p>
              </table:table-cell>
              <table:table-cell office:value-type="float" office:value="23.2921342891902">
                <text:p>23.2921342891902</text:p>
              </table:table-cell>
              <table:table-cell office:value-type="float" office:value="0.00270656138142893">
                <text:p>0.00270656138142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">
                <text:p>420</text:p>
              </table:table-cell>
              <table:table-cell office:value-type="float" office:value="0.00010668895436384">
                <text:p>0.00010668895436384</text:p>
              </table:table-cell>
              <table:table-cell office:value-type="float" office:value="23.6511274702392">
                <text:p>23.6511274702392</text:p>
              </table:table-cell>
              <table:table-cell office:value-type="float" office:value="0.00189459724020335">
                <text:p>0.00189459724020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000655787112606424">
                <text:p>0.0000655787112606424</text:p>
              </table:table-cell>
              <table:table-cell office:value-type="float" office:value="21.8065609619451">
                <text:p>21.8065609619451</text:p>
              </table:table-cell>
              <table:table-cell office:value-type="float" office:value="0.00120291707390422">
                <text:p>0.00120291707390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">
                <text:p>490</text:p>
              </table:table-cell>
              <table:table-cell office:value-type="float" office:value="0.0000519007714973014">
                <text:p>0.0000519007714973014</text:p>
              </table:table-cell>
              <table:table-cell office:value-type="float" office:value="25.887482013596">
                <text:p>25.887482013596</text:p>
              </table:table-cell>
              <table:table-cell office:value-type="float" office:value="0.00098238129225242">
                <text:p>0.00098238129225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0">
                <text:p>380</text:p>
              </table:table-cell>
              <table:table-cell office:value-type="float" office:value="0.0000260286494684828">
                <text:p>0.0000260286494684828</text:p>
              </table:table-cell>
              <table:table-cell office:value-type="float" office:value="19.4741670166284">
                <text:p>19.4741670166284</text:p>
              </table:table-cell>
              <table:table-cell office:value-type="float" office:value="0.000507897810960435">
                <text:p>0.000507897810960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line" chart:style-name="ch1">
        <chart:legend chart:legend-position="end" svg:x="13.134cm" svg:y="3.483cm" style:legend-expansion="high" chart:style-name="ch2"/>
        <chart:plot-area chart:style-name="ch3" svg:x="0.32cm" svg:y="0.179cm" svg:width="12.494cm" svg:height="8.64cm">
          <chart:coordinate-region svg:x="1.336cm" svg:y="0.371cm" svg:width="11.285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class="chart:line">
            <chart:data-point chart:repeated="18"/>
          </chart:series>
          <chart:series chart:style-name="ch7" chart:values-cell-range-address="Sheet1.C2:Sheet1.C19" chart:class="chart:line">
            <chart:data-point chart:repeated="18"/>
          </chart:series>
          <chart:series chart:style-name="ch8" chart:values-cell-range-address="Sheet1.D2:Sheet1.D19" chart:class="chart:line">
            <chart:data-point chart:repeated="18"/>
          </chart:series>
          <chart:series chart:style-name="ch9" chart:values-cell-range-address="Sheet1.E2:Sheet1.E1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  <draw:g>
                  <svg:desc>Sheet1.B2:Sheet1.B19</svg:desc>
                </draw:g>
              </table:table-cell>
              <table:table-cell office:value-type="float" office:value="1.88143747289988">
                <text:p>1.88143747289988</text:p>
                <draw:g>
                  <svg:desc>Sheet1.C2:Sheet1.C19</svg:desc>
                </draw:g>
              </table:table-cell>
              <table:table-cell office:value-type="float" office:value="188.143747289988">
                <text:p>188.143747289988</text:p>
                <draw:g>
                  <svg:desc>Sheet1.D2:Sheet1.D19</svg:desc>
                </draw:g>
              </table:table-cell>
              <table:table-cell office:value-type="float" office:value="12.5">
                <text:p>12.5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0">
                <text:p>2280</text:p>
              </table:table-cell>
              <table:table-cell office:value-type="float" office:value="2.10269487322794">
                <text:p>2.10269487322794</text:p>
              </table:table-cell>
              <table:table-cell office:value-type="float" office:value="315.404230984191">
                <text:p>315.40423098419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40">
                <text:p>2340</text:p>
              </table:table-cell>
              <table:table-cell office:value-type="float" office:value="1.33098172901104">
                <text:p>1.33098172901104</text:p>
              </table:table-cell>
              <table:table-cell office:value-type="float" office:value="299.470889027484">
                <text:p>299.47088902748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0.169631938305088">
                <text:p>0.169631938305088</text:p>
              </table:table-cell>
              <table:table-cell office:value-type="float" office:value="57.1659632088147">
                <text:p>57.1659632088147</text:p>
              </table:table-cell>
              <table:table-cell office:value-type="float" office:value="1.42433234421365">
                <text:p>1.4243323442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0.0968012734464074">
                <text:p>0.0968012734464074</text:p>
              </table:table-cell>
              <table:table-cell office:value-type="float" office:value="48.9814443638821">
                <text:p>48.981444363882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">
                <text:p>390</text:p>
              </table:table-cell>
              <table:table-cell office:value-type="float" office:value="0.0537036320029876">
                <text:p>0.0537036320029876</text:p>
              </table:table-cell>
              <table:table-cell office:value-type="float" office:value="40.7610566902676">
                <text:p>40.7610566902676</text:p>
              </table:table-cell>
              <table:table-cell office:value-type="float" office:value="0.513833992094862">
                <text:p>0.513833992094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0">
                <text:p>470</text:p>
              </table:table-cell>
              <table:table-cell office:value-type="float" office:value="0.040640227943805">
                <text:p>0.040640227943805</text:p>
              </table:table-cell>
              <table:table-cell office:value-type="float" office:value="46.2892196279939">
                <text:p>46.2892196279939</text:p>
              </table:table-cell>
              <table:table-cell office:value-type="float" office:value="0.412642669007902">
                <text:p>0.412642669007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">
                <text:p>480</text:p>
              </table:table-cell>
              <table:table-cell office:value-type="float" office:value="0.0261713569012307">
                <text:p>0.0261713569012307</text:p>
              </table:table-cell>
              <table:table-cell office:value-type="float" office:value="44.7006775873021">
                <text:p>44.7006775873021</text:p>
              </table:table-cell>
              <table:table-cell office:value-type="float" office:value="0.281030444964871">
                <text:p>0.281030444964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0">
                <text:p>470</text:p>
              </table:table-cell>
              <table:table-cell office:value-type="float" office:value="0.0162014962600546">
                <text:p>0.0162014962600546</text:p>
              </table:table-cell>
              <table:table-cell office:value-type="float" office:value="41.5082334182599">
                <text:p>41.5082334182599</text:p>
              </table:table-cell>
              <table:table-cell office:value-type="float" office:value="0.183450429352069">
                <text:p>0.183450429352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">
                <text:p>390</text:p>
              </table:table-cell>
              <table:table-cell office:value-type="float" office:value="0.00851977416665535">
                <text:p>0.00851977416665535</text:p>
              </table:table-cell>
              <table:table-cell office:value-type="float" office:value="32.7500118966232">
                <text:p>32.7500118966232</text:p>
              </table:table-cell>
              <table:table-cell office:value-type="float" office:value="0.101456815816857">
                <text:p>0.101456815816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">
                <text:p>420</text:p>
              </table:table-cell>
              <table:table-cell office:value-type="float" office:value="0.00583036263153594">
                <text:p>0.00583036263153594</text:p>
              </table:table-cell>
              <table:table-cell office:value-type="float" office:value="33.6178709334362">
                <text:p>33.6178709334362</text:p>
              </table:table-cell>
              <table:table-cell office:value-type="float" office:value="0.072840790842872">
                <text:p>0.072840790842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0">
                <text:p>460</text:p>
              </table:table-cell>
              <table:table-cell office:value-type="float" office:value="0.00406668050753282">
                <text:p>0.00406668050753282</text:p>
              </table:table-cell>
              <table:table-cell office:value-type="float" office:value="35.1727197096514">
                <text:p>35.1727197096514</text:p>
              </table:table-cell>
              <table:table-cell office:value-type="float" office:value="0.0531853393455891">
                <text:p>0.0531853393455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0">
                <text:p>1070</text:p>
              </table:table-cell>
              <table:table-cell office:value-type="float" office:value="0.00603605439052057">
                <text:p>0.00603605439052057</text:p>
              </table:table-cell>
              <table:table-cell office:value-type="float" office:value="78.3117696626138">
                <text:p>78.3117696626138</text:p>
              </table:table-cell>
              <table:table-cell office:value-type="float" office:value="0.082472637582858">
                <text:p>0.08247263758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">
                <text:p>430</text:p>
              </table:table-cell>
              <table:table-cell office:value-type="float" office:value="0.00155074470295332">
                <text:p>0.00155074470295332</text:p>
              </table:table-cell>
              <table:table-cell office:value-type="float" office:value="30.1790426641746">
                <text:p>30.1790426641746</text:p>
              </table:table-cell>
              <table:table-cell office:value-type="float" office:value="0.0220954729972766">
                <text:p>0.022095472997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.00106232310539101">
                <text:p>0.00106232310539101</text:p>
              </table:table-cell>
              <table:table-cell office:value-type="float" office:value="31.0113360925745">
                <text:p>31.0113360925745</text:p>
              </table:table-cell>
              <table:table-cell office:value-type="float" office:value="0.0157577418470814">
                <text:p>0.0157577418470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0.000681328963122015">
                <text:p>0.000681328963122015</text:p>
              </table:table-cell>
              <table:table-cell office:value-type="float" office:value="29.8347139661499">
                <text:p>29.8347139661499</text:p>
              </table:table-cell>
              <table:table-cell office:value-type="float" office:value="0.010504921327274">
                <text:p>0.010504921327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0">
                <text:p>430</text:p>
              </table:table-cell>
              <table:table-cell office:value-type="float" office:value="0.000409072754302958">
                <text:p>0.000409072754302958</text:p>
              </table:table-cell>
              <table:table-cell office:value-type="float" office:value="26.8695347936355">
                <text:p>26.8695347936355</text:p>
              </table:table-cell>
              <table:table-cell office:value-type="float" office:value="0.00654649534133122">
                <text:p>0.0065464953413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  <table:table-cell office:value-type="float" office:value="0.000263098213786703">
                <text:p>0.000263098213786703</text:p>
              </table:table-cell>
              <table:table-cell office:value-type="float" office:value="25.9220146115487">
                <text:p>25.9220146115487</text:p>
              </table:table-cell>
              <table:table-cell office:value-type="float" office:value="0.00436433022755415">
                <text:p>0.00436433022755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