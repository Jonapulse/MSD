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msdscriptComparisons" style:family="table">
      <style:table-properties style:width="6.925in" table:align="margins"/>
    </style:style>
    <style:style style:name="msdscriptComparisons.A" style:family="table-column">
      <style:table-column-properties style:column-width="0.8118in" style:rel-column-width="1169*"/>
    </style:style>
    <style:style style:name="msdscriptComparisons.B" style:family="table-column">
      <style:table-column-properties style:column-width="6.1132in" style:rel-column-width="8803*"/>
    </style:style>
    <style:style style:name="msdscriptComparisons.A1" style:family="table-cell">
      <style:table-cell-properties fo:padding="0in" fo:border="none" style:writing-mode="page"/>
    </style:style>
    <style:style style:name="msdscriptComparisons.13" style:family="table-row">
      <style:table-row-properties style:min-row-height="0.2118in"/>
    </style:style>
    <style:style style:name="P1" style:family="paragraph" style:parent-style-name="Standard">
      <style:text-properties fo:font-weight="bold" officeooo:rsid="00146244" officeooo:paragraph-rsid="00146244" style:font-weight-asian="bold" style:font-weight-complex="bold"/>
    </style:style>
    <style:style style:name="P2" style:family="paragraph" style:parent-style-name="Table_20_Contents">
      <style:text-properties officeooo:rsid="00146244" officeooo:paragraph-rsid="00146244"/>
    </style:style>
    <style:style style:name="P3" style:family="paragraph" style:parent-style-name="Table_20_Contents">
      <style:text-properties officeooo:paragraph-rsid="00146244"/>
    </style:style>
    <style:style style:name="P4" style:family="paragraph" style:parent-style-name="Table_20_Contents">
      <style:text-properties officeooo:rsid="0015f797" officeooo:paragraph-rsid="0015f797"/>
    </style:style>
    <style:style style:name="P5" style:family="paragraph" style:parent-style-name="Standard">
      <style:text-properties fo:font-weight="normal" officeooo:rsid="00146244" officeooo:paragraph-rsid="00146244" style:font-weight-asian="normal" style:font-weight-complex="normal"/>
    </style:style>
    <style:style style:name="T1" style:family="text">
      <style:text-properties officeooo:rsid="0017fc7f"/>
    </style:style>
    <style:style style:name="T2" style:family="text">
      <style:text-properties officeooo:rsid="0014624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d3c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5 – Phase 7: Test Generation – Jon Pulsipher, 2-24-26</text:p>
      <text:p text:style-name="P1"/>
      <text:p text:style-name="P1">Comparing msdscript to msdscript0 <text:span text:style-name="T1">through </text:span>msdscript7</text:p>
      <table:table table:name="msdscriptComparisons" table:style-name="msdscriptComparisons">
        <table:table-column table:style-name="msdscriptComparisons.A"/>
        <table:table-column table:style-name="msdscriptComparisons.B"/>
        <table:table-row>
          <table:table-cell table:style-name="msdscriptComparisons.A1" office:value-type="string">
            <text:p text:style-name="P2">msdscript0</text:p>
          </table:table-cell>
          <table:table-cell table:style-name="msdscriptComparisons.A1" office:value-type="string">
            <text:p text:style-name="Table_20_Contents"><text:span text:style-name="T2">Full mismatch – msdscript0 would not complete when run in interp.</text:span></text:p>
          </table:table-cell>
        </table:table-row>
        <table:table-row>
          <table:table-cell table:style-name="msdscriptComparisons.A1" office:value-type="string">
            <text:p text:style-name="P2">msdscript1</text:p>
          </table:table-cell>
          <table:table-cell table:style-name="msdscriptComparisons.A1" office:value-type="string">
            <text:p text:style-name="P2">msdscript1 never returns values, so all mismatches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P2">msdscript0 also exits with code 1 when interp is called on vars, which msdscript1 does not</text:p>
          </table:table-cell>
        </table:table-row>
        <table:table-row>
          <table:table-cell table:style-name="msdscriptComparisons.A1" office:value-type="string">
            <text:p text:style-name="P2">msdscript2</text:p>
          </table:table-cell>
          <table:table-cell table:style-name="msdscriptComparisons.A1" office:value-type="string">
            <text:p text:style-name="P2">Msdscript2 mismatches when there is any mult. Examples follow...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Table_20_Contents">Mismatch for input: _let hjm=18_in hjm*14</text:p>
            <text:p text:style-name="Table_20_Contents"><text:tab/>Prog1: 252</text:p>
            <text:p text:style-name="P3"><text:tab/>Prog2: 32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Table_20_Contents">Mismatch for input: 3*3</text:p>
            <text:p text:style-name="Table_20_Contents"><text:tab/>Prog1: 9</text:p>
            <text:p text:style-name="Table_20_Contents"><text:tab/>Prog2: 6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Table_20_Contents">Mismatch for input: _let x=48_in x*x</text:p>
            <text:p text:style-name="Table_20_Contents"><text:tab/>Prog1: 2304</text:p>
            <text:p text:style-name="Table_20_Contents"><text:tab/>Prog2: 96</text:p>
          </table:table-cell>
        </table:table-row>
        <table:table-row>
          <table:table-cell table:style-name="msdscriptComparisons.A1" office:value-type="string">
            <text:p text:style-name="P2">msdscript3</text:p>
          </table:table-cell>
          <table:table-cell table:style-name="msdscriptComparisons.A1" office:value-type="string">
            <text:p text:style-name="P2">No mismatches</text:p>
          </table:table-cell>
        </table:table-row>
        <table:table-row>
          <table:table-cell table:style-name="msdscriptComparisons.A1" office:value-type="string">
            <text:p text:style-name="P2">msdscript4</text:p>
          </table:table-cell>
          <table:table-cell table:style-name="msdscriptComparisons.A1" office:value-type="string">
            <text:p text:style-name="P2">Two mismatches in nested let statements and <text:span text:style-name="T3">msdscript4 </text:span><text:span text:style-name="T4">seems </text:span><text:span text:style-name="T3">correct. Will update for my next msdscript phase.</text:span>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P3">Mismatch for input: _let x=15_in x+_let x=0_in x+65+55*94*43</text:p>
            <text:p text:style-name="P3"><text:tab/>Prog1: 222405</text:p>
            <text:p text:style-name="P3"><text:tab/>Prog2: 222390</text:p>
          </table:table-cell>
        </table:table-row>
        <table:table-row>
          <table:table-cell table:style-name="msdscriptComparisons.A1" office:value-type="string">
            <text:p text:style-name="Table_20_Contents"/>
          </table:table-cell>
          <table:table-cell table:style-name="msdscriptComparisons.A1" office:value-type="string">
            <text:p text:style-name="Table_20_Contents">Mismatch for input: 65+_let brhwm=65_in brhwm+81*_let y=56_in y+51*30+43*7*98*22+26*_let y=69_in y*5</text:p>
            <text:p text:style-name="Table_20_Contents"><text:tab/>Prog1: 53283712</text:p>
            <text:p text:style-name="Table_20_Contents"><text:tab/>Prog2: 53420602</text:p>
          </table:table-cell>
        </table:table-row>
        <table:table-row>
          <table:table-cell table:style-name="msdscriptComparisons.A1" office:value-type="string">
            <text:p text:style-name="P4">msdscript5</text:p>
          </table:table-cell>
          <table:table-cell table:style-name="msdscriptComparisons.A1" office:value-type="string">
            <text:p text:style-name="P4">No mismatches</text:p>
          </table:table-cell>
        </table:table-row>
        <table:table-row table:style-name="msdscriptComparisons.13">
          <table:table-cell table:style-name="msdscriptComparisons.A1" office:value-type="string">
            <text:p text:style-name="P4">msdscript6</text:p>
          </table:table-cell>
          <table:table-cell table:style-name="msdscriptComparisons.A1" office:value-type="string">
            <text:p text:style-name="P4">Nested _let mismatch. <text:span text:style-name="T3">One or both are wrong. Will update next msdscript phase.</text:span></text:p>
          </table:table-cell>
        </table:table-row>
        <table:table-row table:style-name="msdscriptComparisons.13">
          <table:table-cell table:style-name="msdscriptComparisons.A1" office:value-type="string">
            <text:p text:style-name="P4"/>
          </table:table-cell>
          <table:table-cell table:style-name="msdscriptComparisons.A1" office:value-type="string">
            <text:p text:style-name="P4">Mismatch for input: 8*44*3*_let x=1_in x*57+_let x=23_in x*2</text:p>
            <text:p text:style-name="P4"><text:tab/>Prog1: 62304</text:p>
            <text:p text:style-name="P4"><text:tab/>Prog2: 108768</text:p>
          </table:table-cell>
        </table:table-row>
        <table:table-row table:style-name="msdscriptComparisons.13">
          <table:table-cell table:style-name="msdscriptComparisons.A1" office:value-type="string">
            <text:p text:style-name="P4"/>
          </table:table-cell>
          <table:table-cell table:style-name="msdscriptComparisons.A1" office:value-type="string">
            <text:p text:style-name="P4">Mismatch for input: _let x=91_in x*_let y=95_in y+_let y=29_in y+41+33*23</text:p>
            <text:p text:style-name="P4"><text:tab/>Prog1: 90090</text:p>
            <text:p text:style-name="P4"><text:tab/>Prog2: 84084</text:p>
          </table:table-cell>
        </table:table-row>
        <table:table-row table:style-name="msdscriptComparisons.13">
          <table:table-cell table:style-name="msdscriptComparisons.A1" office:value-type="string">
            <text:p text:style-name="P4"/>
          </table:table-cell>
          <table:table-cell table:style-name="msdscriptComparisons.A1" office:value-type="string">
            <text:p text:style-name="P4">Mismatch for input: 66+_let x=10_in x*_let wvfig=13_in wvfig*_let x=87_in x*x*76</text:p>
            <text:p text:style-name="P4"><text:tab/>Prog1: 988066</text:p>
            <text:p text:style-name="P4"><text:tab/>Prog2: 74781786</text:p>
          </table:table-cell>
        </table:table-row>
        <table:table-row table:style-name="msdscriptComparisons.13">
          <table:table-cell table:style-name="msdscriptComparisons.A1" office:value-type="string">
            <text:p text:style-name="P4">Msdscript7</text:p>
          </table:table-cell>
          <table:table-cell table:style-name="msdscriptComparisons.A1" office:value-type="string">
            <text:p text:style-name="P4">Nested _let mismatch. <text:span text:style-name="T3">One or both are wrong. Will update next msdscript phase.</text:span></text:p>
          </table:table-cell>
        </table:table-row>
        <table:table-row table:style-name="msdscriptComparisons.13">
          <table:table-cell table:style-name="msdscriptComparisons.A1" office:value-type="string">
            <text:p text:style-name="P4"/>
          </table:table-cell>
          <table:table-cell table:style-name="msdscriptComparisons.A1" office:value-type="string">
            <text:p text:style-name="P4">Mismatch for input: _let x=60_in x+_let x=29_in x+_let y=33_in y+y+_let x=90_in x+_let gvu=52_in gvu*66+_let y=12_in y*55</text:p>
            <text:p text:style-name="P4"><text:tab/>Prog1: 5493</text:p>
            <text:p text:style-name="P4"><text:tab/>Prog2: 4337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2:05:55.649561000</meta:creation-date>
    <dc:date>2026-02-24T12:21:11.407261000</dc:date>
    <meta:editing-duration>PT15M13S</meta:editing-duration>
    <meta:editing-cycles>5</meta:editing-cycles>
    <meta:generator>LibreOffice/25.8.2.2$MacOSX_AARCH64 LibreOffice_project/d401f2107ccab8f924a8e2df40f573aab7605b6f</meta:generator>
    <meta:document-statistic meta:table-count="1" meta:image-count="0" meta:object-count="0" meta:page-count="1" meta:paragraph-count="46" meta:word-count="225" meta:character-count="1573" meta:non-whitespace-character-count="1373"/>
  </office:meta>
</office:document-meta>
</file>