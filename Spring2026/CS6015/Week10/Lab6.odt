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f0c2a" officeooo:paragraph-rsid="000f0c2a" style:font-weight-asian="bold" style:font-weight-complex="bold"/>
    </style:style>
    <style:style style:name="P2" style:family="paragraph" style:parent-style-name="Standard">
      <style:text-properties officeooo:rsid="000e2e9d" officeooo:paragraph-rsid="000e2e9d"/>
    </style:style>
    <style:style style:name="P3" style:family="paragraph" style:parent-style-name="Standard">
      <style:text-properties fo:font-style="italic" officeooo:rsid="000fd832" officeooo:paragraph-rsid="000fd832" style:font-style-asian="italic" style:font-style-complex="italic"/>
    </style:style>
    <style:style style:name="P4" style:family="paragraph" style:parent-style-name="Standard">
      <style:text-properties officeooo:rsid="000e2e9d" officeooo:paragraph-rsid="000fd832"/>
    </style:style>
    <style:style style:name="P5" style:family="paragraph" style:parent-style-name="Standard">
      <style:text-properties officeooo:rsid="000fd832" officeooo:paragraph-rsid="000fd832"/>
    </style:style>
    <style:style style:name="P6" style:family="paragraph" style:parent-style-name="Standard">
      <style:text-properties fo:font-weight="bold" officeooo:rsid="000e2e9d" officeooo:paragraph-rsid="000feadc" style:font-weight-asian="bold" style:font-weight-complex="bold"/>
    </style:style>
    <style:style style:name="P7" style:family="paragraph" style:parent-style-name="Standard">
      <style:text-properties officeooo:rsid="000e2e9d" officeooo:paragraph-rsid="000feadc"/>
    </style:style>
    <style:style style:name="P8" style:family="paragraph" style:parent-style-name="Standard">
      <style:text-properties officeooo:rsid="000e83d4" officeooo:paragraph-rsid="000feadc"/>
    </style:style>
    <style:style style:name="P9" style:family="paragraph" style:parent-style-name="Standard">
      <style:text-properties officeooo:rsid="000e83d4" officeooo:paragraph-rsid="000e83d4"/>
    </style:style>
    <style:style style:name="P10" style:family="paragraph" style:parent-style-name="Standard">
      <style:text-properties fo:font-weight="bold" officeooo:rsid="000feadc" officeooo:paragraph-rsid="000feadc" style:font-weight-asian="bold" style:font-weight-complex="bold"/>
    </style:style>
    <style:style style:name="P11" style:family="paragraph" style:parent-style-name="Standard">
      <style:text-properties fo:font-weight="normal" officeooo:rsid="00102307" officeooo:paragraph-rsid="00102307" style:font-weight-asian="normal" style:font-weight-complex="normal"/>
    </style:style>
    <style:style style:name="P12" style:family="paragraph" style:parent-style-name="Standard">
      <style:text-properties fo:font-style="normal" fo:font-weight="normal" officeooo:rsid="00102307" officeooo:paragraph-rsid="00102307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fo:font-style="normal" fo:font-weight="bold" officeooo:rsid="00102307" officeooo:paragraph-rsid="00102307" style:font-style-asian="normal" style:font-weight-asian="bold" style:font-style-complex="normal" style:font-weight-complex="bold"/>
    </style:style>
    <style:style style:name="P14" style:family="paragraph" style:parent-style-name="Standard">
      <style:text-properties fo:font-style="normal" fo:font-weight="normal" officeooo:rsid="00111cf6" officeooo:paragraph-rsid="00111cf6" style:font-style-asian="normal" style:font-weight-asian="normal" style:font-style-complex="normal" style:font-weight-complex="normal"/>
    </style:style>
    <style:style style:name="T1" style:family="text">
      <style:text-properties officeooo:rsid="000fead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e83d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on Pulsipher – CS6015 – Lab 6 – 3/19/26</text:p>
      <text:p text:style-name="P2"/>
      <text:p text:style-name="P3">Profiler Logs <text:span text:style-name="T1">included in zip file. Has file01/file02 compare, file1/file2, O1-O3 optimization, and macro testing.</text:span></text:p>
      <text:p text:style-name="P2"/>
      <text:p text:style-name="P4"><text:span text:style-name="T2">Q1:</text:span> </text:p>
      <text:p text:style-name="P5">For the file01/file02 comparison it looks like it ran slower than the resolution of the graph (every field was less then 0.005 seconds or milliseconds). Most calls occurred in these top functions</text:p>
      <text:p text:style-name="P2">- __gnu_cxx::__enable_if&lt;std::__is_char&lt;char&gt;::__value, bool&gt;::__type std::operator==&lt;char&gt;(std::__cxx11::basic_string&lt;char, std::char_traits&lt;char&gt;, std::allocator&lt;char&gt; &gt; const&amp;, std::__cxx11::basic_string&lt;char, std::char_traits&lt;char&gt;, std::allocator&lt;char&gt; &gt; const&amp;)</text:p>
      <text:p text:style-name="P2">- bool std::operator!=&lt;char, std::char_traits&lt;char&gt;, std::allocator&lt;char&gt; &gt;(std::__cxx11::basic_string&lt;char, std::char_traits&lt;char&gt;, std::allocator&lt;char&gt; &gt; const&amp;, std::__cxx11::basic_string&lt;char, std::char_traits&lt;char&gt;, std::allocator&lt;char&gt; &gt; const&amp;)</text:p>
      <text:p text:style-name="P5">With other functions having progressively lower numbers of calls..</text:p>
      <text:p text:style-name="P2"/>
      <text:p text:style-name="P2"><text:span text:style-name="T2">Q2:</text:span> </text:p>
      <text:p text:style-name="P5">For the file1/file2 comparison it took long enough to run that we are able to see different time results. The program took 3.18 seconds to finish, and 3 functions took long enough to run per execution that we recorded non-zero times for them. First was sort1 which ran twice for 0.23s each. Next was “_GLOBAL__sub_I__Z7search1PNSt7__cxx1112basic_stringIcSt11char_traitsIcESaIcEEEiS4_” which ran once for 0.03 seconds. Finally, find_print_add_records ran 1.16 seconds.</text:p>
      <text:p text:style-name="P2"/>
      <text:p text:style-name="P6">Q3: </text:p>
      <text:p text:style-name="P7">35.42% of time spent in __gnu_cxx::__enable_if&lt;std::__is_char&lt;char&gt;::__value, bool&gt;::__type std::operator==&lt;char&gt;(std::__cxx11::basic_string&lt;char, std::char_traits&lt;char&gt;, std::allocator&lt;char&gt; &gt; const&amp;, std::__cxx11::basic_string&lt;char, std::char_traits&lt;char&gt;, std::allocator&lt;char&gt; &gt; const&amp;)</text:p>
      <text:p text:style-name="P2"/>
      <text:p text:style-name="P6">Q4:</text:p>
      <text:p text:style-name="P7"><text:span text:style-name="T1">sort1 is the bottleneck because it has the highest self s/call at 0.23 ms (by an order of magnitude).</text:span></text:p>
      <text:p text:style-name="P2"/>
      <text:p text:style-name="P7"><text:span text:style-name="T2">Q5:</text:span> </text:p>
      <text:p text:style-name="P7">Both are reported as 0, so their values is &lt; 0.005 <text:span text:style-name="T3">s on average. </text:span><text:span text:style-name="T1">Self s/call is the milliseconds per call this function takes just within the function, while total s/call includes descendents.</text:span></text:p>
      <text:p text:style-name="P2"/>
      <text:p text:style-name="P8"><text:span text:style-name="T2">Q6:</text:span> </text:p>
      <text:p text:style-name="P8">find_print_and_add_records is 0s in self and 1.16s total per call for 2 calls. This means that <text:span text:style-name="T1">1.16s</text:span> is being spent in child functions.</text:p>
      <text:p text:style-name="P9"/>
      <text:p text:style-name="P10">Q7:</text:p>
      <text:p text:style-name="P8">find_print_and_add_records is the child function contributing the most to the parent function, <text:span text:style-name="T1">adding 2.23s to its runtime over 2 calls.</text:span></text:p>
      <text:p text:style-name="P8"/>
      <text:p text:style-name="P10">Q8:</text:p>
      <text:p text:style-name="P11">O1 – runtime reduced to 1.65s</text:p>
      <text:p text:style-name="P12">O2 – runtime reduced to 1.62s</text:p>
      <text:p text:style-name="P12">O3 – runtime reduced to 1.14s</text:p>
      <text:p text:style-name="P12"/>
      <text:p text:style-name="P13">Q9:</text:p>
      <text:p text:style-name="P12"><text:soft-page-break/>The time spent in each function did not significantly change. Sort1 reliably takes ~68% and search` reliably takes ~38%.</text:p>
      <text:p text:style-name="P12"/>
      <text:p text:style-name="P13">Q10:</text:p>
      <text:p text:style-name="P12">O3 was the fastest.</text:p>
      <text:p text:style-name="P12"/>
      <text:p text:style-name="P13">Q11:</text:p>
      <text:p text:style-name="P12">see zipped reports.</text:p>
      <text:p text:style-name="P12"/>
      <text:p text:style-name="P13">Q12:</text:p>
      <text:p text:style-name="P12">search2 with O3 optimization terminates in 0.8s, compared to search1’s 1.14s. Search1 also took 10.80 micro-seconds per call, whereas search2 was fast enough that it didn’t register in that resolution. </text:p>
      <text:p text:style-name="P12"/>
      <text:p text:style-name="P12">Sort2 with O3 optimization terminates in 2.03s, compared to sort1’s 1.14s. The sort1 function took 0.8s, while the sort2 function took 1.64s.</text:p>
      <text:p text:style-name="P12"/>
      <text:p text:style-name="P12">Sort3 with O3 optimization terminates in 0.64s, with sort3 helper finishing in less time than the log had resolution to display (&lt; 0.005s). </text:p>
      <text:p text:style-name="P13"/>
      <text:p text:style-name="P13">Q13:</text:p>
      <text:p text:style-name="P14">Search2 speeds up search1 results by 42.5%.</text:p>
      <text:p text:style-name="P14">Sort3 speeds up Sort1 results by 78.1%.</text:p>
      <text:p text:style-name="P14">Sort2 slows down Sort1 results by 53.9%</text:p>
      <text:p text:style-name="P1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19T11:45:12.834455000</meta:creation-date>
    <dc:date>2026-03-20T09:00:33.435082000</dc:date>
    <meta:editing-duration>PT15H10M5S</meta:editing-duration>
    <meta:editing-cycles>3</meta:editing-cycles>
    <meta:generator>LibreOffice/25.8.2.2$MacOSX_AARCH64 LibreOffice_project/d401f2107ccab8f924a8e2df40f573aab7605b6f</meta:generator>
    <meta:print-date>2026-03-19T20:23:29.103586000</meta:print-date>
    <meta:printed-by>PDF files</meta:printed-by>
    <meta:document-statistic meta:table-count="0" meta:image-count="0" meta:object-count="0" meta:page-count="2" meta:paragraph-count="37" meta:word-count="418" meta:character-count="3150" meta:non-whitespace-character-count="2756"/>
  </office:meta>
</office:document-meta>
</file>