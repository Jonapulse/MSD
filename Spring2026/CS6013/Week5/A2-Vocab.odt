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fo:font-weight="bold" officeooo:rsid="001b4171" officeooo:paragraph-rsid="001b4171" style:font-weight-asian="bold" style:font-weight-complex="bold"/>
    </style:style>
    <style:style style:name="P2" style:family="paragraph" style:parent-style-name="Standard">
      <style:text-properties fo:font-weight="normal" officeooo:rsid="001b4171" officeooo:paragraph-rsid="001b4171" style:font-weight-asian="normal" style:font-weight-complex="normal"/>
    </style:style>
    <style:style style:name="P3" style:family="paragraph" style:parent-style-name="Standard">
      <style:text-properties officeooo:paragraph-rsid="001b4171"/>
    </style:style>
    <style:style style:name="P4" style:family="paragraph" style:parent-style-name="Standard">
      <style:text-properties officeooo:paragraph-rsid="00226546"/>
    </style:style>
    <style:style style:name="P5" style:family="paragraph" style:parent-style-name="Standard">
      <style:text-properties fo:font-variant="normal" fo:text-transform="none" fo:color="#181818" loext:opacity="100%" style:font-name="Merriweather" fo:font-size="10.5pt" fo:letter-spacing="normal" fo:font-style="normal" fo:font-weight="normal" officeooo:rsid="0025af71" officeooo:paragraph-rsid="0025af7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b4171"/>
    </style:style>
    <style:style style:name="T4" style:family="text">
      <style:text-properties officeooo:rsid="001d6739"/>
    </style:style>
    <style:style style:name="T5" style:family="text">
      <style:text-properties officeooo:rsid="00202922"/>
    </style:style>
    <style:style style:name="T6" style:family="text">
      <style:text-properties officeooo:rsid="0025af71"/>
    </style:style>
    <style:style style:name="T7" style:family="text">
      <style:text-properties officeooo:rsid="00226546"/>
    </style:style>
    <style:style style:name="T8" style:family="text">
      <style:text-properties officeooo:rsid="001d736e"/>
    </style:style>
    <style:style style:name="T9" style:family="text">
      <style:text-properties fo:font-variant="normal" fo:text-transform="none" fo:color="#181818" loext:opacity="100%" fo:letter-spacing="normal"/>
    </style:style>
    <style:style style:name="T10" style:family="text">
      <style:text-properties fo:font-variant="normal" fo:text-transform="none" fo:color="#181818" loext:opacity="100%" style:font-name="Merriweather" fo:font-size="10.5pt" fo:letter-spacing="normal" fo:font-style="normal" fo:font-weight="normal"/>
    </style:style>
    <style:style style:name="T11" style:family="text">
      <style:text-properties officeooo:rsid="001f1a3b"/>
    </style:style>
    <style:style style:name="T12" style:family="text">
      <style:text-properties officeooo:rsid="0024056c"/>
    </style:style>
    <style:style style:name="T13" style:family="text">
      <style:text-properties officeooo:rsid="0026d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2 – Reading Vocabulary<text:span text:style-name="T1"> – 6015, Jon Pulsipher</text:span></text:p>
      <text:p text:style-name="P2"/>
      <text:p text:style-name="Standard"><text:span text:style-name="T2">Hz</text:span> – <text:span text:style-name="T3">A unit describing cycles per second, in Computer Science often used to describe </text:span><text:span text:style-name="T4">how</text:span><text:span text:style-name="T3"> many instructions a processor can execute </text:span><text:span text:style-name="T4">per second</text:span><text:span text:style-name="T3">.</text:span></text:p>
      <text:p text:style-name="Standard"/>
      <text:p text:style-name="Standard"><text:span text:style-name="T2">Kilo-, Mega-, Giga-, Tera- (byte, Hz, etc) </text:span>– <text:span text:style-name="T3">One thousand, one million, one billion, one quadrillion. 10 ^ 3 * (1, 2, 3, 4…)</text:span></text:p>
      <text:p text:style-name="Standard"/>
      <text:p text:style-name="P3"><text:span text:style-name="T2">elf (in terms of Unix programs)</text:span> – <text:span text:style-name="T5">Executable Linkable Format – </text:span><text:span text:style-name="T6">a system used when assembly assembly code. </text:span></text:p>
      <text:p text:style-name="P3"><text:s/></text:p>
      <text:p text:style-name="Standard"><text:span text:style-name="T2">Thrashing</text:span> – <text:span text:style-name="T7">a state where RAM has been allocated in a problematic way where it needs to constantly open and page in info in a way that slows or stops processing.</text:span></text:p>
      <text:p text:style-name="Standard"/>
      <text:p text:style-name="Standard"><text:span text:style-name="T2">Virtual</text:span> – <text:span text:style-name="T8">a helpful illusion in software where an interface or model is provided that appears to be access to a physical resource, but the details of how that physical resource are hidden by the provider of the virtualization. For example, the OS will provide a virtual picture of where addresses are assigned to a program that may not align with where that memory is physically.</text:span></text:p>
      <text:p text:style-name="Standard"/>
      <text:p text:style-name="Standard"><text:span text:style-name="T2">Memory</text:span> – <text:span text:style-name="T8">a place on hardware where a 0 or 1 is stored. </text:span></text:p>
      <text:p text:style-name="Standard"/>
      <text:p text:style-name="Standard"><text:span text:style-name="T2">Address Space</text:span> – <text:span text:style-name="T4">The memory space used when running a process with the Stack growing down from highest indices, the code at the </text:span><text:span text:style-name="T8">lowest index</text:span><text:span text:style-name="T4">, the BSS above that, and the Heap in some arbitrary place in the middle. </text:span><text:span text:style-name="T8">This is a virtual place assigned by the OS corresponding to some space in real memory.</text:span></text:p>
      <text:p text:style-name="Standard"/>
      <text:p text:style-name="P4"><text:span text:style-name="T2">Address</text:span> – <text:span text:style-name="T7">The number that corresponds to a virtual or physical location in memory.</text:span></text:p>
      <text:p text:style-name="Standard"/>
      <text:p text:style-name="Standard"><text:span text:style-name="T2">Machine</text:span> – <text:span text:style-name="T9">“</text:span><text:span text:style-name="T10">Machine men, with machine minds and machine hearts! You are not machines, you are not cattle, you are men! You have the love of humanity in your hearts. You don’t hate: only the unloved hate, the unloved and the unnatural. Soldiers, don’t fight for slavery, fight for liberty! You the people have the power, the power to create machines, the power to create happiness! You the people have the power to make this life free and beautiful, to make this life a wonderful adventure! Then, in the name of democracy, let us use that power. Let us all unite! Let us fight for a new world, a decent world . . .”</text:span></text:p>
      <text:p text:style-name="P5">Computer is machine? I’m not sure what the class-specific definition of machine would be.</text:p>
      <text:p text:style-name="Standard"/>
      <text:p text:style-name="Standard"><text:span text:style-name="T2">Time Sharing –</text:span> <text:span text:style-name="T11">To virtualize the processor so that multiple programs can seem to run at once, the OS will “Time Share”, switching between programs to give them dedicated processor time.</text:span></text:p>
      <text:p text:style-name="Standard"/>
      <text:p text:style-name="Standard"><text:span text:style-name="T2">Digital (Discrete) vs Analog</text:span> – <text:span text:style-name="T7">In input, discrete values correspond to a single number whereas an analog input has a level of imprecision. A concerete example is a digital clock that displays numbers compared to an analogue clock where the hands have a number they’re closest to but never exactly on.</text:span></text:p>
      <text:p text:style-name="Standard"/>
      <text:p text:style-name="Standard"><text:span text:style-name="T2">Kernel vs OS</text:span> – <text:span text:style-name="T7">The OS is the main manager of a computer and, as part of what it does, it talks to the Kernel which governs interaction with the hardware.</text:span></text:p>
      <text:p text:style-name="Standard"/>
      <text:p text:style-name="Standard"><text:span text:style-name="T2">Von Neumann</text:span> – <text:span text:style-name="T7">The Von Neumann </text:span><text:span text:style-name="T12">model of computing – a processor fetches instructions, decodes them, and executes them.</text:span></text:p>
      <text:p text:style-name="Standard"/>
      <text:p text:style-name="Standard"><text:soft-page-break/><text:span text:style-name="T2">Integrated Circuit (IC) –</text:span> <text:span text:style-name="T6">Processors are made of these, composed of the tiniest circuits we can make that perform operations Electrical Engineers might be able to explain.</text:span></text:p>
      <text:p text:style-name="Standard"/>
      <text:p text:style-name="Standard"><text:span text:style-name="T2">State Machine (FSA)</text:span> – <text:span text:style-name="T6">A “Finite State Machine” is a computation model that conceptualizes a computer as a machine that can be in one of a finite number of states at any point in time and will move from state to state based on inputs. </text:span></text:p>
      <text:p text:style-name="Standard"/>
      <text:p text:style-name="Standard"><text:span text:style-name="T2">Hardware (or program) privilege level</text:span> – <text:span text:style-name="T12">We principally concern ourselves with the user privilege level (3) and the kernel privilege level (0).</text:span></text:p>
      <text:p text:style-name="Standard"/>
      <text:p text:style-name="Standard"><text:span text:style-name="T2">Context Switch</text:span> – <text:span text:style-name="T6">When the processor switches to another process, it will save needed data so that it can store it when switching back, and load any data that had been saved fo the context it is switching to.</text:span></text:p>
      <text:p text:style-name="Standard"/>
      <text:p text:style-name="Standard"><text:span text:style-name="T2">Lazy loading (of program, of memory, etc)</text:span> – <text:span text:style-name="T11">a technique where only the part of the program that will be used is loaded. Used in web pages, on mobile devices to save power, and elsewhere.</text:span></text:p>
      <text:p text:style-name="Standard"/>
      <text:p text:style-name="Standard"><text:span text:style-name="T2">PID - Process ID</text:span> – <text:span text:style-name="T11">a distinct number assigned to every process.</text:span></text:p>
      <text:p text:style-name="Standard"/>
      <text:p text:style-name="Standard"><text:span text:style-name="T2">DMA - direct memory access</text:span> – <text:span text:style-name="T6">a feature that allows certain hardware subsystems to access memory without going through the CPU.</text:span></text:p>
      <text:p text:style-name="Standard"/>
      <text:p text:style-name="Standard"><text:span text:style-name="T2">MMU / TLB –</text:span> <text:span text:style-name="T11">Memory Management Unit. It translates virtual addresses into physical addresses.</text:span></text:p>
      <text:p text:style-name="Standard"/>
      <text:p text:style-name="Standard"><text:span text:style-name="T2">Daemon –</text:span> <text:span text:style-name="T11">a process that runs in the background, waiting to react to something. The sshd (ssh daemon) waits for ssh connections. </text:span></text:p>
      <text:p text:style-name="Standard"/>
      <text:p text:style-name="Standard"><text:span text:style-name="T2">Symbol (with respect to Code, object files, assembly)</text:span> – <text:span text:style-name="T13">symbols are metadata that contain information about functions and global data, often a name, address, and filesize. Linkers use these to put together together a program.</text:span></text:p>
      <text:p text:style-name="Standard"/>
      <text:p text:style-name="Standard"><text:span text:style-name="T2">Shared Library</text:span> – <text:span text:style-name="T11">libraries of code that multiple processes may use, but for efficiency they will be loaded into one memory space that associated processes have access 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0:56:30.892086000</meta:creation-date>
    <dc:date>2026-01-30T11:14:32.497863000</dc:date>
    <meta:editing-duration>PT21H12M48S</meta:editing-duration>
    <meta:editing-cycles>3</meta:editing-cycles>
    <meta:generator>LibreOffice/25.8.2.2$MacOSX_AARCH64 LibreOffice_project/d401f2107ccab8f924a8e2df40f573aab7605b6f</meta:generator>
    <meta:document-statistic meta:table-count="0" meta:image-count="0" meta:object-count="0" meta:page-count="2" meta:paragraph-count="27" meta:word-count="785" meta:character-count="4595" meta:non-whitespace-character-count="3803"/>
  </office:meta>
</office:document-meta>
</file>