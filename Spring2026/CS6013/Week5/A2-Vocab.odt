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4171" officeooo:paragraph-rsid="001b4171" style:font-weight-asian="bold" style:font-weight-complex="bold"/>
    </style:style>
    <style:style style:name="P2" style:family="paragraph" style:parent-style-name="Standard">
      <style:text-properties fo:font-weight="normal" officeooo:rsid="001b4171" officeooo:paragraph-rsid="001b4171" style:font-weight-asian="normal" style:font-weight-complex="normal"/>
    </style:style>
    <style:style style:name="P3" style:family="paragraph" style:parent-style-name="Standard">
      <style:text-properties officeooo:paragraph-rsid="001b41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4171"/>
    </style:style>
    <style:style style:name="T4" style:family="text">
      <style:text-properties officeooo:rsid="001d6739"/>
    </style:style>
    <style:style style:name="T5" style:family="text">
      <style:text-properties officeooo:rsid="00202922"/>
    </style:style>
    <style:style style:name="T6" style:family="text">
      <style:text-properties officeooo:rsid="001d736e"/>
    </style:style>
    <style:style style:name="T7" style:family="text">
      <style:text-properties officeooo:rsid="001f1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2 – Reading Vocabulary<text:span text:style-name="T1"> – 6015, Jon Pulsipher</text:span></text:p>
      <text:p text:style-name="P2"/>
      <text:p text:style-name="Standard"><text:span text:style-name="T2">Hz</text:span> – <text:span text:style-name="T3">A unit describing cycles per second, in Computer Science often used to describe </text:span><text:span text:style-name="T4">how</text:span><text:span text:style-name="T3"> many instructions a processor can execute </text:span><text:span text:style-name="T4">per second</text:span><text:span text:style-name="T3">.</text:span></text:p>
      <text:p text:style-name="Standard"/>
      <text:p text:style-name="Standard"><text:span text:style-name="T2">Kilo-, Mega-, Giga-, Tera- (byte, Hz, etc) </text:span>– <text:span text:style-name="T3">One thousand, one million, one billion, one quadrillion. 10 ^ 3 * (1, 2, 3, 4…)</text:span></text:p>
      <text:p text:style-name="Standard"/>
      <text:p text:style-name="P3"><text:span text:style-name="T2">elf (in terms of Unix programs)</text:span> – <text:span text:style-name="T5">Executable Linkable Format - </text:span></text:p>
      <text:p text:style-name="P3"><text:s/></text:p>
      <text:p text:style-name="Standard"><text:span text:style-name="T2">Thrashing</text:span> - </text:p>
      <text:p text:style-name="Standard"/>
      <text:p text:style-name="Standard"><text:span text:style-name="T2">Virtual</text:span> – <text:span text:style-name="T6">a helpful illusion in software where an interface or model is provided that appears to be access to a physical resource, but the details of how that physical resource are hidden by the provider of the virtualization. For example, the OS will provide a virtual picture of where addresses are assigned to a program that may not align with where that memory is physically.</text:span></text:p>
      <text:p text:style-name="Standard"/>
      <text:p text:style-name="Standard"><text:span text:style-name="T2">Memory</text:span> – <text:span text:style-name="T6">a place on hardware where a 0 or 1 is stored. </text:span></text:p>
      <text:p text:style-name="Standard"/>
      <text:p text:style-name="Standard"><text:span text:style-name="T2">Address </text:span><text:span text:style-name="T2">Space</text:span> – <text:span text:style-name="T4">The memory space used when running a process with the Stack growing down from highest indices, the code at the </text:span><text:span text:style-name="T6">lowest index</text:span><text:span text:style-name="T4">, the BSS above that, and the Heap in some arbitrary place in the middle. </text:span><text:span text:style-name="T6">This is a virtual place assigned by the OS corresponding to some space in real memory.</text:span></text:p>
      <text:p text:style-name="Standard"/>
      <text:p text:style-name="Standard"><text:span text:style-name="T2">Address</text:span> - </text:p>
      <text:p text:style-name="Standard"/>
      <text:p text:style-name="Standard"><text:span text:style-name="T2">Machine</text:span> – <text:span text:style-name="T7">Wut?</text:span></text:p>
      <text:p text:style-name="Standard"/>
      <text:p text:style-name="Standard"><text:span text:style-name="T2">Time Sharing –</text:span> <text:span text:style-name="T7">To virtualize the processor so that multiple programs can seem to run at once, the OS will “Time Share”, switching between programs to give them dedicated processor time.</text:span></text:p>
      <text:p text:style-name="Standard"/>
      <text:p text:style-name="Standard"><text:span text:style-name="T2">Digital (Discrete) vs Analog</text:span> - </text:p>
      <text:p text:style-name="Standard"/>
      <text:p text:style-name="Standard"><text:span text:style-name="T2">Kernel vs OS</text:span> - </text:p>
      <text:p text:style-name="Standard"/>
      <text:p text:style-name="Standard"><text:span text:style-name="T2">Von Neumann</text:span> - </text:p>
      <text:p text:style-name="Standard"/>
      <text:p text:style-name="Standard"><text:span text:style-name="T2">Integrated Circuit (IC) </text:span>- </text:p>
      <text:p text:style-name="Standard"/>
      <text:p text:style-name="Standard"><text:span text:style-name="T2">State Machine (FSA)</text:span> - </text:p>
      <text:p text:style-name="Standard"/>
      <text:p text:style-name="Standard"><text:span text:style-name="T2">Hardware (or program) privilege level</text:span> - </text:p>
      <text:p text:style-name="Standard"/>
      <text:p text:style-name="Standard"><text:span text:style-name="T2">Context Switch</text:span> – <text:span text:style-name="T7">A context switch is when, often in code when maing </text:span></text:p>
      <text:p text:style-name="Standard"/>
      <text:p text:style-name="Standard"><text:span text:style-name="T2">Lazy loading (of program, of memory, etc)</text:span> – <text:span text:style-name="T7">a technique where only the part of the program that will be used is loaded. Used in web pages, on mobile devices to save power, and elsewhere.</text:span></text:p>
      <text:p text:style-name="Standard"/>
      <text:p text:style-name="Standard"><text:span text:style-name="T2">PID - Process ID</text:span> – <text:span text:style-name="T7">a distinct number assigned to every process.</text:span></text:p>
      <text:p text:style-name="Standard"/>
      <text:p text:style-name="Standard"><text:soft-page-break/><text:span text:style-name="T2">DMA - direct memory access</text:span> - </text:p>
      <text:p text:style-name="Standard"/>
      <text:p text:style-name="Standard"><text:span text:style-name="T2">MMU / TLB –</text:span> <text:span text:style-name="T7">Memory Management Unit. It translates virtual addresses into physical addresses.</text:span></text:p>
      <text:p text:style-name="Standard"/>
      <text:p text:style-name="Standard"><text:span text:style-name="T2">Daemon –</text:span> <text:span text:style-name="T7">a process that runs in the background, waiting to react to something. The sshd (ssh daemon) waits for ssh connections. </text:span></text:p>
      <text:p text:style-name="Standard"/>
      <text:p text:style-name="Standard"><text:span text:style-name="T2">Symbol (with respect to Code, object files, assembly)</text:span> - </text:p>
      <text:p text:style-name="Standard"/>
      <text:p text:style-name="Standard"><text:span text:style-name="T2">Shared Library</text:span> – <text:span text:style-name="T7">libraries of code that multiple processes may use, but for efficiency they will be loaded into one memory space that associated processes have access t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0:56:30.892086000</meta:creation-date>
    <dc:date>2026-01-27T09:30:07.994763000</dc:date>
    <meta:editing-duration>PT21H10M38S</meta:editing-duration>
    <meta:editing-cycles>2</meta:editing-cycles>
    <meta:generator>LibreOffice/25.8.2.2$MacOSX_AARCH64 LibreOffice_project/d401f2107ccab8f924a8e2df40f573aab7605b6f</meta:generator>
    <meta:document-statistic meta:table-count="0" meta:image-count="0" meta:object-count="0" meta:page-count="2" meta:paragraph-count="26" meta:word-count="388" meta:character-count="2269" meta:non-whitespace-character-count="1875"/>
  </office:meta>
</office:document-meta>
</file>