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officeooo:rsid="00061520" officeooo:paragraph-rsid="0015272b" style:font-weight-asian="bold" style:font-weight-complex="bold"/>
    </style:style>
    <style:style style:name="P2" style:family="paragraph" style:parent-style-name="Standard">
      <style:text-properties fo:font-weight="normal" officeooo:rsid="00061520" officeooo:paragraph-rsid="0015272b" style:font-weight-asian="normal" style:font-weight-complex="normal"/>
    </style:style>
    <style:style style:name="P3" style:family="paragraph" style:parent-style-name="Standard">
      <style:text-properties fo:font-weight="bold" officeooo:rsid="0015272b" officeooo:paragraph-rsid="0015272b" style:font-weight-asian="bold" style:font-weight-complex="bold"/>
    </style:style>
    <style:style style:name="P4" style:family="paragraph" style:parent-style-name="Standard">
      <style:text-properties fo:font-style="italic" fo:font-weight="normal" officeooo:rsid="0015272b" officeooo:paragraph-rsid="0015272b" style:font-style-asian="italic" style:font-weight-asian="normal" style:font-style-complex="italic" style:font-weight-complex="normal"/>
    </style:style>
    <style:style style:name="P5" style:family="paragraph" style:parent-style-name="Standard">
      <style:text-properties fo:font-weight="normal" officeooo:rsid="0015272b" officeooo:paragraph-rsid="0015272b" style:font-weight-asian="normal" style:font-weight-complex="normal"/>
    </style:style>
    <style:style style:name="P6" style:family="paragraph" style:parent-style-name="Standard">
      <style:text-properties fo:font-weight="normal" officeooo:rsid="00189b53" officeooo:paragraph-rsid="00189b53" style:font-weight-asian="normal" style:font-weight-complex="normal"/>
    </style:style>
    <style:style style:name="P7" style:family="paragraph" style:parent-style-name="Standard">
      <style:text-properties fo:font-weight="bold" officeooo:rsid="00189b53" officeooo:paragraph-rsid="00189b53" style:font-weight-asian="bold" style:font-weight-complex="bold"/>
    </style:style>
    <style:style style:name="P8" style:family="paragraph" style:parent-style-name="Standard">
      <style:text-properties fo:font-style="italic" fo:font-weight="normal" officeooo:rsid="00189b53" officeooo:paragraph-rsid="00189b53" style:font-style-asian="italic" style:font-weight-asian="normal" style:font-style-complex="italic" style:font-weight-complex="normal"/>
    </style:style>
    <style:style style:name="P9" style:family="paragraph" style:parent-style-name="Standard">
      <style:text-properties fo:font-weight="normal" officeooo:rsid="00196a75" officeooo:paragraph-rsid="00196a75" style:font-weight-asian="normal" style:font-weight-complex="normal"/>
    </style:style>
    <style:style style:name="P10" style:family="paragraph" style:parent-style-name="Standard">
      <style:text-properties fo:font-weight="bold" officeooo:rsid="00196a75" officeooo:paragraph-rsid="00196a75" style:font-weight-asian="bold" style:font-weight-complex="bold"/>
    </style:style>
    <style:style style:name="P11" style:family="paragraph" style:parent-style-name="Standard">
      <style:text-properties fo:font-style="italic" fo:font-weight="normal" officeooo:rsid="001d3d30" officeooo:paragraph-rsid="001d3d30" style:font-style-asian="italic" style:font-weight-asian="normal" style:font-style-complex="italic" style:font-weight-complex="normal"/>
    </style:style>
    <style:style style:name="P12" style:family="paragraph" style:parent-style-name="Standard">
      <style:text-properties fo:font-style="normal" fo:font-weight="normal" officeooo:rsid="001dfcec" officeooo:paragraph-rsid="001dfcec" style:font-style-asian="normal" style:font-weight-asian="normal" style:font-style-complex="normal" style:font-weight-complex="normal"/>
    </style:style>
    <style:style style:name="P13" style:family="paragraph" style:parent-style-name="Standard">
      <style:text-properties fo:font-style="italic" fo:font-weight="normal" officeooo:rsid="001dfcec" officeooo:paragraph-rsid="001dfcec" style:font-style-asian="italic" style:font-weight-asian="normal" style:font-style-complex="italic" style:font-weight-complex="normal"/>
    </style:style>
    <style:style style:name="T1" style:family="text">
      <style:text-properties officeooo:rsid="0015272b"/>
    </style:style>
    <style:style style:name="T2" style:family="text">
      <style:text-properties fo:font-weight="normal" style:font-weight-asian="normal" style:font-weight-complex="normal"/>
    </style:style>
    <style:style style:name="T3" style:family="text">
      <style:text-properties fo:font-weight="normal" officeooo:rsid="000230db" style:font-weight-asian="normal" style:font-weight-complex="normal"/>
    </style:style>
    <style:style style:name="T4" style:family="text">
      <style:text-properties fo:font-weight="normal" officeooo:rsid="0015272b" style:font-weight-asian="normal" style:font-weight-complex="normal"/>
    </style:style>
    <style:style style:name="T5" style:family="text">
      <style:text-properties fo:font-style="normal" style:font-style-asian="normal" style:font-style-complex="normal"/>
    </style:style>
    <style:style style:name="T6" style:family="text">
      <style:text-properties officeooo:rsid="001d3d30"/>
    </style:style>
    <style:style style:name="T7" style:family="text">
      <style:text-properties officeooo:rsid="001dfc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6014 – Jon Pulsipher – <text:span text:style-name="T1">Cryptography </text:span><text:span text:style-name="T2">– </text:span><text:span text:style-name="T3">2</text:span><text:span text:style-name="T2">/</text:span><text:span text:style-name="T4">24</text:span><text:span text:style-name="T2">/26</text:span></text:p>
      <text:p text:style-name="P2"/>
      <text:p text:style-name="P3">Question 1:<text:span text:style-name="T2"> </text:span></text:p>
      <text:p text:style-name="P4">A block cipher with an 8-bit block size is very easy to break with a known-plaintext attack, assuming each block is just encrypted independently with the same key. Describe how you would do so.</text:p>
      <text:p text:style-name="P5"/>
      <text:p text:style-name="P6">8 bits is the size of a char, so this block cipher has 50 or so common inputs that we can map to outputs by writing in the alphabet in lower and upper case. That table can be used to decrypt ciphered messages.</text:p>
      <text:p text:style-name="P5"/>
      <text:p text:style-name="P7">Question 2:</text:p>
      <text:p text:style-name="P8">Consequences of re-using keys in a block cipher<text:span text:style-name="T5">.</text:span></text:p>
      <text:p text:style-name="P5"/>
      <text:p text:style-name="P6">A) <text:span text:style-name="T6">The danger of key re-use is that when you do A xor K <text:s/>= Ak and B xor K = Bk, Ak xor Bk = A xor B. A sophisticated attacker can take advantage of this information. </text:span></text:p>
      <text:p text:style-name="P6"/>
      <text:p text:style-name="P6">B) <text:span text:style-name="T6">An attacker can use bit modification like xor on the ciphertext, and that modification will pass on to the decrypted text as if it were applied directly to the decrypted text. In the exercise below in Programming part 2 (and the cipher.py file I included) we can demonstrate how $1000 in a message can be flipped to $9999.</text:span></text:p>
      <text:p text:style-name="P6"/>
      <text:p text:style-name="P9">C) <text:span text:style-name="T6">Use different keys. Potentially we could use a stream cipher to generate keys in a predictable manner from a shared start between communicating parties.</text:span></text:p>
      <text:p text:style-name="P9"/>
      <text:p text:style-name="P10"><text:span text:style-name="T6">Programming parts 1 &amp; 2</text:span>:</text:p>
      <text:p text:style-name="P11">See cipher.py for code.</text:p>
      <text:p text:style-name="P11"/>
      <text:p text:style-name="P11">P<text:span text:style-name="T7">art </text:span>1 – what do you see when you modify 1 bit in a message <text:span text:style-name="T7">in the block cipher ciphertext?</text:span></text:p>
      <text:p text:style-name="P12">Characters after the modified bit are wrong.</text:p>
      <text:p text:style-name="P12"/>
      <text:p text:style-name="P13">Part 2 – What do you expect to see if you xor the two encrypted messages?</text:p>
      <text:p text:style-name="P12">The same thing you’d get xoring the decrypted messages. If one of those is all zeroes (see cipher.py) then you’ll get the other message deciphe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4T06:37:34.729559000</meta:creation-date>
    <dc:date>2026-02-25T19:25:45.600163000</dc:date>
    <meta:editing-duration>PT6H40M36S</meta:editing-duration>
    <meta:editing-cycles>2</meta:editing-cycles>
    <meta:generator>LibreOffice/25.8.2.2$MacOSX_AARCH64 LibreOffice_project/d401f2107ccab8f924a8e2df40f573aab7605b6f</meta:generator>
    <meta:document-statistic meta:table-count="0" meta:image-count="0" meta:object-count="0" meta:page-count="1" meta:paragraph-count="15" meta:word-count="291" meta:character-count="1568" meta:non-whitespace-character-count="1284"/>
  </office:meta>
</office:document-meta>
</file>