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061520" officeooo:paragraph-rsid="0015272b" style:font-weight-asian="bold" style:font-weight-complex="bold"/>
    </style:style>
    <style:style style:name="P2" style:family="paragraph" style:parent-style-name="Standard">
      <style:text-properties fo:font-weight="normal" officeooo:rsid="00061520" officeooo:paragraph-rsid="0015272b" style:font-weight-asian="normal" style:font-weight-complex="normal"/>
    </style:style>
    <style:style style:name="P3" style:family="paragraph" style:parent-style-name="Standard">
      <style:text-properties fo:font-weight="bold" officeooo:rsid="0015272b" officeooo:paragraph-rsid="0015272b" style:font-weight-asian="bold" style:font-weight-complex="bold"/>
    </style:style>
    <style:style style:name="P4" style:family="paragraph" style:parent-style-name="Standard">
      <style:text-properties fo:font-style="italic" fo:font-weight="normal" officeooo:rsid="0015272b" officeooo:paragraph-rsid="0015272b" style:font-style-asian="italic" style:font-weight-asian="normal" style:font-style-complex="italic" style:font-weight-complex="normal"/>
    </style:style>
    <style:style style:name="P5" style:family="paragraph" style:parent-style-name="Standard">
      <style:text-properties fo:font-weight="normal" officeooo:rsid="0015272b" officeooo:paragraph-rsid="0015272b" style:font-weight-asian="normal" style:font-weight-complex="normal"/>
    </style:style>
    <style:style style:name="P6" style:family="paragraph" style:parent-style-name="Standard">
      <style:text-properties fo:font-weight="normal" officeooo:rsid="00189b53" officeooo:paragraph-rsid="00189b53" style:font-weight-asian="normal" style:font-weight-complex="normal"/>
    </style:style>
    <style:style style:name="P7" style:family="paragraph" style:parent-style-name="Standard">
      <style:text-properties fo:font-weight="bold" officeooo:rsid="00189b53" officeooo:paragraph-rsid="00189b53" style:font-weight-asian="bold" style:font-weight-complex="bold"/>
    </style:style>
    <style:style style:name="P8" style:family="paragraph" style:parent-style-name="Standard">
      <style:text-properties fo:font-style="italic" fo:font-weight="normal" officeooo:rsid="00189b53" officeooo:paragraph-rsid="00189b53" style:font-style-asian="italic" style:font-weight-asian="normal" style:font-style-complex="italic" style:font-weight-complex="normal"/>
    </style:style>
    <style:style style:name="P9" style:family="paragraph" style:parent-style-name="Standard">
      <style:text-properties fo:font-weight="normal" officeooo:rsid="00196a75" officeooo:paragraph-rsid="00196a75" style:font-weight-asian="normal" style:font-weight-complex="normal"/>
    </style:style>
    <style:style style:name="P10" style:family="paragraph" style:parent-style-name="Standard">
      <style:text-properties fo:font-weight="bold" officeooo:rsid="00196a75" officeooo:paragraph-rsid="00196a75" style:font-weight-asian="bold" style:font-weight-complex="bold"/>
    </style:style>
    <style:style style:name="P11" style:family="paragraph" style:parent-style-name="Standard">
      <style:text-properties fo:font-style="normal" fo:font-weight="normal" officeooo:rsid="0015272b" officeooo:paragraph-rsid="0015272b" style:font-style-asian="normal" style:font-weight-asian="normal" style:font-style-complex="normal" style:font-weight-complex="normal"/>
    </style:style>
    <style:style style:name="P12" style:family="paragraph" style:parent-style-name="Standard">
      <style:text-properties fo:font-style="normal" fo:font-weight="normal" officeooo:rsid="0017833d" officeooo:paragraph-rsid="0015272b" style:font-style-asian="normal" style:font-weight-asian="normal" style:font-style-complex="normal" style:font-weight-complex="normal"/>
    </style:style>
    <style:style style:name="T1" style:family="text">
      <style:text-properties officeooo:rsid="0015272b"/>
    </style:style>
    <style:style style:name="T2" style:family="text">
      <style:text-properties fo:font-weight="normal" style:font-weight-asian="normal" style:font-weight-complex="normal"/>
    </style:style>
    <style:style style:name="T3" style:family="text">
      <style:text-properties fo:font-weight="normal" officeooo:rsid="000230db" style:font-weight-asian="normal" style:font-weight-complex="normal"/>
    </style:style>
    <style:style style:name="T4" style:family="text">
      <style:text-properties fo:font-weight="normal" officeooo:rsid="0015272b" style:font-weight-asian="normal" style:font-weight-complex="normal"/>
    </style:style>
    <style:style style:name="T5" style:family="text">
      <style:text-properties fo:font-style="normal" style:font-style-asian="normal" style:font-style-complex="normal"/>
    </style:style>
    <style:style style:name="T6" style:family="text">
      <style:text-properties officeooo:rsid="00196a75"/>
    </style:style>
    <style:style style:name="T7" style:family="text">
      <style:text-properties fo:font-style="italic" style:font-style-asian="italic" style:font-style-complex="italic"/>
    </style:style>
    <style:style style:name="T8" style:family="text">
      <style:text-properties officeooo:rsid="0015eb40"/>
    </style:style>
    <style:style style:name="T9" style:family="text">
      <style:text-properties style:text-position="super 58%" officeooo:rsid="0015eb40"/>
    </style:style>
    <style:style style:name="T10" style:family="text">
      <style:text-properties fo:font-style="italic" officeooo:rsid="0015eb40" style:font-style-asian="italic" style:font-style-complex="italic"/>
    </style:style>
    <style:style style:name="T11" style:family="text">
      <style:text-properties fo:font-weight="bold" officeooo:rsid="00189b53" style:font-weight-asian="bold" style:font-weight-complex="bold"/>
    </style:style>
    <style:style style:name="T12" style:family="text">
      <style:text-properties officeooo:rsid="001783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6014 – Jon Pulsipher – <text:span text:style-name="T1">Cryptography </text:span><text:span text:style-name="T2">– </text:span><text:span text:style-name="T3">2</text:span><text:span text:style-name="T2">/</text:span><text:span text:style-name="T4">24</text:span><text:span text:style-name="T2">/26</text:span></text:p>
      <text:p text:style-name="P2"/>
      <text:p text:style-name="P3">Question 1:<text:span text:style-name="T2"> </text:span></text:p>
      <text:p text:style-name="P4">A block cipher with an 8-bit block size is very easy to break with a known-plaintext attack, assuming each block is just encrypted independently with the same key. Describe how you would do so.</text:p>
      <text:p text:style-name="P5"/>
      <text:p text:style-name="P6">8 bits is the size of a char, so this block cipher has 50 or so common inputs that we can map to outputs by writing in the alphabet in lower and upper case. That table can be used to decrypt ciphered messages.</text:p>
      <text:p text:style-name="P7"/>
      <text:p text:style-name="P8">Check if this is true. I don’t know if it is. The ciphers are independent, right?</text:p>
      <text:p text:style-name="P5"/>
      <text:p text:style-name="P7">Question 2:</text:p>
      <text:p text:style-name="P8">Consequences of re-using keys in a block cipher<text:span text:style-name="T5">.</text:span></text:p>
      <text:p text:style-name="P5"/>
      <text:p text:style-name="P6">A) Xoring to get… the picture of the penguin? But that doesn’t quite make sense to me. What does that mean for structured data?</text:p>
      <text:p text:style-name="P6"/>
      <text:p text:style-name="P6">B) Bit-flipping to change values. <text:span text:style-name="T6">Xor it with 0.</text:span></text:p>
      <text:p text:style-name="P6"/>
      <text:p text:style-name="P9">C) Use different keys. How?</text:p>
      <text:p text:style-name="P9"/>
      <text:p text:style-name="P10">Question 3:</text:p>
      <text:p text:style-name="P9"/>
      <text:p text:style-name="P10">Question 4:</text:p>
      <text:p text:style-name="P9"/>
      <text:p text:style-name="P5"/>
      <text:p text:style-name="P4">Keep this for midterm notes</text:p>
      <text:p text:style-name="P4">Cryptography</text:p>
      <text:p text:style-name="P11">We combine substitution, diffusion, and chaining.</text:p>
      <text:p text:style-name="P11">- Substitution – swapping a char for another</text:p>
      <text:p text:style-name="P11">- Diffusion – moving chars around ( Also called permutation, one example is to write the texts into the rows of a table and then write out the columns. The ‘key’ for that is the number of columns.) <text:span text:style-name="T7">Just this + sub gives unreadable input EXCEPT that small changes have small, detectable effects.</text:span></text:p>
      <text:p text:style-name="P11">- Chaining – <text:span text:style-name="T8">this will make small changes have big effects. Why? Ah, each character affects the encrypted of the next character. So every character after the 1</text:span><text:span text:style-name="T9">st</text:span><text:span text:style-name="T8"> change will change the rest. </text:span><text:span text:style-name="T10">That exposes where the change happens – So run it twice.</text:span></text:p>
      <text:p text:style-name="P11">Used to achieve Confidentiality, Integrity, and Authenticity </text:p>
      <text:p text:style-name="P11">Stream Cipher – <text:span text:style-name="T8">1 take your stream of and xor it with a stream of pseudo-random data (keystream). Danger! If your key is re-used, two outputs can be xored to get your key. RC4 (a stream cipher) </text:span><text:span text:style-name="T11">wait is that true? The notes hinted at the problem of re-use but didn’t state it. Rude.</text:span></text:p>
      <text:p text:style-name="P11">- <text:span text:style-name="T12">Danger! Stream Cipher does not provide integrity! Bit-flipping attack can change 1000 –&gt; 9999.</text:span></text:p>
      <text:p text:style-name="P11">Block Cipher – <text:span text:style-name="T12">encrypts blocks making ciphertext same size as inputtext. AES, advanced encryption standard, is one of these. It goes through the steps for AES, subbing bytes from a 256-entry table, shifting rows, mixing columnes, then xoring with key, </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4T06:37:34.729559000</meta:creation-date>
    <dc:date>2026-02-24T14:09:37.287545000</dc:date>
    <meta:editing-duration>PT6H37M</meta:editing-duration>
    <meta:editing-cycles>1</meta:editing-cycles>
    <meta:document-statistic meta:table-count="0" meta:image-count="0" meta:object-count="0" meta:page-count="1" meta:paragraph-count="22" meta:word-count="379" meta:character-count="2188" meta:non-whitespace-character-count="1819"/>
    <meta:generator>LibreOffice/25.8.2.2$MacOSX_AARCH64 LibreOffice_project/d401f2107ccab8f924a8e2df40f573aab7605b6f</meta:generator>
  </office:meta>
</office:document-meta>
</file>