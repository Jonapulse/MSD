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1520" officeooo:paragraph-rsid="0015272b" style:font-weight-asian="bold" style:font-weight-complex="bold"/>
    </style:style>
    <style:style style:name="P2" style:family="paragraph" style:parent-style-name="Standard">
      <style:text-properties fo:font-weight="normal" officeooo:rsid="001ff199" officeooo:paragraph-rsid="0015272b" style:font-weight-asian="normal" style:font-weight-complex="normal"/>
    </style:style>
    <style:style style:name="P3" style:family="paragraph" style:parent-style-name="Standard">
      <style:text-properties fo:font-weight="normal" officeooo:rsid="0021be06" officeooo:paragraph-rsid="0021be06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23b386" officeooo:paragraph-rsid="0023b386" style:font-weight-asian="normal" style:font-weight-complex="normal"/>
    </style:style>
    <style:style style:name="P5" style:family="paragraph" style:parent-style-name="Standard" style:list-style-name="L1">
      <style:text-properties officeooo:paragraph-rsid="0021be06"/>
    </style:style>
    <style:style style:name="P6" style:family="paragraph" style:parent-style-name="Standard">
      <style:text-properties fo:font-weight="normal" officeooo:rsid="0023b386" officeooo:paragraph-rsid="0023b386" style:font-weight-asian="normal" style:font-weight-complex="normal"/>
    </style:style>
    <style:style style:name="P7" style:family="paragraph" style:parent-style-name="Standard">
      <style:text-properties fo:font-style="normal" fo:font-weight="normal" officeooo:rsid="00215642" officeooo:paragraph-rsid="0021be06" style:font-style-asian="normal" style:font-weight-asian="normal" style:font-style-complex="normal" style:font-weight-complex="normal"/>
    </style:style>
    <style:style style:name="T1" style:family="text">
      <style:text-properties officeooo:rsid="001ff199"/>
    </style:style>
    <style:style style:name="T2" style:family="text">
      <style:text-properties officeooo:rsid="0015272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f199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251e82"/>
    </style:style>
    <style:style style:name="T8" style:family="text">
      <style:text-properties fo:font-weight="normal" officeooo:rsid="00251e82" style:font-weight-asian="normal" style:font-weight-complex="normal"/>
    </style:style>
    <style:style style:name="T9" style:family="text">
      <style:text-properties fo:font-weight="normal" officeooo:rsid="0021be06" style:font-weight-asian="normal" style:font-weight-complex="normal"/>
    </style:style>
    <style:style style:name="T10" style:family="text">
      <style:text-properties fo:font-weight="normal" officeooo:rsid="0023b386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6014 – Jon Pulsipher – <text:span text:style-name="T1">TLSLite Check-in</text:span><text:span text:style-name="T2"> </text:span><text:span text:style-name="T3">– </text:span><text:span text:style-name="T4">3/16/26</text:span></text:p>
      <text:p text:style-name="P2"/>
      <text:p text:style-name="P3">At <text:span text:style-name="T5">run time,</text:span><text:span text:style-name="T6"> </text:span><text:span text:style-name="T6">TLSlite</text:span> client and server will need:</text:p>
      <text:list text:style-name="L1">
        <text:list-item>
          <text:p text:style-name="P4">C<text:span text:style-name="T7">Acertificate.pem | both | The “Key Corp” certificate used to verify other certificates</text:span></text:p>
        </text:list-item>
        <text:list-item>
          <text:p text:style-name="P5"><text:span text:style-name="T8">CASignedServerCertificate.pem</text:span><text:span text:style-name="T9"> </text:span><text:span text:style-name="T10">|</text:span><text:span text:style-name="T9"> client </text:span><text:span text:style-name="T10">| client uses to verify server’s identity</text:span></text:p>
        </text:list-item>
        <text:list-item>
          <text:p text:style-name="P4">CASignedClientCertificate.<text:span text:style-name="T7">pem</text:span> | server | server uses to verify client’s identity</text:p>
        </text:list-item>
        <text:list-item>
          <text:p text:style-name="P4"><text:span text:style-name="T7">serverPrivateKey.der</text:span> | server | used to sign messages</text:p>
        </text:list-item>
        <text:list-item>
          <text:p text:style-name="P4"><text:span text:style-name="T7">clientPrivateKey.der</text:span> | <text:span text:style-name="T7">client | used to sign messages</text:span></text:p>
        </text:list-item>
      </text:list>
      <text:p text:style-name="P6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4T06:37:34.729559000</meta:creation-date>
    <dc:date>2026-03-17T16:01:55.996306000</dc:date>
    <meta:editing-duration>PT6H45M15S</meta:editing-duration>
    <meta:editing-cycles>4</meta:editing-cycles>
    <meta:generator>LibreOffice/25.8.2.2$MacOSX_AARCH64 LibreOffice_project/d401f2107ccab8f924a8e2df40f573aab7605b6f</meta:generator>
    <meta:document-statistic meta:table-count="0" meta:image-count="0" meta:object-count="0" meta:page-count="1" meta:paragraph-count="7" meta:word-count="69" meta:character-count="458" meta:non-whitespace-character-count="398"/>
  </office:meta>
</office:document-meta>
</file>