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1520" officeooo:paragraph-rsid="000230db" style:font-weight-asian="bold" style:font-weight-complex="bold"/>
    </style:style>
    <style:style style:name="P2" style:family="paragraph" style:parent-style-name="Standard">
      <style:text-properties fo:font-weight="normal" officeooo:rsid="00061520" officeooo:paragraph-rsid="000230db" style:font-weight-asian="normal" style:font-weight-complex="normal"/>
    </style:style>
    <style:style style:name="P3" style:family="paragraph" style:parent-style-name="Standard">
      <style:text-properties fo:font-weight="normal" officeooo:rsid="000313bf" officeooo:paragraph-rsid="000230db" style:font-weight-asian="normal" style:font-weight-complex="normal"/>
    </style:style>
    <style:style style:name="P4" style:family="paragraph" style:parent-style-name="Standard">
      <style:text-properties fo:font-weight="bold" officeooo:rsid="00061520" officeooo:paragraph-rsid="000313bf" style:font-weight-asian="bold" style:font-weight-complex="bold"/>
    </style:style>
    <style:style style:name="P5" style:family="paragraph" style:parent-style-name="Standard">
      <style:text-properties fo:font-weight="normal" officeooo:rsid="000313bf" officeooo:paragraph-rsid="000313bf" style:font-weight-asian="normal" style:font-weight-complex="normal"/>
    </style:style>
    <style:style style:name="P6" style:family="paragraph" style:parent-style-name="Standard">
      <style:text-properties fo:font-weight="bold" officeooo:rsid="000313bf" officeooo:paragraph-rsid="000313bf" style:font-weight-asian="bold" style:font-weight-complex="bold"/>
    </style:style>
    <style:style style:name="T1" style:family="text">
      <style:text-properties officeooo:rsid="000230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13bf"/>
    </style:style>
    <style:style style:name="T4" style:family="text">
      <style:text-properties fo:font-weight="normal" officeooo:rsid="000230db" style:font-weight-asian="normal" style:font-weight-complex="normal"/>
    </style:style>
    <style:style style:name="T5" style:family="text">
      <style:text-properties fo:font-weight="normal" officeooo:rsid="000313b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6014 – Jon Pulsipher – <text:span text:style-name="T1">Lower Network</text:span><text:span text:style-name="T2"> </text:span><text:span text:style-name="T3">Layers</text:span><text:span text:style-name="T2">– </text:span><text:span text:style-name="T4">2</text:span><text:span text:style-name="T2">/</text:span><text:span text:style-name="T4">6</text:span><text:span text:style-name="T2">/26</text:span></text:p>
      <text:p text:style-name="P2"/>
      <text:p text:style-name="P1">Q1:<text:span text:style-name="T2"> </text:span><text:span text:style-name="T5">Reliable Data Transfer</text:span></text:p>
      <text:p text:style-name="P3"/>
      <text:p text:style-name="P3"/>
      <text:p text:style-name="P4">Q<text:span text:style-name="T3">2</text:span>:<text:span text:style-name="T2"> </text:span><text:span text:style-name="T5">Throttling</text:span></text:p>
      <text:p text:style-name="P5"/>
      <text:p text:style-name="P4">Q<text:span text:style-name="T3">3</text:span>:<text:span text:style-name="T2"> </text:span><text:span text:style-name="T5">Routers</text:span></text:p>
      <text:p text:style-name="P5"/>
      <text:p text:style-name="P6">Q4:<text:span text:style-name="T2"> Rout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0:29:02.282586000</meta:creation-date>
    <meta:generator>LibreOffice/25.8.2.2$MacOSX_AARCH64 LibreOffice_project/d401f2107ccab8f924a8e2df40f573aab7605b6f</meta:generator>
    <dc:date>2026-02-06T13:48:28.067244000</dc:date>
    <meta:editing-duration>PT3H8M42S</meta:editing-duration>
    <meta:editing-cycles>2</meta:editing-cycles>
    <meta:document-statistic meta:table-count="0" meta:image-count="0" meta:object-count="0" meta:page-count="1" meta:paragraph-count="5" meta:word-count="17" meta:character-count="115" meta:non-whitespace-character-count="101"/>
  </office:meta>
</office:document-meta>
</file>