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3.725in" table:align="left"/>
    </style:style>
    <style:style style:name="Table1.A" style:family="table-column">
      <style:table-column-properties style:column-width="1.2146in"/>
    </style:style>
    <style:style style:name="Table1.B" style:family="table-column">
      <style:table-column-properties style:column-width="1.2556in"/>
    </style:style>
    <style:style style:name="Table1.C" style:family="table-column">
      <style:table-column-properties style:column-width="1.2549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-left="none" fo:border-right="none" fo:border-top="0.5pt solid #000000" fo:border-bottom="0.5pt solid #000000"/>
    </style:style>
    <style:style style:name="Table1.C1" style:family="table-cell">
      <style:table-cell-properties fo:padding="0.0382in" fo:border-left="none" fo:border-right="0.5pt solid #000000" fo:border-top="0.5pt solid #000000" fo:border-bottom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none" fo:border-right="none" fo:border-top="none" fo:border-bottom="0.5pt solid #000000"/>
    </style:style>
    <style:style style:name="Table1.C2" style:family="table-cell">
      <style:table-cell-properties fo:padding="0.0382in" fo:border-left="none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061520" officeooo:paragraph-rsid="000230db" style:font-weight-asian="bold" style:font-weight-complex="bold"/>
    </style:style>
    <style:style style:name="P2" style:family="paragraph" style:parent-style-name="Standard">
      <style:text-properties fo:font-weight="normal" officeooo:rsid="00061520" officeooo:paragraph-rsid="000230db" style:font-weight-asian="normal" style:font-weight-complex="normal"/>
    </style:style>
    <style:style style:name="P3" style:family="paragraph" style:parent-style-name="Standard">
      <style:text-properties fo:font-weight="normal" officeooo:rsid="000524a4" officeooo:paragraph-rsid="000524a4" style:font-weight-asian="normal" style:font-weight-complex="normal"/>
    </style:style>
    <style:style style:name="P4" style:family="paragraph" style:parent-style-name="Standard">
      <style:text-properties fo:font-weight="normal" officeooo:rsid="000313bf" officeooo:paragraph-rsid="000230db" style:font-weight-asian="normal" style:font-weight-complex="normal"/>
    </style:style>
    <style:style style:name="P5" style:family="paragraph" style:parent-style-name="Standard">
      <style:text-properties fo:font-weight="bold" officeooo:rsid="00061520" officeooo:paragraph-rsid="000313bf" style:font-weight-asian="bold" style:font-weight-complex="bold"/>
    </style:style>
    <style:style style:name="P6" style:family="paragraph" style:parent-style-name="Standard">
      <style:text-properties fo:font-weight="normal" officeooo:rsid="000728f2" officeooo:paragraph-rsid="000728f2" style:font-weight-asian="normal" style:font-weight-complex="normal"/>
    </style:style>
    <style:style style:name="P7" style:family="paragraph" style:parent-style-name="Standard">
      <style:text-properties fo:font-weight="normal" officeooo:rsid="000313bf" officeooo:paragraph-rsid="000313bf" style:font-weight-asian="normal" style:font-weight-complex="normal"/>
    </style:style>
    <style:style style:name="P8" style:family="paragraph" style:parent-style-name="Standard">
      <style:text-properties fo:font-weight="normal" officeooo:rsid="0006457b" officeooo:paragraph-rsid="0006457b" style:font-weight-asian="normal" style:font-weight-complex="normal"/>
    </style:style>
    <style:style style:name="P9" style:family="paragraph" style:parent-style-name="Standard">
      <style:text-properties fo:font-weight="bold" officeooo:rsid="000313bf" officeooo:paragraph-rsid="000313bf" style:font-weight-asian="bold" style:font-weight-complex="bold"/>
    </style:style>
    <style:style style:name="T1" style:family="text">
      <style:text-properties officeooo:rsid="000230d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313bf"/>
    </style:style>
    <style:style style:name="T4" style:family="text">
      <style:text-properties fo:font-weight="normal" officeooo:rsid="000230db" style:font-weight-asian="normal" style:font-weight-complex="normal"/>
    </style:style>
    <style:style style:name="T5" style:family="text">
      <style:text-properties fo:font-weight="normal" officeooo:rsid="000313b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6014 – Jon Pulsipher – <text:span text:style-name="T1">Lower Network</text:span><text:span text:style-name="T2"> </text:span><text:span text:style-name="T3">Layers</text:span><text:span text:style-name="T2">– </text:span><text:span text:style-name="T4">2</text:span><text:span text:style-name="T2">/</text:span><text:span text:style-name="T4">6</text:span><text:span text:style-name="T2">/26</text:span></text:p>
      <text:p text:style-name="P2"/>
      <text:p text:style-name="P1">Q1:<text:span text:style-name="T2"> </text:span><text:span text:style-name="T5">Reliable Data Transfer</text:span></text:p>
      <text:p text:style-name="P3">The assignment has two weird (I think) omitted words in the first few sentences. Check ‘em out.</text:p>
      <text:p text:style-name="P3">Looks like I should be looking up the protocol state machines we went through the slides for.</text:p>
      <text:p text:style-name="P4"/>
      <text:p text:style-name="P3">Ah, this’n: <text:a xlink:type="simple" xlink:href="https://utah.instructure.com/courses/1225828/pages/reliable-data-transfer?module_item_id=31261501" text:style-name="Internet_20_link" text:visited-style-name="Visited_20_Internet_20_Link">https://utah.instructure.com/courses/1225828/pages/reliable-data-transfer?module_item_id=31261501</text:a></text:p>
      <text:p text:style-name="P3">And my 1-14 notes.</text:p>
      <text:p text:style-name="P4"/>
      <text:p text:style-name="P5">Q<text:span text:style-name="T3">2</text:span>:<text:span text:style-name="T2"> </text:span><text:span text:style-name="T5">Throttling</text:span></text:p>
      <text:p text:style-name="P3">lol I don’t remember either.</text:p>
      <text:p text:style-name="P3"/>
      <text:p text:style-name="P3">- Flow control relies on `rwnd` and `window &lt;= rwnd`</text:p>
      <text:p text:style-name="P3">- Congestion control uses `cwnd` and `window &lt;= cwnd`</text:p>
      <text:p text:style-name="P6">Notes 1-21-26.</text:p>
      <text:p text:style-name="P3"/>
      <text:p text:style-name="P6">Flow control might be related to exponential backoff.</text:p>
      <text:p text:style-name="P7"/>
      <text:p text:style-name="P5">Q<text:span text:style-name="T3">3</text:span>:<text:span text:style-name="T2"> </text:span><text:span text:style-name="T5">Routers</text:span></text:p>
      <text:p text:style-name="P3">Subnet prefix: 1.1.0.0/21</text:p>
      <text:p text:style-name="P3">Router A’s forwarding table:</text:p>
      <text:p text:style-name="P3">What even is this? Is it the one that connects IPs to mac addresses? Well no, we haven’t even talked about mac addresses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Router A</text:p>
          </table:table-cell>
          <table:table-cell table:style-name="Table1.B1" office:value-type="string">
            <text:p text:style-name="P8">Subnet routing</text:p>
          </table:table-cell>
          <table:table-cell table:style-name="Table1.C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Port 1</text:p>
          </table:table-cell>
          <table:table-cell table:style-name="Table1.B2" office:value-type="string">
            <text:p text:style-name="P8">1.1.1.0/24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Port 2</text:p>
          </table:table-cell>
          <table:table-cell table:style-name="Table1.B2" office:value-type="string">
            <text:p text:style-name="P8">1.1.2.0/24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Port 3</text:p>
          </table:table-cell>
          <table:table-cell table:style-name="Table1.B2" office:value-type="string">
            <text:p text:style-name="P8">1.1.3.0/24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Port 4</text:p>
          </table:table-cell>
          <table:table-cell table:style-name="Table1.B2" office:value-type="string">
            <text:p text:style-name="P8">--- (nothing written? So everything else)</text:p>
          </table:table-cell>
          <table:table-cell table:style-name="Table1.C2" office:value-type="string">
            <text:p text:style-name="P8"/>
          </table:table-cell>
        </table:table-row>
      </table:table>
      <text:p text:style-name="P7"/>
      <text:p text:style-name="P8">Is that right? Is it okay that the links we’re using are outside the routing?</text:p>
      <text:p text:style-name="P7"/>
      <text:p text:style-name="P9">Q4:<text:span text:style-name="T2"> Routing</text:span></text:p>
      <text:p text:style-name="P7"/>
      <text:p text:style-name="P6">Well god dam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0:29:02.282586000</meta:creation-date>
    <meta:generator>LibreOffice/25.8.2.2$MacOSX_AARCH64 LibreOffice_project/d401f2107ccab8f924a8e2df40f573aab7605b6f</meta:generator>
    <dc:date>2026-02-07T20:45:58.956410000</dc:date>
    <meta:editing-duration>PT3H16M49S</meta:editing-duration>
    <meta:editing-cycles>4</meta:editing-cycles>
    <meta:document-statistic meta:table-count="1" meta:image-count="0" meta:object-count="0" meta:page-count="1" meta:paragraph-count="29" meta:word-count="161" meta:character-count="1012" meta:non-whitespace-character-count="878"/>
  </office:meta>
</office:document-meta>
</file>