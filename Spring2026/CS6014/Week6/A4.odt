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7889in" table:align="left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1.574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61520" officeooo:paragraph-rsid="000230db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230db" style:font-weight-asian="normal" style:font-weight-complex="normal"/>
    </style:style>
    <style:style style:name="P3" style:family="paragraph" style:parent-style-name="Standard">
      <style:text-properties fo:font-weight="bold" officeooo:rsid="000971ba" officeooo:paragraph-rsid="000971ba" style:font-weight-asian="bold" style:font-weight-complex="bold"/>
    </style:style>
    <style:style style:name="P4" style:family="paragraph" style:parent-style-name="Standard">
      <style:text-properties fo:font-weight="normal" officeooo:rsid="000f090c" officeooo:paragraph-rsid="000f090c" style:font-weight-asian="normal" style:font-weight-complex="normal"/>
    </style:style>
    <style:style style:name="P5" style:family="paragraph" style:parent-style-name="Standard">
      <style:text-properties fo:font-style="italic" fo:font-weight="normal" officeooo:rsid="000f090c" officeooo:paragraph-rsid="000f090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normal" officeooo:rsid="000e9cf6" officeooo:paragraph-rsid="000e9cf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9cf6" officeooo:paragraph-rsid="000f090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090c" officeooo:paragraph-rsid="000f090c" style:font-weight-asian="normal" style:font-weight-complex="normal"/>
    </style:style>
    <style:style style:name="P9" style:family="paragraph" style:parent-style-name="Standard">
      <style:text-properties fo:font-weight="normal" officeooo:rsid="000e9cf6" officeooo:paragraph-rsid="000f090c" style:font-weight-asian="normal" style:font-weight-complex="normal"/>
    </style:style>
    <style:style style:name="P10" style:family="paragraph" style:parent-style-name="Standard">
      <style:text-properties fo:font-weight="bold" officeooo:rsid="000f090c" officeooo:paragraph-rsid="000f090c" style:font-weight-asian="bold" style:font-weight-complex="bold"/>
    </style:style>
    <style:style style:name="P11" style:family="paragraph" style:parent-style-name="Standard">
      <style:text-properties fo:font-weight="bold" officeooo:rsid="00061520" officeooo:paragraph-rsid="000313bf" style:font-weight-asian="bold" style:font-weight-complex="bold"/>
    </style:style>
    <style:style style:name="P12" style:family="paragraph" style:parent-style-name="Standard">
      <style:text-properties fo:font-weight="normal" officeooo:rsid="00113e5e" officeooo:paragraph-rsid="00113e5e" style:font-weight-asian="normal" style:font-weight-complex="normal"/>
    </style:style>
    <style:style style:name="P13" style:family="paragraph" style:parent-style-name="Standard">
      <style:text-properties fo:font-weight="normal" officeooo:rsid="0011ca75" officeooo:paragraph-rsid="0011ca75" style:font-weight-asian="normal" style:font-weight-complex="normal"/>
    </style:style>
    <style:style style:name="P14" style:family="paragraph" style:parent-style-name="Standard">
      <style:text-properties fo:font-weight="normal" officeooo:rsid="000524a4" officeooo:paragraph-rsid="000524a4" style:font-weight-asian="normal" style:font-weight-complex="normal"/>
    </style:style>
    <style:style style:name="P15" style:family="paragraph" style:parent-style-name="Standard">
      <style:text-properties fo:font-weight="normal" officeooo:rsid="0006457b" officeooo:paragraph-rsid="0006457b" style:font-weight-asian="normal" style:font-weight-complex="normal"/>
    </style:style>
    <style:style style:name="P16" style:family="paragraph" style:parent-style-name="Standard">
      <style:text-properties fo:font-weight="normal" officeooo:rsid="000313bf" officeooo:paragraph-rsid="000313bf" style:font-weight-asian="normal" style:font-weight-complex="normal"/>
    </style:style>
    <style:style style:name="P17" style:family="paragraph" style:parent-style-name="Standard">
      <style:text-properties fo:font-weight="bold" officeooo:rsid="000313bf" officeooo:paragraph-rsid="000313bf" style:font-weight-asian="bold" style:font-weight-complex="bold"/>
    </style:style>
    <style:style style:name="P18" style:family="paragraph" style:parent-style-name="Standard">
      <style:text-properties fo:font-weight="normal" officeooo:rsid="000728f2" officeooo:paragraph-rsid="0012c06b" style:font-weight-asian="normal" style:font-weight-complex="normal"/>
    </style:style>
    <style:style style:name="P19" style:family="paragraph" style:parent-style-name="Standard">
      <style:text-properties fo:font-weight="normal" officeooo:rsid="000728f2" officeooo:paragraph-rsid="000728f2" style:font-weight-asian="normal" style:font-weight-complex="normal"/>
    </style:style>
    <style:style style:name="T1" style:family="text">
      <style:text-properties officeooo:rsid="000230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3bf"/>
    </style:style>
    <style:style style:name="T4" style:family="text">
      <style:text-properties fo:font-weight="normal" officeooo:rsid="000230db" style:font-weight-asian="normal" style:font-weight-complex="normal"/>
    </style:style>
    <style:style style:name="T5" style:family="text">
      <style:text-properties fo:font-weight="normal" officeooo:rsid="000313bf" style:font-weight-asian="normal" style:font-weight-complex="normal"/>
    </style:style>
    <style:style style:name="T6" style:family="text">
      <style:text-properties officeooo:rsid="000f090c"/>
    </style:style>
    <style:style style:name="T7" style:family="text">
      <style:text-properties officeooo:rsid="000e9cf6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0fb8e0"/>
    </style:style>
    <style:style style:name="T10" style:family="text">
      <style:text-properties officeooo:rsid="00113e5e"/>
    </style:style>
    <style:style style:name="T11" style:family="text">
      <style:text-properties officeooo:rsid="0011ca7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<text:span text:style-name="T1">Lower Network</text:span><text:span text:style-name="T2"> </text:span><text:span text:style-name="T3">Layers</text:span><text:span text:style-name="T2">– </text:span><text:span text:style-name="T4">2</text:span><text:span text:style-name="T2">/</text:span><text:span text:style-name="T4">6</text:span><text:span text:style-name="T2">/26</text:span></text:p>
      <text:p text:style-name="P2"/>
      <text:p text:style-name="P1">Q1:<text:span text:style-name="T2"> </text:span><text:span text:style-name="T5">Reliable Data Transfer</text:span></text:p>
      <text:p text:style-name="P3">Protocol State machines for S and R1/R2</text:p>
      <text:p text:style-name="P4"># - seqeunce #</text:p>
      <text:p text:style-name="P5">S</text:p>
      <text:p text:style-name="P6">S “sending” <text:span text:style-name="T6">#</text:span>: udt_send(pkt) → S “listening for ACK <text:span text:style-name="T6">#</text:span>”</text:p>
      <text:p text:style-name="P6">S “listening for ACK”: </text:p>
      <text:p text:style-name="P4">If </text:p>
      <text:list text:style-name="L1">
        <text:list-item>
          <text:p text:style-name="P7">udt_receive(pkt) &amp;&amp; !is_ack(pkt, <text:span text:style-name="T6">#</text:span>) <text:s/></text:p>
        </text:list-item>
        <text:list-item>
          <text:p text:style-name="P8">|| <text:span text:style-name="T7">udt_receive(pkt) &amp;&amp; <text:s/></text:span>is_corrupt(pkt)</text:p>
        </text:list-item>
        <text:list-item>
          <text:p text:style-name="P7"><text:span text:style-name="T6">|| </text:span>timeout</text:p>
        </text:list-item>
      </text:list>
      <text:p text:style-name="P9">→ <text:span text:style-name="T6">S “sending #”</text:span></text:p>
      <text:p text:style-name="P4">If udt_receive(pkt) &amp;&amp; is_ack(pkt, 1/2) &amp;&amp; !is_corrupt)_pkt...</text:p>
      <text:p text:style-name="P4">… If already_got(2/1)→ S “sending # + 1” Else set_got(2/1) <text:s/></text:p>
      <text:p text:style-name="P4"/>
      <text:p text:style-name="P10"><text:span text:style-name="T8">R</text:span><text:span text:style-name="T2"> (1/2)</text:span></text:p>
      <text:p text:style-name="P4">Same as S except it sends ACKs instead of messages isn’t listening for 2 things.</text:p>
      <text:p text:style-name="P4"/>
      <text:p text:style-name="P11">Q<text:span text:style-name="T3">2</text:span>:<text:span text:style-name="T2"> </text:span><text:span text:style-name="T5">Throttling</text:span></text:p>
      <text:p text:style-name="P4">Flow Control: <text:span text:style-name="T9">A procedure that helps prevent hosts from overwhelming each other. In TCP, each host will include the size of ‘rwnd’ (receive window – space in its receive buffer), and the responding host will not send more data than that size. When the rwnd is ‘0’, the sender will periodically send 1 byte messages, waiting for the rwnd to increase.</text:span></text:p>
      <text:p text:style-name="P4">Congestion Control: <text:span text:style-name="T9">Procedures that manage congestion on a busy network. In TCP, we limit our sending </text:span><text:span text:style-name="T10">limited by the</text:span><text:span text:style-name="T9"> ‘cwnd’ (congestion window), which is based on an estimate of network traffic. Traffic will be sent based on what state the system is in.</text:span></text:p>
      <text:p text:style-name="P12">1) Slow Start: sends messages with a small cwnd that grows exponentially. We start here. When growth hits the ssthresh (slow start threshold) we switch to congestion avoidance. If we hit 3 duplicate ACKs we switch to Fast Recovery.</text:p>
      <text:p text:style-name="P12">2) Congestion Avoidance: <text:span text:style-name="T11">We increase cwnd more slowly until </text:span>a timeout (back to Slow Start), <text:span text:style-name="T11">or 3 duplicate ACKs (to Fast Recovery).</text:span></text:p>
      <text:p text:style-name="P12">3) Fast Recovery: Maintains sending rate. When a new ACK is received we switch to Congestion Avoidance. <text:span text:style-name="T11">After a timeout, we go back to slow start.</text:span></text:p>
      <text:p text:style-name="P13">A more complete explanation would go into what cwnd and ssthresh are set to on transitions and receiving ACKs.</text:p>
      <text:p text:style-name="P12"/>
      <text:p text:style-name="P11">Q<text:span text:style-name="T3">3</text:span>:<text:span text:style-name="T2"> </text:span><text:span text:style-name="T5">Routers</text:span></text:p>
      <text:p text:style-name="P14">Subnet prefix: 1.1.0.0/21</text:p>
      <text:p text:style-name="P14">Router A’s forwarding tab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Router A</text:p>
          </table:table-cell>
          <table:table-cell table:style-name="Table1.B1" office:value-type="string">
            <text:p text:style-name="P15">Subnet routing</text:p>
          </table:table-cell>
        </table:table-row>
        <table:table-row>
          <table:table-cell table:style-name="Table1.A2" office:value-type="string">
            <text:p text:style-name="P15">Port 1</text:p>
          </table:table-cell>
          <table:table-cell table:style-name="Table1.B2" office:value-type="string">
            <text:p text:style-name="P15">1.1.1.0/24</text:p>
          </table:table-cell>
        </table:table-row>
        <table:table-row>
          <table:table-cell table:style-name="Table1.A2" office:value-type="string">
            <text:p text:style-name="P15">Port 2</text:p>
          </table:table-cell>
          <table:table-cell table:style-name="Table1.B2" office:value-type="string">
            <text:p text:style-name="P15">1.1.2.0/24</text:p>
          </table:table-cell>
        </table:table-row>
        <table:table-row>
          <table:table-cell table:style-name="Table1.A2" office:value-type="string">
            <text:p text:style-name="P15">Port 3</text:p>
          </table:table-cell>
          <table:table-cell table:style-name="Table1.B2" office:value-type="string">
            <text:p text:style-name="P15">1.1.3.0/24</text:p>
          </table:table-cell>
        </table:table-row>
        <table:table-row>
          <table:table-cell table:style-name="Table1.A2" office:value-type="string">
            <text:p text:style-name="P15">Port 4</text:p>
          </table:table-cell>
          <table:table-cell table:style-name="Table1.B2" office:value-type="string">
            <text:p text:style-name="P13">Everything else.</text:p>
          </table:table-cell>
        </table:table-row>
      </table:table>
      <text:p text:style-name="P16"/>
      <text:p text:style-name="P17"><text:soft-page-break/>Q4:<text:span text:style-name="T2"> Routing</text:span></text:p>
      <text:p text:style-name="P16"/>
      <text:p text:style-name="P18"><draw:frame draw:style-name="fr1" draw:name="Object1" text:anchor-type="char" svg:x="0.3134in" svg:y="0.011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0:29:02.282586000</meta:creation-date>
    <meta:generator>LibreOffice/25.8.2.2$MacOSX_AARCH64 LibreOffice_project/d401f2107ccab8f924a8e2df40f573aab7605b6f</meta:generator>
    <dc:date>2026-02-21T13:37:22.041968000</dc:date>
    <meta:editing-duration>P2DT20H18M21S</meta:editing-duration>
    <meta:editing-cycles>7</meta:editing-cycles>
    <meta:document-statistic meta:table-count="1" meta:image-count="0" meta:object-count="1" meta:page-count="2" meta:paragraph-count="37" meta:word-count="328" meta:character-count="1927" meta:non-whitespace-character-count="162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9cm" xlink:href="." xlink:type="simple" chart:class="chart:scatter" chart:style-name="ch1">
        <chart:title svg:x="3.292cm" svg:y="0.314cm" chart:style-name="ch2">
          <text:p>Bellman Ford, messages to establish network</text:p>
        </chart:title>
        <chart:plot-area chart:style-name="ch3" svg:x="1.323cm" svg:y="1.286cm" svg:width="14.357cm" svg:height="6.56cm">
          <chart:coordinate-region svg:x="2.721cm" svg:y="1.478cm" svg:width="12.575cm" svg:height="5.736cm"/>
          <chart:axis chart:dimension="x" chart:name="primary-x" chart:style-name="ch4" chartooo:axis-type="auto">
            <chart:title svg:x="7.623cm" svg:y="8.026cm" chart:style-name="ch2">
              <text:p><text:span text:style-name="T1"># of routers</text:span>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679cm" chart:style-name="ch6">
              <text:p><text:span text:style-name="T1"># of messages</text:span>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211.2">
                <text:p>121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594.8">
                <text:p>359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3062.8">
                <text:p>1306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40463.8">
                <text:p>404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130945.4">
                <text:p>13094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319350.4">
                <text:p>31935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