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.7889in" table:align="left"/>
    </style:style>
    <style:style style:name="Table1.A" style:family="table-column">
      <style:table-column-properties style:column-width="1.2146in"/>
    </style:style>
    <style:style style:name="Table1.B" style:family="table-column">
      <style:table-column-properties style:column-width="1.574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none" fo:border-right="0.5pt solid #000000" fo:border-top="0.5pt solid #000000" fo:border-bottom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061520" officeooo:paragraph-rsid="000230db" style:font-weight-asian="bold" style:font-weight-complex="bold"/>
    </style:style>
    <style:style style:name="P2" style:family="paragraph" style:parent-style-name="Standard">
      <style:text-properties fo:font-weight="normal" officeooo:rsid="00061520" officeooo:paragraph-rsid="000230db" style:font-weight-asian="normal" style:font-weight-complex="normal"/>
    </style:style>
    <style:style style:name="P3" style:family="paragraph" style:parent-style-name="Standard">
      <style:text-properties fo:font-weight="bold" officeooo:rsid="000971ba" officeooo:paragraph-rsid="000971ba" style:font-weight-asian="bold" style:font-weight-complex="bold"/>
    </style:style>
    <style:style style:name="P4" style:family="paragraph" style:parent-style-name="Standard">
      <style:text-properties fo:font-weight="normal" officeooo:rsid="000f090c" officeooo:paragraph-rsid="000f090c" style:font-weight-asian="normal" style:font-weight-complex="normal"/>
    </style:style>
    <style:style style:name="P5" style:family="paragraph" style:parent-style-name="Standard">
      <style:text-properties fo:font-style="italic" fo:font-weight="normal" officeooo:rsid="000f090c" officeooo:paragraph-rsid="000f090c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weight="normal" officeooo:rsid="000e9cf6" officeooo:paragraph-rsid="000e9cf6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e9cf6" officeooo:paragraph-rsid="000f090c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f090c" officeooo:paragraph-rsid="000f090c" style:font-weight-asian="normal" style:font-weight-complex="normal"/>
    </style:style>
    <style:style style:name="P9" style:family="paragraph" style:parent-style-name="Standard">
      <style:text-properties fo:font-weight="normal" officeooo:rsid="000e9cf6" officeooo:paragraph-rsid="000f090c" style:font-weight-asian="normal" style:font-weight-complex="normal"/>
    </style:style>
    <style:style style:name="P10" style:family="paragraph" style:parent-style-name="Standard">
      <style:text-properties fo:font-weight="bold" officeooo:rsid="000f090c" officeooo:paragraph-rsid="000f090c" style:font-weight-asian="bold" style:font-weight-complex="bold"/>
    </style:style>
    <style:style style:name="P11" style:family="paragraph" style:parent-style-name="Standard">
      <style:text-properties fo:font-weight="bold" officeooo:rsid="00061520" officeooo:paragraph-rsid="000313bf" style:font-weight-asian="bold" style:font-weight-complex="bold"/>
    </style:style>
    <style:style style:name="P12" style:family="paragraph" style:parent-style-name="Standard">
      <style:text-properties fo:font-weight="normal" officeooo:rsid="00113e5e" officeooo:paragraph-rsid="00113e5e" style:font-weight-asian="normal" style:font-weight-complex="normal"/>
    </style:style>
    <style:style style:name="P13" style:family="paragraph" style:parent-style-name="Standard">
      <style:text-properties fo:font-weight="normal" officeooo:rsid="0011ca75" officeooo:paragraph-rsid="0011ca75" style:font-weight-asian="normal" style:font-weight-complex="normal"/>
    </style:style>
    <style:style style:name="P14" style:family="paragraph" style:parent-style-name="Standard">
      <style:text-properties fo:font-weight="normal" officeooo:rsid="000524a4" officeooo:paragraph-rsid="000524a4" style:font-weight-asian="normal" style:font-weight-complex="normal"/>
    </style:style>
    <style:style style:name="P15" style:family="paragraph" style:parent-style-name="Standard">
      <style:text-properties fo:font-weight="normal" officeooo:rsid="0006457b" officeooo:paragraph-rsid="0006457b" style:font-weight-asian="normal" style:font-weight-complex="normal"/>
    </style:style>
    <style:style style:name="P16" style:family="paragraph" style:parent-style-name="Standard">
      <style:text-properties fo:font-weight="normal" officeooo:rsid="000313bf" officeooo:paragraph-rsid="000313bf" style:font-weight-asian="normal" style:font-weight-complex="normal"/>
    </style:style>
    <style:style style:name="P17" style:family="paragraph" style:parent-style-name="Standard">
      <style:text-properties fo:font-weight="bold" officeooo:rsid="000313bf" officeooo:paragraph-rsid="000313bf" style:font-weight-asian="bold" style:font-weight-complex="bold"/>
    </style:style>
    <style:style style:name="P18" style:family="paragraph" style:parent-style-name="Standard">
      <style:text-properties fo:font-weight="normal" officeooo:rsid="000728f2" officeooo:paragraph-rsid="000728f2" style:font-weight-asian="normal" style:font-weight-complex="normal"/>
    </style:style>
    <style:style style:name="T1" style:family="text">
      <style:text-properties officeooo:rsid="000230d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313bf"/>
    </style:style>
    <style:style style:name="T4" style:family="text">
      <style:text-properties fo:font-weight="normal" officeooo:rsid="000230db" style:font-weight-asian="normal" style:font-weight-complex="normal"/>
    </style:style>
    <style:style style:name="T5" style:family="text">
      <style:text-properties fo:font-weight="normal" officeooo:rsid="000313bf" style:font-weight-asian="normal" style:font-weight-complex="normal"/>
    </style:style>
    <style:style style:name="T6" style:family="text">
      <style:text-properties officeooo:rsid="000f090c"/>
    </style:style>
    <style:style style:name="T7" style:family="text">
      <style:text-properties officeooo:rsid="000e9cf6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0fb8e0"/>
    </style:style>
    <style:style style:name="T10" style:family="text">
      <style:text-properties officeooo:rsid="00113e5e"/>
    </style:style>
    <style:style style:name="T11" style:family="text">
      <style:text-properties officeooo:rsid="0011ca7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6014 – Jon Pulsipher – <text:span text:style-name="T1">Lower Network</text:span><text:span text:style-name="T2"> </text:span><text:span text:style-name="T3">Layers</text:span><text:span text:style-name="T2">– </text:span><text:span text:style-name="T4">2</text:span><text:span text:style-name="T2">/</text:span><text:span text:style-name="T4">6</text:span><text:span text:style-name="T2">/26</text:span></text:p>
      <text:p text:style-name="P2"/>
      <text:p text:style-name="P1">Q1:<text:span text:style-name="T2"> </text:span><text:span text:style-name="T5">Reliable Data Transfer</text:span></text:p>
      <text:p text:style-name="P3">Protocol State machines for S and R1/R2</text:p>
      <text:p text:style-name="P4"># - seqeunce #</text:p>
      <text:p text:style-name="P5">S</text:p>
      <text:p text:style-name="P6">S “sending” <text:span text:style-name="T6">#</text:span>: udt_send(pkt) → S “listening for ACK <text:span text:style-name="T6">#</text:span>”</text:p>
      <text:p text:style-name="P6">S “listening for ACK”: </text:p>
      <text:p text:style-name="P4">If </text:p>
      <text:list text:style-name="L1">
        <text:list-item>
          <text:p text:style-name="P7">udt_receive(pkt) &amp;&amp; !is_ack(pkt, <text:span text:style-name="T6">#</text:span>) <text:s/></text:p>
        </text:list-item>
        <text:list-item>
          <text:p text:style-name="P8">|| <text:span text:style-name="T7">udt_receive(pkt) &amp;&amp; <text:s/></text:span>is_corrupt(pkt)</text:p>
        </text:list-item>
        <text:list-item>
          <text:p text:style-name="P7"><text:span text:style-name="T6">|| </text:span>timeout</text:p>
        </text:list-item>
      </text:list>
      <text:p text:style-name="P9">→ <text:span text:style-name="T6">S “sending #”</text:span></text:p>
      <text:p text:style-name="P4">If udt_receive(pkt) &amp;&amp; is_ack(pkt, 1/2) &amp;&amp; !is_corrupt)_pkt...</text:p>
      <text:p text:style-name="P4">… If already_got(2/1)→ S “sending # + 1” Else set_got(2/1) <text:s/></text:p>
      <text:p text:style-name="P4"/>
      <text:p text:style-name="P10"><text:span text:style-name="T8">R</text:span><text:span text:style-name="T2"> (1/2)</text:span></text:p>
      <text:p text:style-name="P4">Same as S except it sends ACKs instead of messages isn’t listening for 2 things.</text:p>
      <text:p text:style-name="P4"/>
      <text:p text:style-name="P11">Q<text:span text:style-name="T3">2</text:span>:<text:span text:style-name="T2"> </text:span><text:span text:style-name="T5">Throttling</text:span></text:p>
      <text:p text:style-name="P4">Flow Control: <text:span text:style-name="T9">A procedure that helps prevent hosts from overwhelming each other. In TCP, each host will include the size of ‘rwnd’ (receive window – space in its receive buffer), and the responding host will not send more data than that size. When the rwnd is ‘0’, the sender will periodically send 1 byte messages, waiting for the rwnd to increase.</text:span></text:p>
      <text:p text:style-name="P4">Congestion Control: <text:span text:style-name="T9">Procedures that manage congestion on a busy network. In TCP, we limit our sending </text:span><text:span text:style-name="T10">limited by the</text:span><text:span text:style-name="T9"> ‘cwnd’ (congestion window), which is based on an estimate of network traffic. Traffic will be sent based on what state the system is in.</text:span></text:p>
      <text:p text:style-name="P12">1) Slow Start: sends messages with a small cwnd that grows exponentially. We start here. When growth hits the ssthresh (slow start threshold) we switch to congestion avoidance. If we hit 3 duplicate ACKs we switch to Fast Recovery.</text:p>
      <text:p text:style-name="P12">2) Congestion Avoidance: <text:span text:style-name="T11">We increase cwnd more slowly until </text:span>a timeout (back to Slow Start), <text:span text:style-name="T11">or 3 duplicate ACKs (to Fast Recovery).</text:span></text:p>
      <text:p text:style-name="P12">3) Fast Recovery: Maintains sending rate. When a new ACK is received we switch to Congestion Avoidance. <text:span text:style-name="T11">After a timeout, we go back to slow start.</text:span></text:p>
      <text:p text:style-name="P13">A more complete explanation would go into what cwnd and ssthresh are set to on transitions and receiving ACKs.</text:p>
      <text:p text:style-name="P12"/>
      <text:p text:style-name="P11">Q<text:span text:style-name="T3">3</text:span>:<text:span text:style-name="T2"> </text:span><text:span text:style-name="T5">Routers</text:span></text:p>
      <text:p text:style-name="P14">Subnet prefix: 1.1.0.0/21</text:p>
      <text:p text:style-name="P14">Router A’s forwarding tabl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Router A</text:p>
          </table:table-cell>
          <table:table-cell table:style-name="Table1.B1" office:value-type="string">
            <text:p text:style-name="P15">Subnet routing</text:p>
          </table:table-cell>
        </table:table-row>
        <table:table-row>
          <table:table-cell table:style-name="Table1.A2" office:value-type="string">
            <text:p text:style-name="P15">Port 1</text:p>
          </table:table-cell>
          <table:table-cell table:style-name="Table1.B2" office:value-type="string">
            <text:p text:style-name="P15">1.1.1.0/24</text:p>
          </table:table-cell>
        </table:table-row>
        <table:table-row>
          <table:table-cell table:style-name="Table1.A2" office:value-type="string">
            <text:p text:style-name="P15">Port 2</text:p>
          </table:table-cell>
          <table:table-cell table:style-name="Table1.B2" office:value-type="string">
            <text:p text:style-name="P15">1.1.2.0/24</text:p>
          </table:table-cell>
        </table:table-row>
        <table:table-row>
          <table:table-cell table:style-name="Table1.A2" office:value-type="string">
            <text:p text:style-name="P15">Port 3</text:p>
          </table:table-cell>
          <table:table-cell table:style-name="Table1.B2" office:value-type="string">
            <text:p text:style-name="P15">1.1.3.0/24</text:p>
          </table:table-cell>
        </table:table-row>
        <table:table-row>
          <table:table-cell table:style-name="Table1.A2" office:value-type="string">
            <text:p text:style-name="P15">Port 4</text:p>
          </table:table-cell>
          <table:table-cell table:style-name="Table1.B2" office:value-type="string">
            <text:p text:style-name="P13">Everything else.</text:p>
          </table:table-cell>
        </table:table-row>
      </table:table>
      <text:p text:style-name="P16"/>
      <text:p text:style-name="P17"><text:soft-page-break/>Q4:<text:span text:style-name="T2"> Routing</text:span></text:p>
      <text:p text:style-name="P16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0:29:02.282586000</meta:creation-date>
    <meta:generator>LibreOffice/25.8.2.2$MacOSX_AARCH64 LibreOffice_project/d401f2107ccab8f924a8e2df40f573aab7605b6f</meta:generator>
    <dc:date>2026-02-19T08:59:54.389115000</dc:date>
    <meta:editing-duration>PT15H47M17S</meta:editing-duration>
    <meta:editing-cycles>5</meta:editing-cycles>
    <meta:document-statistic meta:table-count="1" meta:image-count="0" meta:object-count="0" meta:page-count="2" meta:paragraph-count="37" meta:word-count="328" meta:character-count="1927" meta:non-whitespace-character-count="1629"/>
  </office:meta>
</office:document-meta>
</file>