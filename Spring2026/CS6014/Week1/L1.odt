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1520" officeooo:paragraph-rsid="00061520" style:font-weight-asian="bold" style:font-weight-complex="bold"/>
    </style:style>
    <style:style style:name="P2" style:family="paragraph" style:parent-style-name="Standard">
      <style:text-properties fo:font-weight="normal" officeooo:rsid="00061520" officeooo:paragraph-rsid="00061520" style:font-weight-asian="normal" style:font-weight-complex="normal"/>
    </style:style>
    <style:style style:name="P3" style:family="paragraph" style:parent-style-name="Standard">
      <style:text-properties fo:font-weight="normal" officeooo:rsid="0006dd59" officeooo:paragraph-rsid="0006dd59" style:font-weight-asian="normal" style:font-weight-complex="normal"/>
    </style:style>
    <style:style style:name="P4" style:family="paragraph" style:parent-style-name="Standard">
      <style:text-properties fo:font-weight="normal" officeooo:rsid="0007694b" officeooo:paragraph-rsid="0007694b" style:font-weight-asian="normal" style:font-weight-complex="normal"/>
    </style:style>
    <style:style style:name="P5" style:family="paragraph" style:parent-style-name="Standard">
      <style:text-properties fo:font-style="italic" fo:font-weight="bold" officeooo:rsid="0007694b" officeooo:paragraph-rsid="0007694b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fo:font-weight="normal" officeooo:rsid="0007694b" officeooo:paragraph-rsid="0007694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weight="bold" officeooo:rsid="0006dd59" officeooo:paragraph-rsid="0006dd59" style:font-weight-asian="bold" style:font-weight-complex="bold"/>
    </style:style>
    <style:style style:name="P8" style:family="paragraph" style:parent-style-name="Standard">
      <style:text-properties fo:font-weight="normal" officeooo:rsid="00093a9e" officeooo:paragraph-rsid="00093a9e" style:font-weight-asian="normal" style:font-weight-complex="normal"/>
    </style:style>
    <style:style style:name="P9" style:family="paragraph" style:parent-style-name="Standard">
      <style:text-properties fo:font-weight="normal" officeooo:rsid="000af391" officeooo:paragraph-rsid="000af39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dd59"/>
    </style:style>
    <style:style style:name="T3" style:family="text">
      <style:text-properties officeooo:rsid="0007694b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93a9e" style:font-style-asian="normal" style:font-style-complex="normal"/>
    </style:style>
    <style:style style:name="T6" style:family="text">
      <style:text-properties officeooo:rsid="000af3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6014 – Jon Pulsipher – Packet Delay + Measurement<text:span text:style-name="T1"> – 1/7/26</text:span></text:p>
      <text:p text:style-name="P2"/>
      <text:p text:style-name="P1">Q1:<text:span text:style-name="T1"> Internet Delay</text:span></text:p>
      <text:p text:style-name="P2"><text:span text:style-name="T2">500 bytes - </text:span>10 ms, 2.8 ms, 2.4 ms, 4 ms, and 5.5 ms</text:p>
      <text:p text:style-name="P3">1000 bytes - 11.0 ms, 10 ms, 2.8 ms, 3.0 ms, and 5.5 ms</text:p>
      <text:p text:style-name="P4">8.2 + 7.2 + 0 + 0.2 + 2.7 → average 3.66ms.</text:p>
      <text:p text:style-name="P3">Transmission(propagation): 2ms</text:p>
      <text:p text:style-name="P3">Transmission(transmission): 0.4ms <text:span text:style-name="T3">for 500 bytes</text:span></text:p>
      <text:p text:style-name="P3">Transmission(queueing): mins are 2.4ms and 2.8ms</text:p>
      <text:p text:style-name="P3"/>
      <text:p text:style-name="P5">What is the average queuing delay experienced by the 1000-byte packets?</text:p>
      <text:p text:style-name="P6">3.66ms</text:p>
      <text:p text:style-name="P6"/>
      <text:p text:style-name="P5">What are reasonable estimates of transmission and propagation delays that will be experienced by a packet of size 600 bytes sent through the link K?</text:p>
      <text:p text:style-name="P4"><text:span text:style-name="T4">Propagation delay remains at 2ms, and size-dependent transmission delay will be 0.48ms </text:span><text:span text:style-name="T5">if 0.4ms/500bytes holds.</text:span></text:p>
      <text:p text:style-name="P3"/>
      <text:p text:style-name="P7">Q2:<text:span text:style-name="T1"> Traceroute</text:span></text:p>
      <text:p text:style-name="P8">Destination that is 10 hops away: hempuli.com</text:p>
      <text:p text:style-name="P3">- <text:span text:style-name="T6">how to direct traceroute to output to a file?</text:span></text:p>
      <text:p text:style-name="P3"/>
      <text:p text:style-name="P9">Oh wow. This baby ain’t simple. What code to use. Python? What about D? It’d be funny if I did it in D.</text:p>
      <text:p text:style-name="P3"/>
      <text:p text:style-name="P7">Q3: <text:span text:style-name="T1">Pi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0:07:56.306776000</meta:creation-date>
    <dc:date>2026-01-07T16:29:14.088989000</dc:date>
    <meta:editing-duration>PT5H30M56S</meta:editing-duration>
    <meta:editing-cycles>1</meta:editing-cycles>
    <meta:document-statistic meta:table-count="0" meta:image-count="0" meta:object-count="0" meta:page-count="1" meta:paragraph-count="17" meta:word-count="160" meta:character-count="905" meta:non-whitespace-character-count="759"/>
    <meta:generator>LibreOffice/25.8.2.2$MacOSX_AARCH64 LibreOffice_project/d401f2107ccab8f924a8e2df40f573aab7605b6f</meta:generator>
  </office:meta>
</office:document-meta>
</file>