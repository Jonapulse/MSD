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960000035B0EE1FCD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061520" officeooo:paragraph-rsid="00061520" style:font-weight-asian="bold" style:font-weight-complex="bold"/>
    </style:style>
    <style:style style:name="P2" style:family="paragraph" style:parent-style-name="Standard">
      <style:text-properties fo:font-weight="normal" officeooo:rsid="00061520" officeooo:paragraph-rsid="00061520" style:font-weight-asian="normal" style:font-weight-complex="normal"/>
    </style:style>
    <style:style style:name="P3" style:family="paragraph" style:parent-style-name="Standard">
      <style:text-properties fo:font-style="italic" fo:font-weight="normal" officeooo:rsid="00061520" officeooo:paragraph-rsid="00061520" style:font-style-asian="italic" style:font-weight-asian="normal" style:font-style-complex="italic" style:font-weight-complex="normal"/>
    </style:style>
    <style:style style:name="P4" style:family="paragraph" style:parent-style-name="Standard">
      <style:text-properties fo:font-style="italic" fo:font-weight="normal" officeooo:rsid="0006dd59" officeooo:paragraph-rsid="0006dd59" style:font-style-asian="italic" style:font-weight-asian="normal" style:font-style-complex="italic" style:font-weight-complex="normal"/>
    </style:style>
    <style:style style:name="P5" style:family="paragraph" style:parent-style-name="Standard">
      <style:text-properties fo:font-style="italic" fo:font-weight="normal" officeooo:rsid="0007694b" officeooo:paragraph-rsid="0007694b" style:font-style-asian="italic" style:font-weight-asian="normal" style:font-style-complex="italic" style:font-weight-complex="normal"/>
    </style:style>
    <style:style style:name="P6" style:family="paragraph" style:parent-style-name="Standard">
      <style:text-properties fo:font-weight="normal" officeooo:rsid="0006dd59" officeooo:paragraph-rsid="0006dd59" style:font-weight-asian="normal" style:font-weight-complex="normal"/>
    </style:style>
    <style:style style:name="P7" style:family="paragraph" style:parent-style-name="Standard">
      <style:text-properties fo:font-style="italic" fo:font-weight="bold" officeooo:rsid="0007694b" officeooo:paragraph-rsid="0007694b" style:font-style-asian="italic" style:font-weight-asian="bold" style:font-style-complex="italic" style:font-weight-complex="bold"/>
    </style:style>
    <style:style style:name="P8" style:family="paragraph" style:parent-style-name="Standard">
      <style:text-properties fo:font-style="normal" fo:font-weight="normal" officeooo:rsid="0007694b" officeooo:paragraph-rsid="0007694b" style:font-style-asian="normal" style:font-weight-asian="normal" style:font-style-complex="normal" style:font-weight-complex="normal"/>
    </style:style>
    <style:style style:name="P9" style:family="paragraph" style:parent-style-name="Standard">
      <style:text-properties fo:font-weight="normal" officeooo:rsid="0007694b" officeooo:paragraph-rsid="0007694b" style:font-weight-asian="normal" style:font-weight-complex="normal"/>
    </style:style>
    <style:style style:name="P10" style:family="paragraph" style:parent-style-name="Standard">
      <style:text-properties fo:font-weight="bold" officeooo:rsid="0006dd59" officeooo:paragraph-rsid="0006dd59" style:font-weight-asian="bold" style:font-weight-complex="bold"/>
    </style:style>
    <style:style style:name="P11" style:family="paragraph" style:parent-style-name="Standard">
      <style:text-properties fo:font-weight="bold" officeooo:rsid="000ce802" officeooo:paragraph-rsid="000ce802" style:font-weight-asian="bold" style:font-weight-complex="bold"/>
    </style:style>
    <style:style style:name="P12" style:family="paragraph" style:parent-style-name="Standard">
      <style:text-properties fo:font-style="normal" fo:font-weight="normal" officeooo:rsid="000ce802" officeooo:paragraph-rsid="000ce802" style:font-style-asian="normal" style:font-weight-asian="normal" style:font-style-complex="normal" style:font-weight-complex="normal"/>
    </style:style>
    <style:style style:name="P13" style:family="paragraph" style:parent-style-name="Standard">
      <style:text-properties fo:font-weight="normal" officeooo:rsid="000ce802" officeooo:paragraph-rsid="000ce802"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6dd59"/>
    </style:style>
    <style:style style:name="T3" style:family="text">
      <style:text-properties officeooo:rsid="0007694b"/>
    </style:style>
    <style:style style:name="T4" style:family="text">
      <style:text-properties fo:font-style="normal" style:font-style-asian="normal" style:font-style-complex="normal"/>
    </style:style>
    <style:style style:name="T5" style:family="text">
      <style:text-properties fo:font-style="normal" officeooo:rsid="00093a9e"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0ee0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6014 – Jon Pulsipher – Packet Delay + Measurement<text:span text:style-name="T1"> – 1/7/26</text:span></text:p>
      <text:p text:style-name="P2"/>
      <text:p text:style-name="P1">Q1:<text:span text:style-name="T1"> Internet Delay</text:span></text:p>
      <text:p text:style-name="P3"><text:span text:style-name="T2">500 bytes - </text:span>10 ms, 2.8 ms, 2.4 ms, 4 ms, and 5.5 ms</text:p>
      <text:p text:style-name="P4">1000 bytes - 11.0 ms, 10 ms, 2.8 ms, 3.0 ms, and 5.5 ms</text:p>
      <text:p text:style-name="P5">8.2 + 7.2 + 0 + 0.2 + 2.7 → average 3.66ms.</text:p>
      <text:p text:style-name="P4">Transmission(propagation): 2ms</text:p>
      <text:p text:style-name="P4">Transmission(transmission): 0.4ms <text:span text:style-name="T3">for 500 bytes</text:span></text:p>
      <text:p text:style-name="P4">Transmission(queueing): mins are 2.4ms and 2.8ms</text:p>
      <text:p text:style-name="P6"/>
      <text:p text:style-name="P7">What is the average queuing delay experienced by the 1000-byte packets?</text:p>
      <text:p text:style-name="P8">3.66ms</text:p>
      <text:p text:style-name="P8"/>
      <text:p text:style-name="P7">What are reasonable estimates of transmission and propagation delays that will be experienced by a packet of size 600 bytes sent through the link K?</text:p>
      <text:p text:style-name="P9"><text:span text:style-name="T4">Propagation delay remains at 2ms, and size-dependent transmission delay will be 0.48ms </text:span><text:span text:style-name="T5">if 0.4ms/500bytes holds.</text:span></text:p>
      <text:p text:style-name="P6"/>
      <text:p text:style-name="P10">Q2:<text:span text:style-name="T1"> Traceroute</text:span></text:p>
      <text:p text:style-name="P6"><draw:frame draw:style-name="fr1" draw:name="Image1" text:anchor-type="char" svg:width="6.9252in" svg:height="4.1591in" draw:z-index="0"><draw:image xlink:href="Pictures/10000001000005960000035B0EE1FCDD.png" xlink:type="simple" xlink:show="embed" xlink:actuate="onLoad" draw:mime-type="image/png"/></draw:frame></text:p>
      <text:p text:style-name="P11">Part B:<text:span text:style-name="T1"> </text:span><text:span text:style-name="T6">Suppose one of the three traceroute delay values between the source and a given router hop turns out to be unusually high. What are two possible causes for this unusually high delay?</text:span></text:p>
      <text:p text:style-name="P12">1) Queuing delay. Other packets may have taken priority for the delayed hop and not the others.</text:p>
      <text:p text:style-name="P12">2) An unpredictable processing or transmission delay on the targeted router, which could be anything. Maybe someone assembled it with cans and string, but still managed to receive and respond with the appropriate protocol.</text:p>
      <text:p text:style-name="P6"/>
      <text:p text:style-name="P10"><text:soft-page-break/>Q3: <text:span text:style-name="T1">Ping</text:span></text:p>
      <text:p text:style-name="P6"/>
      <text:p text:style-name="P13"><text:span text:style-name="T7">Average delay to </text:span>uva.nl <text:span text:style-name="T7">(</text:span>University of Amsterdam<text:span text:style-name="T7">) is 5.092m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7T10:07:56.306776000</meta:creation-date>
    <dc:date>2026-01-14T10:34:23.163461000</dc:date>
    <meta:editing-duration>P2DT14H19M44S</meta:editing-duration>
    <meta:editing-cycles>3</meta:editing-cycles>
    <meta:generator>LibreOffice/25.8.2.2$MacOSX_AARCH64 LibreOffice_project/d401f2107ccab8f924a8e2df40f573aab7605b6f</meta:generator>
    <meta:document-statistic meta:table-count="0" meta:image-count="1" meta:object-count="0" meta:page-count="2" meta:paragraph-count="18" meta:word-count="214" meta:character-count="1278" meta:non-whitespace-character-count="1078"/>
  </office:meta>
</office:document-meta>
</file>