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6.6307in" svg:y="3.7843in">
            <draw:object draw:notify-on-update-of-ranges="Sheet1.A26:Sheet1.A40 Sheet1.A24:Sheet1.A24 Sheet1.B26:Sheet1.B40 Sheet1.C26:Sheet1.C40 Sheet1.C24:Sheet1.C24 Sheet1.D26:Sheet1.D40 Sheet1.E26:Sheet1.E40 Sheet1.E24:Sheet1.E24 Sheet1.F26:Sheet1.F40 Sheet1.G26:Sheet1.G40 Sheet1.G24:Sheet1.G24 Sheet1.H26:Sheet1.H40 Sheet1.I26:Sheet1.I40 Sheet1.I24:Sheet1.I24 Sheet1.J26:Sheet1.J40 Sheet1.C26:Sheet1.C40 Sheet1.K24:Sheet1.K24 Sheet1.L26:Sheet1.L40 Sheet1.M26:Sheet1.M40 Sheet1.M24:Sheet1.M24 Sheet1.N26:Sheet1.N40 Sheet1.O26:Sheet1.O40 Sheet1.O24:Sheet1.O24 Sheet1.P26:Sheet1.P40 Sheet1.P26:Sheet1.P40 Sheet1.Q24:Sheet1.Q24 Sheet1.R26:Sheet1.R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4181in" svg:y="13.0528in">
            <draw:object draw:notify-on-update-of-ranges="Sheet1.A63:Sheet1.A73 Sheet1.A61:Sheet1.A61 Sheet1.B63:Sheet1.B73 Sheet1.C63:Sheet1.C73 Sheet1.C61:Sheet1.C61 Sheet1.D63:Sheet1.D73 Sheet1.E63:Sheet1.E73 Sheet1.E61:Sheet1.E61 Sheet1.F63:Sheet1.F73 Sheet1.G63:Sheet1.G73 Sheet1.G61:Sheet1.G61 Sheet1.H63:Sheet1.H73 Sheet1.I63:Sheet1.I73 Sheet1.I61:Sheet1.I61 Sheet1.J63:Sheet1.J73 Sheet1.K63:Sheet1.K73 Sheet1.K61:Sheet1.K61 Sheet1.L63:Sheet1.L73 Sheet1.M63:Sheet1.M73 Sheet1.M61:Sheet1.M61 Sheet1.N63:Sheet1.N73 Sheet1.O63:Sheet1.O73 Sheet1.O61:Sheet1.O61 Sheet1.P63:Sheet1.P7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re-fix mergesort iss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 (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1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5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10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50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1000 thresh)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29011" calcext:value-type="float">
            <text:p>2.90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408684" calcext:value-type="float">
            <text:p>4.09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390839" calcext:value-type="float">
            <text:p>3.91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408959" calcext:value-type="float">
            <text:p>4.09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389085" calcext:value-type="float">
            <text:p>3.89E-04</text:p>
          </table:table-cell>
          <table:table-cell table:number-columns-repeated="10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0.000585075" calcext:value-type="float">
            <text:p>5.85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86791" calcext:value-type="float">
            <text:p>1.87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92316" calcext:value-type="float">
            <text:p>1.92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99159" calcext:value-type="float">
            <text:p>1.99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208832" calcext:value-type="float">
            <text:p>2.09E-04</text:p>
          </table:table-cell>
          <table:table-cell table:number-columns-repeated="10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0.000234167" calcext:value-type="float">
            <text:p>2.34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28809" calcext:value-type="float">
            <text:p>5.29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13741" calcext:value-type="float">
            <text:p>5.14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4742" calcext:value-type="float">
            <text:p>5.47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70511" calcext:value-type="float">
            <text:p>5.71E-04</text:p>
          </table:table-cell>
          <table:table-cell table:number-columns-repeated="10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1" office:value-type="float" office:value="0.000496363" calcext:value-type="float">
            <text:p>4.96E-04</text:p>
          </table:table-cell>
          <table:table-cell office:value-type="float" office:value="8192" calcext:value-type="float">
            <text:p>8192</text:p>
          </table:table-cell>
          <table:table-cell office:value-type="float" office:value="0.001679979" calcext:value-type="float">
            <text:p>0.001679979</text:p>
          </table:table-cell>
          <table:table-cell office:value-type="float" office:value="8192" calcext:value-type="float">
            <text:p>8192</text:p>
          </table:table-cell>
          <table:table-cell office:value-type="float" office:value="0.001629692" calcext:value-type="float">
            <text:p>0.001629692</text:p>
          </table:table-cell>
          <table:table-cell office:value-type="float" office:value="8192" calcext:value-type="float">
            <text:p>8192</text:p>
          </table:table-cell>
          <table:table-cell office:value-type="float" office:value="0.001673065" calcext:value-type="float">
            <text:p>0.001673065</text:p>
          </table:table-cell>
          <table:table-cell office:value-type="float" office:value="8192" calcext:value-type="float">
            <text:p>8192</text:p>
          </table:table-cell>
          <table:table-cell office:value-type="float" office:value="0.00173266" calcext:value-type="float">
            <text:p>0.00173266</text:p>
          </table:table-cell>
          <table:table-cell table:number-columns-repeated="10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0922" calcext:value-type="float">
            <text:p>0.0010922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62586" calcext:value-type="float">
            <text:p>0.00562586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288885" calcext:value-type="float">
            <text:p>0.005288885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660712" calcext:value-type="float">
            <text:p>0.005660712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817085" calcext:value-type="float">
            <text:p>0.005817085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255037" calcext:value-type="float">
            <text:p>0.002255037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1179352" calcext:value-type="float">
            <text:p>0.021179352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309944" calcext:value-type="float">
            <text:p>0.02030994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420394" calcext:value-type="float">
            <text:p>0.02042039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907982" calcext:value-type="float">
            <text:p>0.020907982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489083" calcext:value-type="float">
            <text:p>0.00489083</text:p>
          </table:table-cell>
          <table:table-cell office:value-type="float" office:value="65536" calcext:value-type="float">
            <text:p>65536</text:p>
          </table:table-cell>
          <table:table-cell office:value-type="float" office:value="0.079721717" calcext:value-type="float">
            <text:p>0.079721717</text:p>
          </table:table-cell>
          <table:table-cell office:value-type="float" office:value="65536" calcext:value-type="float">
            <text:p>65536</text:p>
          </table:table-cell>
          <table:table-cell office:value-type="float" office:value="0.076021788" calcext:value-type="float">
            <text:p>0.076021788</text:p>
          </table:table-cell>
          <table:table-cell office:value-type="float" office:value="65536" calcext:value-type="float">
            <text:p>65536</text:p>
          </table:table-cell>
          <table:table-cell office:value-type="float" office:value="0.079968503" calcext:value-type="float">
            <text:p>0.079968503</text:p>
          </table:table-cell>
          <table:table-cell office:value-type="float" office:value="65536" calcext:value-type="float">
            <text:p>65536</text:p>
          </table:table-cell>
          <table:table-cell office:value-type="float" office:value="0.112843523" calcext:value-type="float">
            <text:p>0.112843523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0646256" calcext:value-type="float">
            <text:p>0.010646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27246689" calcext:value-type="float">
            <text:p>0.327246689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09268316" calcext:value-type="float">
            <text:p>0.3092683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12953525" calcext:value-type="float">
            <text:p>0.3129535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1984327" calcext:value-type="float">
            <text:p>0.31984327</text:p>
          </table:table-cell>
          <table:table-cell table:number-columns-repeated="1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1<text:span text:style-name="T1">st</text:span> capture, when I think I might have hit the threshold and started calling both sorts, hence why it always increased…?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 (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1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5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10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500 thresh)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29011" calcext:value-type="float">
            <text:p>2.90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408684" calcext:value-type="float">
            <text:p>4.09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390839" calcext:value-type="float">
            <text:p>3.91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408959" calcext:value-type="float">
            <text:p>4.09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389085" calcext:value-type="float">
            <text:p>3.89E-04</text:p>
          </table:table-cell>
          <table:table-cell table:number-columns-repeated="10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0.000585075" calcext:value-type="float">
            <text:p>5.85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86791" calcext:value-type="float">
            <text:p>1.87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92316" calcext:value-type="float">
            <text:p>1.92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99159" calcext:value-type="float">
            <text:p>1.99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208832" calcext:value-type="float">
            <text:p>2.09E-04</text:p>
          </table:table-cell>
          <table:table-cell table:number-columns-repeated="10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0.000234167" calcext:value-type="float">
            <text:p>2.34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28809" calcext:value-type="float">
            <text:p>5.29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13741" calcext:value-type="float">
            <text:p>5.14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4742" calcext:value-type="float">
            <text:p>5.47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70511" calcext:value-type="float">
            <text:p>5.71E-04</text:p>
          </table:table-cell>
          <table:table-cell table:number-columns-repeated="10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1" office:value-type="float" office:value="0.000496363" calcext:value-type="float">
            <text:p>4.96E-04</text:p>
          </table:table-cell>
          <table:table-cell office:value-type="float" office:value="8192" calcext:value-type="float">
            <text:p>8192</text:p>
          </table:table-cell>
          <table:table-cell office:value-type="float" office:value="0.001679979" calcext:value-type="float">
            <text:p>0.001679979</text:p>
          </table:table-cell>
          <table:table-cell office:value-type="float" office:value="8192" calcext:value-type="float">
            <text:p>8192</text:p>
          </table:table-cell>
          <table:table-cell office:value-type="float" office:value="0.001629692" calcext:value-type="float">
            <text:p>0.001629692</text:p>
          </table:table-cell>
          <table:table-cell office:value-type="float" office:value="8192" calcext:value-type="float">
            <text:p>8192</text:p>
          </table:table-cell>
          <table:table-cell office:value-type="float" office:value="0.001673065" calcext:value-type="float">
            <text:p>0.001673065</text:p>
          </table:table-cell>
          <table:table-cell office:value-type="float" office:value="8192" calcext:value-type="float">
            <text:p>8192</text:p>
          </table:table-cell>
          <table:table-cell office:value-type="float" office:value="0.00173266" calcext:value-type="float">
            <text:p>0.00173266</text:p>
          </table:table-cell>
          <table:table-cell table:number-columns-repeated="10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0922" calcext:value-type="float">
            <text:p>0.0010922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62586" calcext:value-type="float">
            <text:p>0.00562586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288885" calcext:value-type="float">
            <text:p>0.005288885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660712" calcext:value-type="float">
            <text:p>0.005660712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817085" calcext:value-type="float">
            <text:p>0.005817085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255037" calcext:value-type="float">
            <text:p>0.002255037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1179352" calcext:value-type="float">
            <text:p>0.021179352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309944" calcext:value-type="float">
            <text:p>0.02030994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420394" calcext:value-type="float">
            <text:p>0.02042039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907982" calcext:value-type="float">
            <text:p>0.020907982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489083" calcext:value-type="float">
            <text:p>0.00489083</text:p>
          </table:table-cell>
          <table:table-cell office:value-type="float" office:value="65536" calcext:value-type="float">
            <text:p>65536</text:p>
          </table:table-cell>
          <table:table-cell office:value-type="float" office:value="0.079721717" calcext:value-type="float">
            <text:p>0.079721717</text:p>
          </table:table-cell>
          <table:table-cell office:value-type="float" office:value="65536" calcext:value-type="float">
            <text:p>65536</text:p>
          </table:table-cell>
          <table:table-cell office:value-type="float" office:value="0.076021788" calcext:value-type="float">
            <text:p>0.076021788</text:p>
          </table:table-cell>
          <table:table-cell office:value-type="float" office:value="65536" calcext:value-type="float">
            <text:p>65536</text:p>
          </table:table-cell>
          <table:table-cell office:value-type="float" office:value="0.079968503" calcext:value-type="float">
            <text:p>0.079968503</text:p>
          </table:table-cell>
          <table:table-cell office:value-type="float" office:value="65536" calcext:value-type="float">
            <text:p>65536</text:p>
          </table:table-cell>
          <table:table-cell office:value-type="float" office:value="0.112843523" calcext:value-type="float">
            <text:p>0.112843523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0646256" calcext:value-type="float">
            <text:p>0.010646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27246689" calcext:value-type="float">
            <text:p>0.327246689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09268316" calcext:value-type="float">
            <text:p>0.3092683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12953525" calcext:value-type="float">
            <text:p>0.3129535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1984327" calcext:value-type="float">
            <text:p>0.31984327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0 threshold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100000" calcext:value-type="float">
            <text:p>100000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string" calcext:value-type="string">
            <text:p>10^7</text:p>
          </table:table-cell>
          <table:table-cell/>
          <table:table-cell office:value-type="string" calcext:value-type="string">
            <text:p>10^8 (all insertion sor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47999" calcext:value-type="float">
            <text:p>4.80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38783" calcext:value-type="float">
            <text:p>3.88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46673" calcext:value-type="float">
            <text:p>4.67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21661" calcext:value-type="float">
            <text:p>2.17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3342" calcext:value-type="float">
            <text:p>3.34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3327" calcext:value-type="float">
            <text:p>3.33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3337" calcext:value-type="float">
            <text:p>3.34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3229" calcext:value-type="float">
            <text:p>3.23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3247" calcext:value-type="float">
            <text:p>3.25E-05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0.00057773" calcext:value-type="float">
            <text:p>5.78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8096" calcext:value-type="float">
            <text:p>8.10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23779" calcext:value-type="float">
            <text:p>2.38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42241" calcext:value-type="float">
            <text:p>4.22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2918" calcext:value-type="float">
            <text:p>2.92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2855" calcext:value-type="float">
            <text:p>2.86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2821" calcext:value-type="float">
            <text:p>2.82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2832" calcext:value-type="float">
            <text:p>2.83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2831" calcext:value-type="float">
            <text:p>2.83E-05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0.00023302" calcext:value-type="float">
            <text:p>2.33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17483" calcext:value-type="float">
            <text:p>1.75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63748" calcext:value-type="float">
            <text:p>6.37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4947" calcext:value-type="float">
            <text:p>5.49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5143" calcext:value-type="float">
            <text:p>5.14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5142" calcext:value-type="float">
            <text:p>5.14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5359" calcext:value-type="float">
            <text:p>5.36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5135" calcext:value-type="float">
            <text:p>5.14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5114" calcext:value-type="float">
            <text:p>5.11E-05</text:p>
          </table:table-cell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1" office:value-type="float" office:value="0.00051203" calcext:value-type="float">
            <text:p>5.12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38917" calcext:value-type="float">
            <text:p>3.89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26805" calcext:value-type="float">
            <text:p>2.68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6281" calcext:value-type="float">
            <text:p>6.28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4474" calcext:value-type="float">
            <text:p>4.47E-05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4419" calcext:value-type="float">
            <text:p>4.42E-05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4622" calcext:value-type="float">
            <text:p>4.62E-05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4927" calcext:value-type="float">
            <text:p>4.93E-05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4602" calcext:value-type="float">
            <text:p>4.60E-05</text:p>
          </table:table-cell>
          <table:table-cell table:number-columns-repeated="2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04066" calcext:value-type="float">
            <text:p>0.00104066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81348" calcext:value-type="float">
            <text:p>8.13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58695" calcext:value-type="float">
            <text:p>5.87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37617" calcext:value-type="float">
            <text:p>3.76E-04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13359" calcext:value-type="float">
            <text:p>0.00113359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07742" calcext:value-type="float">
            <text:p>7.74E-05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07692" calcext:value-type="float">
            <text:p>7.69E-05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07766" calcext:value-type="float">
            <text:p>7.77E-05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07739" calcext:value-type="float">
            <text:p>7.74E-05</text:p>
          </table:table-cell>
          <table:table-cell table:number-columns-repeated="2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32148" calcext:value-type="float">
            <text:p>0.00232148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83381" calcext:value-type="float">
            <text:p>0.00183381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30993" calcext:value-type="float">
            <text:p>0.00130993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87736" calcext:value-type="float">
            <text:p>8.77E-0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3589" calcext:value-type="float">
            <text:p>0.0013589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12852" calcext:value-type="float">
            <text:p>1.29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10723" calcext:value-type="float">
            <text:p>1.07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1065" calcext:value-type="float">
            <text:p>1.07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12143" calcext:value-type="float">
            <text:p>1.21E-04</text:p>
          </table:table-cell>
          <table:table-cell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487687" calcext:value-type="float">
            <text:p>0.00487687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396164" calcext:value-type="float">
            <text:p>0.00396164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29245" calcext:value-type="float">
            <text:p>0.0029245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203201" calcext:value-type="float">
            <text:p>0.00203201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314913" calcext:value-type="float">
            <text:p>0.00314913</text:p>
          </table:table-cell>
          <table:table-cell office:value-type="float" office:value="65536" calcext:value-type="float">
            <text:p>65536</text:p>
          </table:table-cell>
          <table:table-cell table:style-name="ce1" office:value-type="float" office:value="0.00018722" calcext:value-type="float">
            <text:p>1.87E-04</text:p>
          </table:table-cell>
          <table:table-cell office:value-type="float" office:value="65536" calcext:value-type="float">
            <text:p>65536</text:p>
          </table:table-cell>
          <table:table-cell table:style-name="ce1" office:value-type="float" office:value="0.00017102" calcext:value-type="float">
            <text:p>1.71E-04</text:p>
          </table:table-cell>
          <table:table-cell office:value-type="float" office:value="65536" calcext:value-type="float">
            <text:p>65536</text:p>
          </table:table-cell>
          <table:table-cell table:style-name="ce1" office:value-type="float" office:value="0.00016889" calcext:value-type="float">
            <text:p>1.69E-04</text:p>
          </table:table-cell>
          <table:table-cell office:value-type="float" office:value="65536" calcext:value-type="float">
            <text:p>65536</text:p>
          </table:table-cell>
          <table:table-cell table:style-name="ce1" office:value-type="float" office:value="0.00017338" calcext:value-type="float">
            <text:p>1.73E-04</text:p>
          </table:table-cell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052219" calcext:value-type="float">
            <text:p>0.01052219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864501" calcext:value-type="float">
            <text:p>0.00864501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662065" calcext:value-type="float">
            <text:p>0.00662065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469254" calcext:value-type="float">
            <text:p>0.00469254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263776" calcext:value-type="float">
            <text:p>0.0026377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10524" calcext:value-type="float">
            <text:p>0.00310524</text:p>
          </table:table-cell>
          <table:table-cell office:value-type="float" office:value="131072" calcext:value-type="float">
            <text:p>131072</text:p>
          </table:table-cell>
          <table:table-cell table:style-name="ce1" office:value-type="float" office:value="0.00045136" calcext:value-type="float">
            <text:p>4.51E-04</text:p>
          </table:table-cell>
          <table:table-cell office:value-type="float" office:value="131072" calcext:value-type="float">
            <text:p>131072</text:p>
          </table:table-cell>
          <table:table-cell table:style-name="ce1" office:value-type="float" office:value="0.00037249" calcext:value-type="float">
            <text:p>3.72E-04</text:p>
          </table:table-cell>
          <table:table-cell office:value-type="float" office:value="131072" calcext:value-type="float">
            <text:p>131072</text:p>
          </table:table-cell>
          <table:table-cell table:style-name="ce1" office:value-type="float" office:value="0.00036688" calcext:value-type="float">
            <text:p>3.67E-04</text:p>
          </table:table-cell>
          <table:table-cell table:number-columns-repeated="2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212609" calcext:value-type="float">
            <text:p>0.02212609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826014" calcext:value-type="float">
            <text:p>0.018260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39531" calcext:value-type="float">
            <text:p>0.0139531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059883" calcext:value-type="float">
            <text:p>0.01059883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613327" calcext:value-type="float">
            <text:p>0.00613327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381534" calcext:value-type="float">
            <text:p>0.00381534</text:p>
          </table:table-cell>
          <table:table-cell office:value-type="float" office:value="262144" calcext:value-type="float">
            <text:p>262144</text:p>
          </table:table-cell>
          <table:table-cell table:style-name="ce1" office:value-type="float" office:value="0.00045156" calcext:value-type="float">
            <text:p>4.52E-04</text:p>
          </table:table-cell>
          <table:table-cell office:value-type="float" office:value="262144" calcext:value-type="float">
            <text:p>262144</text:p>
          </table:table-cell>
          <table:table-cell table:style-name="ce1" office:value-type="float" office:value="0.00044946" calcext:value-type="float">
            <text:p>4.49E-04</text:p>
          </table:table-cell>
          <table:table-cell office:value-type="float" office:value="262144" calcext:value-type="float">
            <text:p>262144</text:p>
          </table:table-cell>
          <table:table-cell table:style-name="ce1" office:value-type="float" office:value="0.00048174" calcext:value-type="float">
            <text:p>4.82E-04</text:p>
          </table:table-cell>
          <table:table-cell table:number-columns-repeated="2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0001624" calcext:value-type="float">
            <text:p>0.100016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8567457" calcext:value-type="float">
            <text:p>0.08567457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6843435" calcext:value-type="float">
            <text:p>0.06843435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5340237" calcext:value-type="float">
            <text:p>0.05340237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3393615" calcext:value-type="float">
            <text:p>0.03393615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814354" calcext:value-type="float">
            <text:p>0.01814354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14842" calcext:value-type="float">
            <text:p>0.0014842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147569" calcext:value-type="float">
            <text:p>0.00147569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149237" calcext:value-type="float">
            <text:p>0.00149237</text:p>
          </table:table-cell>
          <table:table-cell table:number-columns-repeated="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1242948" calcext:value-type="float">
            <text:p>0.2124294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8405969" calcext:value-type="float">
            <text:p>0.1840596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5116227" calcext:value-type="float">
            <text:p>0.1511622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2002983" calcext:value-type="float">
            <text:p>0.1200298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8188674" calcext:value-type="float">
            <text:p>0.0818867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4984005" calcext:value-type="float">
            <text:p>0.0498400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3943228" calcext:value-type="float">
            <text:p>0.0394322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2112481" calcext:value-type="float">
            <text:p>0.0211248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1567669" calcext:value-type="float">
            <text:p>0.01567669</text:p>
          </table:table-cell>
          <table:table-cell table:number-columns-repeated="2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44316271" calcext:value-type="float">
            <text:p>0.44316271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38144665" calcext:value-type="float">
            <text:p>0.38144665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32453972" calcext:value-type="float">
            <text:p>0.3245397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26117468" calcext:value-type="float">
            <text:p>0.26117468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175047" calcext:value-type="float">
            <text:p>0.175047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11824276" calcext:value-type="float">
            <text:p>0.11824276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05450765" calcext:value-type="float">
            <text:p>0.05450765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01897299" calcext:value-type="float">
            <text:p>0.01897299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00926839" calcext:value-type="float">
            <text:p>0.00926839</text:p>
          </table:table-cell>
          <table:table-cell table:number-columns-repeated="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92825489" calcext:value-type="float">
            <text:p>0.9282548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80587715" calcext:value-type="float">
            <text:p>0.8058771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68790225" calcext:value-type="float">
            <text:p>0.6879022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55281258" calcext:value-type="float">
            <text:p>0.5528125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39244235" calcext:value-type="float">
            <text:p>0.3924423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28653811" calcext:value-type="float">
            <text:p>0.2865381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15395144" calcext:value-type="float">
            <text:p>0.1539514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01927864" calcext:value-type="float">
            <text:p>0.0192786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03607466" calcext:value-type="float">
            <text:p>0.03607466</text:p>
          </table:table-cell>
          <table:table-cell table:number-columns-repeated="2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.94423625" calcext:value-type="float">
            <text:p>1.94423625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.69587297" calcext:value-type="float">
            <text:p>1.69587297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.48235481" calcext:value-type="float">
            <text:p>1.48235481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.18708863" calcext:value-type="float">
            <text:p>1.18708863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88385134" calcext:value-type="float">
            <text:p>0.88385134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6209824" calcext:value-type="float">
            <text:p>0.6209824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37408696" calcext:value-type="float">
            <text:p>0.37408696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03609886" calcext:value-type="float">
            <text:p>0.03609886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0481072" calcext:value-type="float">
            <text:p>0.0481072</text:p>
          </table:table-cell>
          <table:table-cell table:number-columns-repeated="2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4.07791845" calcext:value-type="float">
            <text:p>4.07791845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3.53209748" calcext:value-type="float">
            <text:p>3.53209748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3.17620311" calcext:value-type="float">
            <text:p>3.17620311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2.56023466" calcext:value-type="float">
            <text:p>2.56023466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.88502364" calcext:value-type="float">
            <text:p>1.88502364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.4433003" calcext:value-type="float">
            <text:p>1.4433003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0.90360528" calcext:value-type="float">
            <text:p>0.90360528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0.29360866" calcext:value-type="float">
            <text:p>0.29360866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0.06195102" calcext:value-type="float">
            <text:p>0.061951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0 threshold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277207" calcext:value-type="float">
            <text:p>2.77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197139" calcext:value-type="float">
            <text:p>1.97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155864" calcext:value-type="float">
            <text:p>1.56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133336" calcext:value-type="float">
            <text:p>1.33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120997" calcext:value-type="float">
            <text:p>1.21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92302" calcext:value-type="float">
            <text:p>9.23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14451" calcext:value-type="float">
            <text:p>1.45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1522" calcext:value-type="float">
            <text:p>1.52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155" calcext:value-type="float">
            <text:p>1.55E-05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0.000112309" calcext:value-type="float">
            <text:p>1.12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76837" calcext:value-type="float">
            <text:p>7.68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322893" calcext:value-type="float">
            <text:p>3.23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27563" calcext:value-type="float">
            <text:p>2.76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73113" calcext:value-type="float">
            <text:p>1.73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18983" calcext:value-type="float">
            <text:p>1.19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15966" calcext:value-type="float">
            <text:p>1.60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1071" calcext:value-type="float">
            <text:p>1.07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10971" calcext:value-type="float">
            <text:p>1.10E-05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0.000237842" calcext:value-type="float">
            <text:p>2.38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17671" calcext:value-type="float">
            <text:p>1.77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134287" calcext:value-type="float">
            <text:p>1.34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118915" calcext:value-type="float">
            <text:p>1.19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84457" calcext:value-type="float">
            <text:p>8.45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65317" calcext:value-type="float">
            <text:p>6.53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11219" calcext:value-type="float">
            <text:p>1.12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15012" calcext:value-type="float">
            <text:p>1.50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16546" calcext:value-type="float">
            <text:p>1.65E-05</text:p>
          </table:table-cell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1" office:value-type="float" office:value="0.000510842" calcext:value-type="float">
            <text:p>5.11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371534" calcext:value-type="float">
            <text:p>3.72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305592" calcext:value-type="float">
            <text:p>3.06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278908" calcext:value-type="float">
            <text:p>2.79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210128" calcext:value-type="float">
            <text:p>2.10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168162" calcext:value-type="float">
            <text:p>1.68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292018" calcext:value-type="float">
            <text:p>2.92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20612" calcext:value-type="float">
            <text:p>2.06E-05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20829" calcext:value-type="float">
            <text:p>2.08E-05</text:p>
          </table:table-cell>
          <table:table-cell/>
          <table:table-cell office:value-type="string" calcext:value-type="string">
            <text:p>…. this is the same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126009" calcext:value-type="float">
            <text:p>0.001126009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838976" calcext:value-type="float">
            <text:p>8.39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710694" calcext:value-type="float">
            <text:p>7.11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641252" calcext:value-type="float">
            <text:p>6.41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510956" calcext:value-type="float">
            <text:p>5.11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415777" calcext:value-type="float">
            <text:p>4.16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403375" calcext:value-type="float">
            <text:p>4.03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358855" calcext:value-type="float">
            <text:p>3.59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042791" calcext:value-type="float">
            <text:p>4.28E-05</text:p>
          </table:table-cell>
          <table:table-cell/>
          <table:table-cell office:value-type="string" calcext:value-type="string">
            <text:p>No gain from mergeSort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38838" calcext:value-type="float">
            <text:p>0.00238838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79061" calcext:value-type="float">
            <text:p>0.00179061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583939" calcext:value-type="float">
            <text:p>0.001583939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505713" calcext:value-type="float">
            <text:p>0.001505713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265281" calcext:value-type="float">
            <text:p>0.001265281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068111" calcext:value-type="float">
            <text:p>0.001068111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58781" calcext:value-type="float">
            <text:p>5.88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423476" calcext:value-type="float">
            <text:p>4.23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03501" calcext:value-type="float">
            <text:p>3.50E-05</text:p>
          </table:table-cell>
          <table:table-cell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5052414" calcext:value-type="float">
            <text:p>0.005052414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4113264" calcext:value-type="float">
            <text:p>0.004113264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3695027" calcext:value-type="float">
            <text:p>0.003695027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3412795" calcext:value-type="float">
            <text:p>0.003412795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2725405" calcext:value-type="float">
            <text:p>0.002725405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2322628" calcext:value-type="float">
            <text:p>0.002322628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29884" calcext:value-type="float">
            <text:p>0.00129884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022594" calcext:value-type="float">
            <text:p>0.001022594</text:p>
          </table:table-cell>
          <table:table-cell office:value-type="float" office:value="65536" calcext:value-type="float">
            <text:p>65536</text:p>
          </table:table-cell>
          <table:table-cell table:style-name="ce1" office:value-type="float" office:value="0.00008636" calcext:value-type="float">
            <text:p>8.64E-05</text:p>
          </table:table-cell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0763625" calcext:value-type="float">
            <text:p>0.0107636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9172916" calcext:value-type="float">
            <text:p>0.0091729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8564464" calcext:value-type="float">
            <text:p>0.0085644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8679032" calcext:value-type="float">
            <text:p>0.0086790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8952428" calcext:value-type="float">
            <text:p>0.0089524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7996247" calcext:value-type="float">
            <text:p>0.0079962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5332082" calcext:value-type="float">
            <text:p>0.005332082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4565441" calcext:value-type="float">
            <text:p>0.004565441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1691779" calcext:value-type="float">
            <text:p>0.001691779</text:p>
          </table:table-cell>
          <table:table-cell table:number-columns-repeated="2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3023288" calcext:value-type="float">
            <text:p>0.023023288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8713684" calcext:value-type="float">
            <text:p>0.018713684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8065124" calcext:value-type="float">
            <text:p>0.0180651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763374" calcext:value-type="float">
            <text:p>0.01763374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5520171" calcext:value-type="float">
            <text:p>0.015520171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3725704" calcext:value-type="float">
            <text:p>0.013725704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9114286" calcext:value-type="float">
            <text:p>0.009114286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815717" calcext:value-type="float">
            <text:p>0.00815717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367616" calcext:value-type="float">
            <text:p>0.00367616</text:p>
          </table:table-cell>
          <table:table-cell table:number-columns-repeated="2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03088801" calcext:value-type="float">
            <text:p>0.103088801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88501461" calcext:value-type="float">
            <text:p>0.088501461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80869739" calcext:value-type="float">
            <text:p>0.080869739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76830453" calcext:value-type="float">
            <text:p>0.076830453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66549053" calcext:value-type="float">
            <text:p>0.066549053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62137603" calcext:value-type="float">
            <text:p>0.062137603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4293137" calcext:value-type="float">
            <text:p>0.04293137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37441451" calcext:value-type="float">
            <text:p>0.037441451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21370435" calcext:value-type="float">
            <text:p>0.021370435</text:p>
          </table:table-cell>
          <table:table-cell table:number-columns-repeated="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25065663" calcext:value-type="float">
            <text:p>0.22506566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93244978" calcext:value-type="float">
            <text:p>0.19324497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70248586" calcext:value-type="float">
            <text:p>0.17024858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64907916" calcext:value-type="float">
            <text:p>0.1649079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52674831" calcext:value-type="float">
            <text:p>0.15267483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47436434" calcext:value-type="float">
            <text:p>0.14743643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24804089" calcext:value-type="float">
            <text:p>0.12480408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14685216" calcext:value-type="float">
            <text:p>0.1146852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5730931" calcext:value-type="float">
            <text:p>0.0573093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097152" calcext:value-type="float">
            <text:p>2097152</text:p>
          </table:table-cell>
          <table:table-cell office:value-type="float" office:value="0.39778255" calcext:value-type="float">
            <text:p>0.39778255</text:p>
          </table:table-cell>
          <table:table-cell table:number-columns-repeated="4"/>
          <table:table-cell office:value-type="float" office:value="2097152" calcext:value-type="float">
            <text:p>2097152</text:p>
          </table:table-cell>
          <table:table-cell office:value-type="float" office:value="0.214017591" calcext:value-type="float">
            <text:p>0.21401759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4194304" calcext:value-type="float">
            <text:p>4194304</text:p>
          </table:table-cell>
          <table:table-cell office:value-type="float" office:value="1.016542354" calcext:value-type="float">
            <text:p>1.016542354</text:p>
          </table:table-cell>
          <table:table-cell table:number-columns-repeated="4"/>
          <table:table-cell office:value-type="float" office:value="4194304" calcext:value-type="float">
            <text:p>4194304</text:p>
          </table:table-cell>
          <table:table-cell office:value-type="float" office:value="0.47658812" calcext:value-type="float">
            <text:p>0.476588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388608" calcext:value-type="float">
            <text:p>8388608</text:p>
          </table:table-cell>
          <table:table-cell office:value-type="float" office:value="2.233665202" calcext:value-type="float">
            <text:p>2.233665202</text:p>
          </table:table-cell>
          <table:table-cell table:number-columns-repeated="4"/>
          <table:table-cell office:value-type="float" office:value="8388608" calcext:value-type="float">
            <text:p>8388608</text:p>
          </table:table-cell>
          <table:table-cell office:value-type="float" office:value="1.438724152" calcext:value-type="float">
            <text:p>1.438724152</text:p>
          </table:table-cell>
          <table:table-cell table:number-columns-repeated="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Adjusting – re-initializing every tim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 threshold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50" calcext:value-type="float">
            <text:p>250</text:p>
          </table:table-cell>
          <table:table-cell/>
          <table:table-cell office:value-type="float" office:value="375" calcext:value-type="float">
            <text:p>375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21031541" calcext:value-type="float">
            <text:p>2.10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14672042" calcext:value-type="float">
            <text:p>1.47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1126425" calcext:value-type="float">
            <text:p>1.13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9619457" calcext:value-type="float">
            <text:p>9.62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8104957" calcext:value-type="float">
            <text:p>8.10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8817292" calcext:value-type="float">
            <text:p>8.82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7499917" calcext:value-type="float">
            <text:p>7.50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7427791" calcext:value-type="float">
            <text:p>7.43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5401458" calcext:value-type="float">
            <text:p>5.40E-05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0.00010121791" calcext:value-type="float">
            <text:p>1.01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27872084" calcext:value-type="float">
            <text:p>2.79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9297791" calcext:value-type="float">
            <text:p>9.30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2891083" calcext:value-type="float">
            <text:p>2.89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2682625" calcext:value-type="float">
            <text:p>2.68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2686207" calcext:value-type="float">
            <text:p>2.69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8592876" calcext:value-type="float">
            <text:p>8.59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1809084" calcext:value-type="float">
            <text:p>1.81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986125" calcext:value-type="float">
            <text:p>9.86E-05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0.00023148625" calcext:value-type="float">
            <text:p>2.31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11016582" calcext:value-type="float">
            <text:p>1.10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8742584" calcext:value-type="float">
            <text:p>8.74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6967959" calcext:value-type="float">
            <text:p>6.97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6016583" calcext:value-type="float">
            <text:p>6.02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5828125" calcext:value-type="float">
            <text:p>5.83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4912918" calcext:value-type="float">
            <text:p>4.91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5015292" calcext:value-type="float">
            <text:p>5.02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34805" calcext:value-type="float">
            <text:p>3.48E-05</text:p>
          </table:table-cell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1" office:value-type="float" office:value="0.00050176125" calcext:value-type="float">
            <text:p>5.02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25496624" calcext:value-type="float">
            <text:p>2.55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20331291" calcext:value-type="float">
            <text:p>2.03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24029208" calcext:value-type="float">
            <text:p>2.40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14057584" calcext:value-type="float">
            <text:p>1.41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14070625" calcext:value-type="float">
            <text:p>1.41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11450875" calcext:value-type="float">
            <text:p>1.15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11409916" calcext:value-type="float">
            <text:p>1.14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9263124" calcext:value-type="float">
            <text:p>9.26E-05</text:p>
          </table:table-cell>
          <table:table-cell table:number-columns-repeated="2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28022041" calcext:value-type="float">
            <text:p>0.00128022041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68559957" calcext:value-type="float">
            <text:p>6.86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51503" calcext:value-type="float">
            <text:p>5.15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40954166" calcext:value-type="float">
            <text:p>4.10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34220249" calcext:value-type="float">
            <text:p>3.42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34774584" calcext:value-type="float">
            <text:p>3.48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28646999" calcext:value-type="float">
            <text:p>2.86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28591125" calcext:value-type="float">
            <text:p>2.86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23428041" calcext:value-type="float">
            <text:p>2.34E-04</text:p>
          </table:table-cell>
          <table:table-cell table:number-columns-repeated="2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84053875" calcext:value-type="float">
            <text:p>0.0028405387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45881876" calcext:value-type="float">
            <text:p>0.0014588187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08382375" calcext:value-type="float">
            <text:p>0.00108382375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86923791" calcext:value-type="float">
            <text:p>8.69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82606376" calcext:value-type="float">
            <text:p>8.26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74138916" calcext:value-type="float">
            <text:p>7.41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74914917" calcext:value-type="float">
            <text:p>7.49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64028416" calcext:value-type="float">
            <text:p>6.40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53501501" calcext:value-type="float">
            <text:p>5.35E-04</text:p>
          </table:table-cell>
          <table:table-cell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629654874" calcext:value-type="float">
            <text:p>0.00629654874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334974041" calcext:value-type="float">
            <text:p>0.00334974041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248884167" calcext:value-type="float">
            <text:p>0.00248884167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98434542" calcext:value-type="float">
            <text:p>0.00198434542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81628875" calcext:value-type="float">
            <text:p>0.00181628875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79981292" calcext:value-type="float">
            <text:p>0.00179981292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50826001" calcext:value-type="float">
            <text:p>0.00150826001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48581082" calcext:value-type="float">
            <text:p>0.00148581082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28182459" calcext:value-type="float">
            <text:p>0.00128182459</text:p>
          </table:table-cell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354941084" calcext:value-type="float">
            <text:p>0.01354941084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750022041" calcext:value-type="float">
            <text:p>0.00750022041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552945918" calcext:value-type="float">
            <text:p>0.00552945918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443779042" calcext:value-type="float">
            <text:p>0.00443779042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86940541" calcext:value-type="float">
            <text:p>0.00386940541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80326917" calcext:value-type="float">
            <text:p>0.00380326917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35200833" calcext:value-type="float">
            <text:p>0.003352008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53692917" calcext:value-type="float">
            <text:p>0.00353692917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292151457" calcext:value-type="float">
            <text:p>0.00292151457</text:p>
          </table:table-cell>
          <table:table-cell table:number-columns-repeated="2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5600144876" calcext:value-type="float">
            <text:p>0.05600144876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4159459376" calcext:value-type="float">
            <text:p>0.04159459376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369652334" calcext:value-type="float">
            <text:p>0.03369652334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28542175" calcext:value-type="float">
            <text:p>0.0328542175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616262209" calcext:value-type="float">
            <text:p>0.03616262209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408462333" calcext:value-type="float">
            <text:p>0.03408462333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4268399541" calcext:value-type="float">
            <text:p>0.04268399541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4956025" calcext:value-type="float">
            <text:p>0.034956025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4566292583" calcext:value-type="float">
            <text:p>0.04566292583</text:p>
          </table:table-cell>
          <table:table-cell table:number-columns-repeated="2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2648846916" calcext:value-type="float">
            <text:p>0.12648846916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9422217416" calcext:value-type="float">
            <text:p>0.09422217416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8690225666" calcext:value-type="float">
            <text:p>0.08690225666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8135120791" calcext:value-type="float">
            <text:p>0.08135120791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8856336666" calcext:value-type="float">
            <text:p>0.08856336666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8282043042" calcext:value-type="float">
            <text:p>0.08282043042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11186093709" calcext:value-type="float">
            <text:p>0.11186093709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9996953708" calcext:value-type="float">
            <text:p>0.09996953708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1277244525" calcext:value-type="float">
            <text:p>0.1277244525</text:p>
          </table:table-cell>
          <table:table-cell table:number-columns-repeated="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32682781917" calcext:value-type="float">
            <text:p>0.3268278191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77680515" calcext:value-type="float">
            <text:p>0.2776805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5174480416" calcext:value-type="float">
            <text:p>0.251744804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4658843584" calcext:value-type="float">
            <text:p>0.2465884358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5109631291" calcext:value-type="float">
            <text:p>0.2510963129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3967468791" calcext:value-type="float">
            <text:p>0.2396746879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4080100084" calcext:value-type="float">
            <text:p>0.2408010008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4306473875" calcext:value-type="float">
            <text:p>0.2430647387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6842623291" calcext:value-type="float">
            <text:p>0.26842623291</text:p>
          </table:table-cell>
          <table:table-cell table:number-columns-repeated="2"/>
        </table:table-row>
        <table:table-row table:style-name="ro1" table:number-rows-repeated="23">
          <table:table-cell table:number-columns-repeated="20"/>
        </table:table-row>
        <table:table-row table:style-name="ro1">
          <table:table-cell office:value-type="string" calcext:value-type="string">
            <text:p>first</text:p>
          </table:table-cell>
          <table:table-cell/>
          <table:table-cell office:value-type="string" calcext:value-type="string">
            <text:p>random</text:p>
          </table:table-cell>
          <table:table-cell/>
          <table:table-cell office:value-type="string" calcext:value-type="string">
            <text:p>median of 3</text:p>
          </table:table-cell>
          <table:table-cell/>
          <table:table-cell office:value-type="string" calcext:value-type="string">
            <text:p>Best + rando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1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21031541" calcext:value-type="float">
            <text:p>2.10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14672042" calcext:value-type="float">
            <text:p>1.47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1126425" calcext:value-type="float">
            <text:p>1.13E-04</text:p>
          </table:table-cell>
          <table:table-cell table:number-columns-repeated="1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0.00010121791" calcext:value-type="float">
            <text:p>1.01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27872084" calcext:value-type="float">
            <text:p>2.79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9297791" calcext:value-type="float">
            <text:p>9.30E-05</text:p>
          </table:table-cell>
          <table:table-cell table:number-columns-repeated="1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0.00023148625" calcext:value-type="float">
            <text:p>2.31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11016582" calcext:value-type="float">
            <text:p>1.10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8742584" calcext:value-type="float">
            <text:p>8.74E-05</text:p>
          </table:table-cell>
          <table:table-cell table:number-columns-repeated="1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1" office:value-type="float" office:value="0.00050176125" calcext:value-type="float">
            <text:p>5.02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25496624" calcext:value-type="float">
            <text:p>2.55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20331291" calcext:value-type="float">
            <text:p>2.03E-04</text:p>
          </table:table-cell>
          <table:table-cell table:number-columns-repeated="14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28022041" calcext:value-type="float">
            <text:p>0.00128022041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68559957" calcext:value-type="float">
            <text:p>6.86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51503" calcext:value-type="float">
            <text:p>5.15E-04</text:p>
          </table:table-cell>
          <table:table-cell table:number-columns-repeated="14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84053875" calcext:value-type="float">
            <text:p>0.0028405387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45881876" calcext:value-type="float">
            <text:p>0.0014588187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08382375" calcext:value-type="float">
            <text:p>0.00108382375</text:p>
          </table:table-cell>
          <table:table-cell table:number-columns-repeated="14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629654874" calcext:value-type="float">
            <text:p>0.00629654874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334974041" calcext:value-type="float">
            <text:p>0.00334974041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248884167" calcext:value-type="float">
            <text:p>0.00248884167</text:p>
          </table:table-cell>
          <table:table-cell table:number-columns-repeated="14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354941084" calcext:value-type="float">
            <text:p>0.01354941084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750022041" calcext:value-type="float">
            <text:p>0.00750022041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552945918" calcext:value-type="float">
            <text:p>0.00552945918</text:p>
          </table:table-cell>
          <table:table-cell table:number-columns-repeated="14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5600144876" calcext:value-type="float">
            <text:p>0.05600144876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4159459376" calcext:value-type="float">
            <text:p>0.04159459376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369652334" calcext:value-type="float">
            <text:p>0.03369652334</text:p>
          </table:table-cell>
          <table:table-cell table:number-columns-repeated="14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2648846916" calcext:value-type="float">
            <text:p>0.12648846916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9422217416" calcext:value-type="float">
            <text:p>0.09422217416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8690225666" calcext:value-type="float">
            <text:p>0.08690225666</text:p>
          </table:table-cell>
          <table:table-cell table:number-columns-repeated="14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32682781917" calcext:value-type="float">
            <text:p>0.3268278191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77680515" calcext:value-type="float">
            <text:p>0.2776805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5174480416" calcext:value-type="float">
            <text:p>0.25174480416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 style:data-style-name="N2" text:time-value="13:47:47.5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24T13:47:47.720000000</meta:creation-date>
    <meta:editing-duration>PT3M17S</meta:editing-duration>
    <meta:editing-cycles>2</meta:editing-cycles>
    <meta:generator>LibreOffice/7.2.5.2$Windows_X86_64 LibreOffice_project/499f9727c189e6ef3471021d6132d4c694f357e5</meta:generator>
    <dc:date>2025-11-24T13:50:58.189000000</dc:date>
    <meta:document-statistic meta:table-count="1" meta:cell-count="1022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02cm" svg:y="0.316cm" chart:style-name="ch2">
          <text:p>InsertionSort Threshold</text:p>
        </chart:title>
        <chart:legend chart:legend-position="end" svg:x="11.19cm" svg:y="2.209cm" style:legend-expansion="high" chart:style-name="ch3"/>
        <chart:plot-area chart:style-name="ch4" table:cell-range-address="Sheet1.A26:Sheet1.B40 Sheet1.A24:Sheet1.A24 Sheet1.C24:Sheet1.C24 Sheet1.D26:Sheet1.D40 Sheet1.E24:Sheet1.E24 Sheet1.F26:Sheet1.F40 Sheet1.G24:Sheet1.G24 Sheet1.H26:Sheet1.H40 Sheet1.I24:Sheet1.I24 Sheet1.J26:Sheet1.J40 Sheet1.K24:Sheet1.K24 Sheet1.L26:Sheet1.L40 Sheet1.M24:Sheet1.M24 Sheet1.N26:Sheet1.N40 Sheet1.O24:Sheet1.O24 Sheet1.P26:Sheet1.P40 Sheet1.Q24:Sheet1.Q24 Sheet1.R26:Sheet1.R40" chart:data-source-has-labels="row" svg:x="0.32cm" svg:y="1.275cm" svg:width="10.55cm" svg:height="7.545cm">
          <chart:coordinate-region svg:x="2.053cm" svg:y="1.475cm" svg:width="8.074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26:Sheet1.B40" chart:label-cell-address="Sheet1.A24:Sheet1.A24" chart:class="chart:scatter">
            <chart:domain table:cell-range-address="Sheet1.A26:Sheet1.A40"/>
            <chart:data-point chart:repeated="15"/>
          </chart:series>
          <chart:series chart:style-name="ch9" chart:values-cell-range-address="Sheet1.D26:Sheet1.D40" chart:label-cell-address="Sheet1.C24:Sheet1.C24" chart:class="chart:scatter">
            <chart:domain table:cell-range-address="Sheet1.C26:Sheet1.C40"/>
            <chart:data-point chart:repeated="15"/>
          </chart:series>
          <chart:series chart:style-name="ch10" chart:values-cell-range-address="Sheet1.F26:Sheet1.F40" chart:label-cell-address="Sheet1.E24:Sheet1.E24" chart:class="chart:scatter">
            <chart:domain table:cell-range-address="Sheet1.E26:Sheet1.E40"/>
            <chart:data-point chart:repeated="15"/>
          </chart:series>
          <chart:series chart:style-name="ch11" chart:values-cell-range-address="Sheet1.H26:Sheet1.H40" chart:label-cell-address="Sheet1.G24:Sheet1.G24" chart:class="chart:scatter">
            <chart:domain table:cell-range-address="Sheet1.G26:Sheet1.G40"/>
            <chart:data-point chart:repeated="15"/>
          </chart:series>
          <chart:series chart:style-name="ch12" chart:values-cell-range-address="Sheet1.J26:Sheet1.J40" chart:label-cell-address="Sheet1.I24:Sheet1.I24" chart:class="chart:scatter">
            <chart:domain table:cell-range-address="Sheet1.I26:Sheet1.I40"/>
            <chart:data-point chart:repeated="15"/>
          </chart:series>
          <chart:series chart:style-name="ch13" chart:values-cell-range-address="Sheet1.L26:Sheet1.L40" chart:label-cell-address="Sheet1.K24:Sheet1.K24" chart:class="chart:scatter">
            <chart:domain table:cell-range-address="Sheet1.C26:Sheet1.C40"/>
            <chart:data-point chart:repeated="15"/>
          </chart:series>
          <chart:series chart:style-name="ch14" chart:values-cell-range-address="Sheet1.N26:Sheet1.N40" chart:label-cell-address="Sheet1.M24:Sheet1.M24" chart:class="chart:scatter">
            <chart:domain table:cell-range-address="Sheet1.M26:Sheet1.M40"/>
            <chart:data-point chart:repeated="15"/>
          </chart:series>
          <chart:series chart:style-name="ch15" chart:values-cell-range-address="Sheet1.P26:Sheet1.P40" chart:label-cell-address="Sheet1.O24:Sheet1.O24" chart:class="chart:scatter">
            <chart:domain table:cell-range-address="Sheet1.O26:Sheet1.O40"/>
            <chart:data-point chart:repeated="15"/>
          </chart:series>
          <chart:series chart:style-name="ch16" chart:values-cell-range-address="Sheet1.R26:Sheet1.R40" chart:label-cell-address="Sheet1.Q24:Sheet1.Q24" chart:class="chart:scatter">
            <chart:domain table:cell-range-address="Sheet1.P26:Sheet1.P40"/>
            <chart:data-point chart:repeated="1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 threshold</text:p>
                <draw:g>
                  <svg:desc>Sheet1.A24:Sheet1.A2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0</text:p>
                <draw:g>
                  <svg:desc>Sheet1.C24:Sheet1.C24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100</text:p>
                <draw:g>
                  <svg:desc>Sheet1.E24:Sheet1.E2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00</text:p>
                <draw:g>
                  <svg:desc>Sheet1.G24:Sheet1.G24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10000</text:p>
                <draw:g>
                  <svg:desc>Sheet1.I24:Sheet1.I2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00000</text:p>
                <draw:g>
                  <svg:desc>Sheet1.K24:Sheet1.K24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1000000</text:p>
                <draw:g>
                  <svg:desc>Sheet1.M24:Sheet1.M24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10^7</text:p>
                <draw:g>
                  <svg:desc>Sheet1.O24:Sheet1.O24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10^8 (all insertion sort)</text:p>
                <draw:g>
                  <svg:desc>Sheet1.Q24:Sheet1.Q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Sheet1.A26:Sheet1.A40</svg:desc>
                </draw:g>
              </table:table-cell>
              <table:table-cell office:value-type="float" office:value="0.00047999">
                <text:p>0.00047999</text:p>
                <draw:g>
                  <svg:desc>Sheet1.B26:Sheet1.B40</svg:desc>
                </draw:g>
              </table:table-cell>
              <table:table-cell office:value-type="float" office:value="1024">
                <text:p>1024</text:p>
                <draw:g>
                  <svg:desc>Sheet1.C26:Sheet1.C40</svg:desc>
                </draw:g>
              </table:table-cell>
              <table:table-cell office:value-type="float" office:value="0.00038783">
                <text:p>0.00038783</text:p>
                <draw:g>
                  <svg:desc>Sheet1.D26:Sheet1.D40</svg:desc>
                </draw:g>
              </table:table-cell>
              <table:table-cell office:value-type="float" office:value="1024">
                <text:p>1024</text:p>
                <draw:g>
                  <svg:desc>Sheet1.E26:Sheet1.E40</svg:desc>
                </draw:g>
              </table:table-cell>
              <table:table-cell office:value-type="float" office:value="0.00046673">
                <text:p>0.00046673</text:p>
                <draw:g>
                  <svg:desc>Sheet1.F26:Sheet1.F40</svg:desc>
                </draw:g>
              </table:table-cell>
              <table:table-cell office:value-type="float" office:value="1024">
                <text:p>1024</text:p>
                <draw:g>
                  <svg:desc>Sheet1.G26:Sheet1.G40</svg:desc>
                </draw:g>
              </table:table-cell>
              <table:table-cell office:value-type="float" office:value="0.00021661">
                <text:p>0.00021661</text:p>
                <draw:g>
                  <svg:desc>Sheet1.H26:Sheet1.H40</svg:desc>
                </draw:g>
              </table:table-cell>
              <table:table-cell office:value-type="float" office:value="1024">
                <text:p>1024</text:p>
                <draw:g>
                  <svg:desc>Sheet1.I26:Sheet1.I40</svg:desc>
                </draw:g>
              </table:table-cell>
              <table:table-cell office:value-type="float" office:value="0.00003342">
                <text:p>0.00003342</text:p>
                <draw:g>
                  <svg:desc>Sheet1.J26:Sheet1.J40</svg:desc>
                </draw:g>
              </table:table-cell>
              <table:table-cell office:value-type="float" office:value="1024">
                <text:p>1024</text:p>
                <draw:g>
                  <svg:desc>Sheet1.C26:Sheet1.C40</svg:desc>
                </draw:g>
              </table:table-cell>
              <table:table-cell office:value-type="float" office:value="0.00003327">
                <text:p>0.00003327</text:p>
                <draw:g>
                  <svg:desc>Sheet1.L26:Sheet1.L40</svg:desc>
                </draw:g>
              </table:table-cell>
              <table:table-cell office:value-type="float" office:value="1024">
                <text:p>1024</text:p>
                <draw:g>
                  <svg:desc>Sheet1.M26:Sheet1.M40</svg:desc>
                </draw:g>
              </table:table-cell>
              <table:table-cell office:value-type="float" office:value="0.00003337">
                <text:p>0.00003337</text:p>
                <draw:g>
                  <svg:desc>Sheet1.N26:Sheet1.N40</svg:desc>
                </draw:g>
              </table:table-cell>
              <table:table-cell office:value-type="float" office:value="1024">
                <text:p>1024</text:p>
                <draw:g>
                  <svg:desc>Sheet1.O26:Sheet1.O40</svg:desc>
                </draw:g>
              </table:table-cell>
              <table:table-cell office:value-type="float" office:value="0.00003229">
                <text:p>0.00003229</text:p>
                <draw:g>
                  <svg:desc>Sheet1.P26:Sheet1.P40</svg:desc>
                </draw:g>
              </table:table-cell>
              <table:table-cell office:value-type="float" office:value="0.00003229">
                <text:p>0.00003229</text:p>
                <draw:g>
                  <svg:desc>Sheet1.P26:Sheet1.P40</svg:desc>
                </draw:g>
              </table:table-cell>
              <table:table-cell office:value-type="float" office:value="0.00003247">
                <text:p>0.00003247</text:p>
                <draw:g>
                  <svg:desc>Sheet1.R26:Sheet1.R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0.00057773">
                <text:p>0.00057773</text:p>
              </table:table-cell>
              <table:table-cell office:value-type="float" office:value="2048">
                <text:p>2048</text:p>
              </table:table-cell>
              <table:table-cell office:value-type="float" office:value="0.00008096">
                <text:p>0.00008096</text:p>
              </table:table-cell>
              <table:table-cell office:value-type="float" office:value="2048">
                <text:p>2048</text:p>
              </table:table-cell>
              <table:table-cell office:value-type="float" office:value="0.00023779">
                <text:p>0.00023779</text:p>
              </table:table-cell>
              <table:table-cell office:value-type="float" office:value="2048">
                <text:p>2048</text:p>
              </table:table-cell>
              <table:table-cell office:value-type="float" office:value="0.00042241">
                <text:p>0.00042241</text:p>
              </table:table-cell>
              <table:table-cell office:value-type="float" office:value="2048">
                <text:p>2048</text:p>
              </table:table-cell>
              <table:table-cell office:value-type="float" office:value="0.00002918">
                <text:p>0.00002918</text:p>
              </table:table-cell>
              <table:table-cell office:value-type="float" office:value="2048">
                <text:p>2048</text:p>
              </table:table-cell>
              <table:table-cell office:value-type="float" office:value="0.00002855">
                <text:p>0.00002855</text:p>
              </table:table-cell>
              <table:table-cell office:value-type="float" office:value="2048">
                <text:p>2048</text:p>
              </table:table-cell>
              <table:table-cell office:value-type="float" office:value="0.00002821">
                <text:p>0.00002821</text:p>
              </table:table-cell>
              <table:table-cell office:value-type="float" office:value="2048">
                <text:p>2048</text:p>
              </table:table-cell>
              <table:table-cell office:value-type="float" office:value="0.00002832">
                <text:p>0.00002832</text:p>
              </table:table-cell>
              <table:table-cell office:value-type="float" office:value="0.00002832">
                <text:p>0.00002832</text:p>
              </table:table-cell>
              <table:table-cell office:value-type="float" office:value="0.00002831">
                <text:p>0.000028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0.00023302">
                <text:p>0.00023302</text:p>
              </table:table-cell>
              <table:table-cell office:value-type="float" office:value="4096">
                <text:p>4096</text:p>
              </table:table-cell>
              <table:table-cell office:value-type="float" office:value="0.00017483">
                <text:p>0.00017483</text:p>
              </table:table-cell>
              <table:table-cell office:value-type="float" office:value="4096">
                <text:p>4096</text:p>
              </table:table-cell>
              <table:table-cell office:value-type="float" office:value="0.00063748">
                <text:p>0.00063748</text:p>
              </table:table-cell>
              <table:table-cell office:value-type="float" office:value="4096">
                <text:p>4096</text:p>
              </table:table-cell>
              <table:table-cell office:value-type="float" office:value="0.00054947">
                <text:p>0.00054947</text:p>
              </table:table-cell>
              <table:table-cell office:value-type="float" office:value="4096">
                <text:p>4096</text:p>
              </table:table-cell>
              <table:table-cell office:value-type="float" office:value="0.00005143">
                <text:p>0.00005143</text:p>
              </table:table-cell>
              <table:table-cell office:value-type="float" office:value="4096">
                <text:p>4096</text:p>
              </table:table-cell>
              <table:table-cell office:value-type="float" office:value="0.00005142">
                <text:p>0.00005142</text:p>
              </table:table-cell>
              <table:table-cell office:value-type="float" office:value="4096">
                <text:p>4096</text:p>
              </table:table-cell>
              <table:table-cell office:value-type="float" office:value="0.00005359">
                <text:p>0.00005359</text:p>
              </table:table-cell>
              <table:table-cell office:value-type="float" office:value="4096">
                <text:p>4096</text:p>
              </table:table-cell>
              <table:table-cell office:value-type="float" office:value="0.00005135">
                <text:p>0.00005135</text:p>
              </table:table-cell>
              <table:table-cell office:value-type="float" office:value="0.00005135">
                <text:p>0.00005135</text:p>
              </table:table-cell>
              <table:table-cell office:value-type="float" office:value="0.00005114">
                <text:p>0.00005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0.00051203">
                <text:p>0.00051203</text:p>
              </table:table-cell>
              <table:table-cell office:value-type="float" office:value="8192">
                <text:p>8192</text:p>
              </table:table-cell>
              <table:table-cell office:value-type="float" office:value="0.00038917">
                <text:p>0.00038917</text:p>
              </table:table-cell>
              <table:table-cell office:value-type="float" office:value="8192">
                <text:p>8192</text:p>
              </table:table-cell>
              <table:table-cell office:value-type="float" office:value="0.00026805">
                <text:p>0.00026805</text:p>
              </table:table-cell>
              <table:table-cell office:value-type="float" office:value="8192">
                <text:p>8192</text:p>
              </table:table-cell>
              <table:table-cell office:value-type="float" office:value="0.0006281">
                <text:p>0.0006281</text:p>
              </table:table-cell>
              <table:table-cell office:value-type="float" office:value="8192">
                <text:p>8192</text:p>
              </table:table-cell>
              <table:table-cell office:value-type="float" office:value="0.00004474">
                <text:p>0.00004474</text:p>
              </table:table-cell>
              <table:table-cell office:value-type="float" office:value="8192">
                <text:p>8192</text:p>
              </table:table-cell>
              <table:table-cell office:value-type="float" office:value="0.00004419">
                <text:p>0.00004419</text:p>
              </table:table-cell>
              <table:table-cell office:value-type="float" office:value="8192">
                <text:p>8192</text:p>
              </table:table-cell>
              <table:table-cell office:value-type="float" office:value="0.00004622">
                <text:p>0.00004622</text:p>
              </table:table-cell>
              <table:table-cell office:value-type="float" office:value="8192">
                <text:p>8192</text:p>
              </table:table-cell>
              <table:table-cell office:value-type="float" office:value="0.00004927">
                <text:p>0.00004927</text:p>
              </table:table-cell>
              <table:table-cell office:value-type="float" office:value="0.00004927">
                <text:p>0.00004927</text:p>
              </table:table-cell>
              <table:table-cell office:value-type="float" office:value="0.00004602">
                <text:p>0.00004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0.00104066">
                <text:p>0.00104066</text:p>
              </table:table-cell>
              <table:table-cell office:value-type="float" office:value="16384">
                <text:p>16384</text:p>
              </table:table-cell>
              <table:table-cell office:value-type="float" office:value="0.00081348">
                <text:p>0.00081348</text:p>
              </table:table-cell>
              <table:table-cell office:value-type="float" office:value="16384">
                <text:p>16384</text:p>
              </table:table-cell>
              <table:table-cell office:value-type="float" office:value="0.00058695">
                <text:p>0.00058695</text:p>
              </table:table-cell>
              <table:table-cell office:value-type="float" office:value="16384">
                <text:p>16384</text:p>
              </table:table-cell>
              <table:table-cell office:value-type="float" office:value="0.00037617">
                <text:p>0.00037617</text:p>
              </table:table-cell>
              <table:table-cell office:value-type="float" office:value="16384">
                <text:p>16384</text:p>
              </table:table-cell>
              <table:table-cell office:value-type="float" office:value="0.00113359">
                <text:p>0.00113359</text:p>
              </table:table-cell>
              <table:table-cell office:value-type="float" office:value="16384">
                <text:p>16384</text:p>
              </table:table-cell>
              <table:table-cell office:value-type="float" office:value="0.00007742">
                <text:p>0.00007742</text:p>
              </table:table-cell>
              <table:table-cell office:value-type="float" office:value="16384">
                <text:p>16384</text:p>
              </table:table-cell>
              <table:table-cell office:value-type="float" office:value="0.00007692">
                <text:p>0.00007692</text:p>
              </table:table-cell>
              <table:table-cell office:value-type="float" office:value="16384">
                <text:p>16384</text:p>
              </table:table-cell>
              <table:table-cell office:value-type="float" office:value="0.00007766">
                <text:p>0.00007766</text:p>
              </table:table-cell>
              <table:table-cell office:value-type="float" office:value="0.00007766">
                <text:p>0.00007766</text:p>
              </table:table-cell>
              <table:table-cell office:value-type="float" office:value="0.00007739">
                <text:p>0.000077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0.00232148">
                <text:p>0.00232148</text:p>
              </table:table-cell>
              <table:table-cell office:value-type="float" office:value="32768">
                <text:p>32768</text:p>
              </table:table-cell>
              <table:table-cell office:value-type="float" office:value="0.00183381">
                <text:p>0.00183381</text:p>
              </table:table-cell>
              <table:table-cell office:value-type="float" office:value="32768">
                <text:p>32768</text:p>
              </table:table-cell>
              <table:table-cell office:value-type="float" office:value="0.00130993">
                <text:p>0.00130993</text:p>
              </table:table-cell>
              <table:table-cell office:value-type="float" office:value="32768">
                <text:p>32768</text:p>
              </table:table-cell>
              <table:table-cell office:value-type="float" office:value="0.00087736">
                <text:p>0.00087736</text:p>
              </table:table-cell>
              <table:table-cell office:value-type="float" office:value="32768">
                <text:p>32768</text:p>
              </table:table-cell>
              <table:table-cell office:value-type="float" office:value="0.0013589">
                <text:p>0.0013589</text:p>
              </table:table-cell>
              <table:table-cell office:value-type="float" office:value="32768">
                <text:p>32768</text:p>
              </table:table-cell>
              <table:table-cell office:value-type="float" office:value="0.00012852">
                <text:p>0.00012852</text:p>
              </table:table-cell>
              <table:table-cell office:value-type="float" office:value="32768">
                <text:p>32768</text:p>
              </table:table-cell>
              <table:table-cell office:value-type="float" office:value="0.00010723">
                <text:p>0.00010723</text:p>
              </table:table-cell>
              <table:table-cell office:value-type="float" office:value="32768">
                <text:p>32768</text:p>
              </table:table-cell>
              <table:table-cell office:value-type="float" office:value="0.0001065">
                <text:p>0.0001065</text:p>
              </table:table-cell>
              <table:table-cell office:value-type="float" office:value="0.0001065">
                <text:p>0.0001065</text:p>
              </table:table-cell>
              <table:table-cell office:value-type="float" office:value="0.00012143">
                <text:p>0.00012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0.00487687">
                <text:p>0.00487687</text:p>
              </table:table-cell>
              <table:table-cell office:value-type="float" office:value="65536">
                <text:p>65536</text:p>
              </table:table-cell>
              <table:table-cell office:value-type="float" office:value="0.00396164">
                <text:p>0.00396164</text:p>
              </table:table-cell>
              <table:table-cell office:value-type="float" office:value="65536">
                <text:p>65536</text:p>
              </table:table-cell>
              <table:table-cell office:value-type="float" office:value="0.0029245">
                <text:p>0.0029245</text:p>
              </table:table-cell>
              <table:table-cell office:value-type="float" office:value="65536">
                <text:p>65536</text:p>
              </table:table-cell>
              <table:table-cell office:value-type="float" office:value="0.00203201">
                <text:p>0.00203201</text:p>
              </table:table-cell>
              <table:table-cell office:value-type="float" office:value="65536">
                <text:p>65536</text:p>
              </table:table-cell>
              <table:table-cell office:value-type="float" office:value="0.00314913">
                <text:p>0.00314913</text:p>
              </table:table-cell>
              <table:table-cell office:value-type="float" office:value="65536">
                <text:p>65536</text:p>
              </table:table-cell>
              <table:table-cell office:value-type="float" office:value="0.00018722">
                <text:p>0.00018722</text:p>
              </table:table-cell>
              <table:table-cell office:value-type="float" office:value="65536">
                <text:p>65536</text:p>
              </table:table-cell>
              <table:table-cell office:value-type="float" office:value="0.00017102">
                <text:p>0.00017102</text:p>
              </table:table-cell>
              <table:table-cell office:value-type="float" office:value="65536">
                <text:p>65536</text:p>
              </table:table-cell>
              <table:table-cell office:value-type="float" office:value="0.00016889">
                <text:p>0.00016889</text:p>
              </table:table-cell>
              <table:table-cell office:value-type="float" office:value="0.00016889">
                <text:p>0.00016889</text:p>
              </table:table-cell>
              <table:table-cell office:value-type="float" office:value="0.00017338">
                <text:p>0.000173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0.01052219">
                <text:p>0.01052219</text:p>
              </table:table-cell>
              <table:table-cell office:value-type="float" office:value="131072">
                <text:p>131072</text:p>
              </table:table-cell>
              <table:table-cell office:value-type="float" office:value="0.00864501">
                <text:p>0.00864501</text:p>
              </table:table-cell>
              <table:table-cell office:value-type="float" office:value="131072">
                <text:p>131072</text:p>
              </table:table-cell>
              <table:table-cell office:value-type="float" office:value="0.00662065">
                <text:p>0.00662065</text:p>
              </table:table-cell>
              <table:table-cell office:value-type="float" office:value="131072">
                <text:p>131072</text:p>
              </table:table-cell>
              <table:table-cell office:value-type="float" office:value="0.00469254">
                <text:p>0.00469254</text:p>
              </table:table-cell>
              <table:table-cell office:value-type="float" office:value="131072">
                <text:p>131072</text:p>
              </table:table-cell>
              <table:table-cell office:value-type="float" office:value="0.00263776">
                <text:p>0.00263776</text:p>
              </table:table-cell>
              <table:table-cell office:value-type="float" office:value="131072">
                <text:p>131072</text:p>
              </table:table-cell>
              <table:table-cell office:value-type="float" office:value="0.00310524">
                <text:p>0.00310524</text:p>
              </table:table-cell>
              <table:table-cell office:value-type="float" office:value="131072">
                <text:p>131072</text:p>
              </table:table-cell>
              <table:table-cell office:value-type="float" office:value="0.00045136">
                <text:p>0.00045136</text:p>
              </table:table-cell>
              <table:table-cell office:value-type="float" office:value="131072">
                <text:p>131072</text:p>
              </table:table-cell>
              <table:table-cell office:value-type="float" office:value="0.00037249">
                <text:p>0.00037249</text:p>
              </table:table-cell>
              <table:table-cell office:value-type="float" office:value="0.00037249">
                <text:p>0.00037249</text:p>
              </table:table-cell>
              <table:table-cell office:value-type="float" office:value="0.00036688">
                <text:p>0.00036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0.02212609">
                <text:p>0.02212609</text:p>
              </table:table-cell>
              <table:table-cell office:value-type="float" office:value="262144">
                <text:p>262144</text:p>
              </table:table-cell>
              <table:table-cell office:value-type="float" office:value="0.01826014">
                <text:p>0.01826014</text:p>
              </table:table-cell>
              <table:table-cell office:value-type="float" office:value="262144">
                <text:p>262144</text:p>
              </table:table-cell>
              <table:table-cell office:value-type="float" office:value="0.0139531">
                <text:p>0.0139531</text:p>
              </table:table-cell>
              <table:table-cell office:value-type="float" office:value="262144">
                <text:p>262144</text:p>
              </table:table-cell>
              <table:table-cell office:value-type="float" office:value="0.01059883">
                <text:p>0.01059883</text:p>
              </table:table-cell>
              <table:table-cell office:value-type="float" office:value="262144">
                <text:p>262144</text:p>
              </table:table-cell>
              <table:table-cell office:value-type="float" office:value="0.00613327">
                <text:p>0.00613327</text:p>
              </table:table-cell>
              <table:table-cell office:value-type="float" office:value="262144">
                <text:p>262144</text:p>
              </table:table-cell>
              <table:table-cell office:value-type="float" office:value="0.00381534">
                <text:p>0.00381534</text:p>
              </table:table-cell>
              <table:table-cell office:value-type="float" office:value="262144">
                <text:p>262144</text:p>
              </table:table-cell>
              <table:table-cell office:value-type="float" office:value="0.00045156">
                <text:p>0.00045156</text:p>
              </table:table-cell>
              <table:table-cell office:value-type="float" office:value="262144">
                <text:p>262144</text:p>
              </table:table-cell>
              <table:table-cell office:value-type="float" office:value="0.00044946">
                <text:p>0.00044946</text:p>
              </table:table-cell>
              <table:table-cell office:value-type="float" office:value="0.00044946">
                <text:p>0.00044946</text:p>
              </table:table-cell>
              <table:table-cell office:value-type="float" office:value="0.00048174">
                <text:p>0.00048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0.10001624">
                <text:p>0.10001624</text:p>
              </table:table-cell>
              <table:table-cell office:value-type="float" office:value="524288">
                <text:p>524288</text:p>
              </table:table-cell>
              <table:table-cell office:value-type="float" office:value="0.08567457">
                <text:p>0.08567457</text:p>
              </table:table-cell>
              <table:table-cell office:value-type="float" office:value="524288">
                <text:p>524288</text:p>
              </table:table-cell>
              <table:table-cell office:value-type="float" office:value="0.06843435">
                <text:p>0.06843435</text:p>
              </table:table-cell>
              <table:table-cell office:value-type="float" office:value="524288">
                <text:p>524288</text:p>
              </table:table-cell>
              <table:table-cell office:value-type="float" office:value="0.05340237">
                <text:p>0.05340237</text:p>
              </table:table-cell>
              <table:table-cell office:value-type="float" office:value="524288">
                <text:p>524288</text:p>
              </table:table-cell>
              <table:table-cell office:value-type="float" office:value="0.03393615">
                <text:p>0.03393615</text:p>
              </table:table-cell>
              <table:table-cell office:value-type="float" office:value="524288">
                <text:p>524288</text:p>
              </table:table-cell>
              <table:table-cell office:value-type="float" office:value="0.01814354">
                <text:p>0.01814354</text:p>
              </table:table-cell>
              <table:table-cell office:value-type="float" office:value="524288">
                <text:p>524288</text:p>
              </table:table-cell>
              <table:table-cell office:value-type="float" office:value="0.0014842">
                <text:p>0.0014842</text:p>
              </table:table-cell>
              <table:table-cell office:value-type="float" office:value="524288">
                <text:p>524288</text:p>
              </table:table-cell>
              <table:table-cell office:value-type="float" office:value="0.00147569">
                <text:p>0.00147569</text:p>
              </table:table-cell>
              <table:table-cell office:value-type="float" office:value="0.00147569">
                <text:p>0.00147569</text:p>
              </table:table-cell>
              <table:table-cell office:value-type="float" office:value="0.00149237">
                <text:p>0.00149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8576">
                <text:p>1048576</text:p>
              </table:table-cell>
              <table:table-cell office:value-type="float" office:value="0.21242948">
                <text:p>0.21242948</text:p>
              </table:table-cell>
              <table:table-cell office:value-type="float" office:value="1048576">
                <text:p>1048576</text:p>
              </table:table-cell>
              <table:table-cell office:value-type="float" office:value="0.18405969">
                <text:p>0.18405969</text:p>
              </table:table-cell>
              <table:table-cell office:value-type="float" office:value="1048576">
                <text:p>1048576</text:p>
              </table:table-cell>
              <table:table-cell office:value-type="float" office:value="0.15116227">
                <text:p>0.15116227</text:p>
              </table:table-cell>
              <table:table-cell office:value-type="float" office:value="1048576">
                <text:p>1048576</text:p>
              </table:table-cell>
              <table:table-cell office:value-type="float" office:value="0.12002983">
                <text:p>0.12002983</text:p>
              </table:table-cell>
              <table:table-cell office:value-type="float" office:value="1048576">
                <text:p>1048576</text:p>
              </table:table-cell>
              <table:table-cell office:value-type="float" office:value="0.08188674">
                <text:p>0.08188674</text:p>
              </table:table-cell>
              <table:table-cell office:value-type="float" office:value="1048576">
                <text:p>1048576</text:p>
              </table:table-cell>
              <table:table-cell office:value-type="float" office:value="0.04984005">
                <text:p>0.04984005</text:p>
              </table:table-cell>
              <table:table-cell office:value-type="float" office:value="1048576">
                <text:p>1048576</text:p>
              </table:table-cell>
              <table:table-cell office:value-type="float" office:value="0.03943228">
                <text:p>0.03943228</text:p>
              </table:table-cell>
              <table:table-cell office:value-type="float" office:value="1048576">
                <text:p>1048576</text:p>
              </table:table-cell>
              <table:table-cell office:value-type="float" office:value="0.02112481">
                <text:p>0.02112481</text:p>
              </table:table-cell>
              <table:table-cell office:value-type="float" office:value="0.02112481">
                <text:p>0.02112481</text:p>
              </table:table-cell>
              <table:table-cell office:value-type="float" office:value="0.01567669">
                <text:p>0.015676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97152">
                <text:p>2097152</text:p>
              </table:table-cell>
              <table:table-cell office:value-type="float" office:value="0.44316271">
                <text:p>0.44316271</text:p>
              </table:table-cell>
              <table:table-cell office:value-type="float" office:value="2097152">
                <text:p>2097152</text:p>
              </table:table-cell>
              <table:table-cell office:value-type="float" office:value="0.38144665">
                <text:p>0.38144665</text:p>
              </table:table-cell>
              <table:table-cell office:value-type="float" office:value="2097152">
                <text:p>2097152</text:p>
              </table:table-cell>
              <table:table-cell office:value-type="float" office:value="0.32453972">
                <text:p>0.32453972</text:p>
              </table:table-cell>
              <table:table-cell office:value-type="float" office:value="2097152">
                <text:p>2097152</text:p>
              </table:table-cell>
              <table:table-cell office:value-type="float" office:value="0.26117468">
                <text:p>0.26117468</text:p>
              </table:table-cell>
              <table:table-cell office:value-type="float" office:value="2097152">
                <text:p>2097152</text:p>
              </table:table-cell>
              <table:table-cell office:value-type="float" office:value="0.175047">
                <text:p>0.175047</text:p>
              </table:table-cell>
              <table:table-cell office:value-type="float" office:value="2097152">
                <text:p>2097152</text:p>
              </table:table-cell>
              <table:table-cell office:value-type="float" office:value="0.11824276">
                <text:p>0.11824276</text:p>
              </table:table-cell>
              <table:table-cell office:value-type="float" office:value="2097152">
                <text:p>2097152</text:p>
              </table:table-cell>
              <table:table-cell office:value-type="float" office:value="0.05450765">
                <text:p>0.05450765</text:p>
              </table:table-cell>
              <table:table-cell office:value-type="float" office:value="2097152">
                <text:p>2097152</text:p>
              </table:table-cell>
              <table:table-cell office:value-type="float" office:value="0.01897299">
                <text:p>0.01897299</text:p>
              </table:table-cell>
              <table:table-cell office:value-type="float" office:value="0.01897299">
                <text:p>0.01897299</text:p>
              </table:table-cell>
              <table:table-cell office:value-type="float" office:value="0.00926839">
                <text:p>0.009268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94304">
                <text:p>4194304</text:p>
              </table:table-cell>
              <table:table-cell office:value-type="float" office:value="0.92825489">
                <text:p>0.92825489</text:p>
              </table:table-cell>
              <table:table-cell office:value-type="float" office:value="4194304">
                <text:p>4194304</text:p>
              </table:table-cell>
              <table:table-cell office:value-type="float" office:value="0.80587715">
                <text:p>0.80587715</text:p>
              </table:table-cell>
              <table:table-cell office:value-type="float" office:value="4194304">
                <text:p>4194304</text:p>
              </table:table-cell>
              <table:table-cell office:value-type="float" office:value="0.68790225">
                <text:p>0.68790225</text:p>
              </table:table-cell>
              <table:table-cell office:value-type="float" office:value="4194304">
                <text:p>4194304</text:p>
              </table:table-cell>
              <table:table-cell office:value-type="float" office:value="0.55281258">
                <text:p>0.55281258</text:p>
              </table:table-cell>
              <table:table-cell office:value-type="float" office:value="4194304">
                <text:p>4194304</text:p>
              </table:table-cell>
              <table:table-cell office:value-type="float" office:value="0.39244235">
                <text:p>0.39244235</text:p>
              </table:table-cell>
              <table:table-cell office:value-type="float" office:value="4194304">
                <text:p>4194304</text:p>
              </table:table-cell>
              <table:table-cell office:value-type="float" office:value="0.28653811">
                <text:p>0.28653811</text:p>
              </table:table-cell>
              <table:table-cell office:value-type="float" office:value="4194304">
                <text:p>4194304</text:p>
              </table:table-cell>
              <table:table-cell office:value-type="float" office:value="0.15395144">
                <text:p>0.15395144</text:p>
              </table:table-cell>
              <table:table-cell office:value-type="float" office:value="4194304">
                <text:p>4194304</text:p>
              </table:table-cell>
              <table:table-cell office:value-type="float" office:value="0.01927864">
                <text:p>0.01927864</text:p>
              </table:table-cell>
              <table:table-cell office:value-type="float" office:value="0.01927864">
                <text:p>0.01927864</text:p>
              </table:table-cell>
              <table:table-cell office:value-type="float" office:value="0.03607466">
                <text:p>0.036074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88608">
                <text:p>8388608</text:p>
              </table:table-cell>
              <table:table-cell office:value-type="float" office:value="1.94423625">
                <text:p>1.94423625</text:p>
              </table:table-cell>
              <table:table-cell office:value-type="float" office:value="8388608">
                <text:p>8388608</text:p>
              </table:table-cell>
              <table:table-cell office:value-type="float" office:value="1.69587297">
                <text:p>1.69587297</text:p>
              </table:table-cell>
              <table:table-cell office:value-type="float" office:value="8388608">
                <text:p>8388608</text:p>
              </table:table-cell>
              <table:table-cell office:value-type="float" office:value="1.48235481">
                <text:p>1.48235481</text:p>
              </table:table-cell>
              <table:table-cell office:value-type="float" office:value="8388608">
                <text:p>8388608</text:p>
              </table:table-cell>
              <table:table-cell office:value-type="float" office:value="1.18708863">
                <text:p>1.18708863</text:p>
              </table:table-cell>
              <table:table-cell office:value-type="float" office:value="8388608">
                <text:p>8388608</text:p>
              </table:table-cell>
              <table:table-cell office:value-type="float" office:value="0.88385134">
                <text:p>0.88385134</text:p>
              </table:table-cell>
              <table:table-cell office:value-type="float" office:value="8388608">
                <text:p>8388608</text:p>
              </table:table-cell>
              <table:table-cell office:value-type="float" office:value="0.6209824">
                <text:p>0.6209824</text:p>
              </table:table-cell>
              <table:table-cell office:value-type="float" office:value="8388608">
                <text:p>8388608</text:p>
              </table:table-cell>
              <table:table-cell office:value-type="float" office:value="0.37408696">
                <text:p>0.37408696</text:p>
              </table:table-cell>
              <table:table-cell office:value-type="float" office:value="8388608">
                <text:p>8388608</text:p>
              </table:table-cell>
              <table:table-cell office:value-type="float" office:value="0.03609886">
                <text:p>0.03609886</text:p>
              </table:table-cell>
              <table:table-cell office:value-type="float" office:value="0.03609886">
                <text:p>0.03609886</text:p>
              </table:table-cell>
              <table:table-cell office:value-type="float" office:value="0.0481072">
                <text:p>0.04810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777216">
                <text:p>16777216</text:p>
              </table:table-cell>
              <table:table-cell office:value-type="float" office:value="4.07791845">
                <text:p>4.07791845</text:p>
              </table:table-cell>
              <table:table-cell office:value-type="float" office:value="16777216">
                <text:p>16777216</text:p>
              </table:table-cell>
              <table:table-cell office:value-type="float" office:value="3.53209748">
                <text:p>3.53209748</text:p>
              </table:table-cell>
              <table:table-cell office:value-type="float" office:value="16777216">
                <text:p>16777216</text:p>
              </table:table-cell>
              <table:table-cell office:value-type="float" office:value="3.17620311">
                <text:p>3.17620311</text:p>
              </table:table-cell>
              <table:table-cell office:value-type="float" office:value="16777216">
                <text:p>16777216</text:p>
              </table:table-cell>
              <table:table-cell office:value-type="float" office:value="2.56023466">
                <text:p>2.56023466</text:p>
              </table:table-cell>
              <table:table-cell office:value-type="float" office:value="16777216">
                <text:p>16777216</text:p>
              </table:table-cell>
              <table:table-cell office:value-type="float" office:value="1.88502364">
                <text:p>1.88502364</text:p>
              </table:table-cell>
              <table:table-cell office:value-type="float" office:value="16777216">
                <text:p>16777216</text:p>
              </table:table-cell>
              <table:table-cell office:value-type="float" office:value="1.4433003">
                <text:p>1.4433003</text:p>
              </table:table-cell>
              <table:table-cell office:value-type="float" office:value="16777216">
                <text:p>16777216</text:p>
              </table:table-cell>
              <table:table-cell office:value-type="float" office:value="0.90360528">
                <text:p>0.90360528</text:p>
              </table:table-cell>
              <table:table-cell office:value-type="float" office:value="16777216">
                <text:p>16777216</text:p>
              </table:table-cell>
              <table:table-cell office:value-type="float" office:value="0.29360866">
                <text:p>0.29360866</text:p>
              </table:table-cell>
              <table:table-cell office:value-type="float" office:value="0.29360866">
                <text:p>0.29360866</text:p>
              </table:table-cell>
              <table:table-cell office:value-type="float" office:value="0.06195102">
                <text:p>0.061951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6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6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6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2cm" svg:y="0.316cm" chart:style-name="ch2">
          <text:p>Runtime(n) for diff thresholds</text:p>
        </chart:title>
        <chart:legend chart:legend-position="end" svg:x="12.963cm" svg:y="2.458cm" style:legend-expansion="high" chart:style-name="ch3"/>
        <chart:plot-area chart:style-name="ch4" table:cell-range-address="Sheet1.A63:Sheet1.B73 Sheet1.A61:Sheet1.A61 Sheet1.C61:Sheet1.C61 Sheet1.D63:Sheet1.D73 Sheet1.E61:Sheet1.E61 Sheet1.F63:Sheet1.F73 Sheet1.G61:Sheet1.G61 Sheet1.H63:Sheet1.H73 Sheet1.I61:Sheet1.I61 Sheet1.J63:Sheet1.J73 Sheet1.K61:Sheet1.K61 Sheet1.L63:Sheet1.L73 Sheet1.M61:Sheet1.M61 Sheet1.N63:Sheet1.N73 Sheet1.O61:Sheet1.O61 Sheet1.P63:Sheet1.P73" chart:data-source-has-labels="row" svg:x="0.32cm" svg:y="1.275cm" svg:width="12.323cm" svg:height="7.545cm">
          <chart:coordinate-region svg:x="2.053cm" svg:y="1.474cm" svg:width="9.94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63:Sheet1.B73" chart:label-cell-address="Sheet1.A61:Sheet1.A61" chart:class="chart:scatter">
            <chart:domain table:cell-range-address="Sheet1.A63:Sheet1.A73"/>
            <chart:data-point chart:repeated="11"/>
          </chart:series>
          <chart:series chart:style-name="ch9" chart:values-cell-range-address="Sheet1.D63:Sheet1.D73" chart:label-cell-address="Sheet1.C61:Sheet1.C61" chart:class="chart:scatter">
            <chart:domain table:cell-range-address="Sheet1.C63:Sheet1.C73"/>
            <chart:data-point chart:repeated="11"/>
          </chart:series>
          <chart:series chart:style-name="ch10" chart:values-cell-range-address="Sheet1.F63:Sheet1.F73" chart:label-cell-address="Sheet1.E61:Sheet1.E61" chart:class="chart:scatter">
            <chart:domain table:cell-range-address="Sheet1.E63:Sheet1.E73"/>
            <chart:data-point chart:repeated="11"/>
          </chart:series>
          <chart:series chart:style-name="ch11" chart:values-cell-range-address="Sheet1.H63:Sheet1.H73" chart:label-cell-address="Sheet1.G61:Sheet1.G61" chart:class="chart:scatter">
            <chart:domain table:cell-range-address="Sheet1.G63:Sheet1.G73"/>
            <chart:data-point chart:repeated="11"/>
          </chart:series>
          <chart:series chart:style-name="ch12" chart:values-cell-range-address="Sheet1.J63:Sheet1.J73" chart:label-cell-address="Sheet1.I61:Sheet1.I61" chart:class="chart:scatter">
            <chart:domain table:cell-range-address="Sheet1.I63:Sheet1.I73"/>
            <chart:data-point chart:repeated="11"/>
          </chart:series>
          <chart:series chart:style-name="ch13" chart:values-cell-range-address="Sheet1.L63:Sheet1.L73" chart:label-cell-address="Sheet1.K61:Sheet1.K61" chart:class="chart:scatter">
            <chart:domain table:cell-range-address="Sheet1.K63:Sheet1.K73"/>
            <chart:data-point chart:repeated="11"/>
          </chart:series>
          <chart:series chart:style-name="ch14" chart:values-cell-range-address="Sheet1.N63:Sheet1.N73" chart:label-cell-address="Sheet1.M61:Sheet1.M61" chart:class="chart:scatter">
            <chart:domain table:cell-range-address="Sheet1.M63:Sheet1.M73"/>
            <chart:data-point chart:repeated="11"/>
          </chart:series>
          <chart:series chart:style-name="ch15" chart:values-cell-range-address="Sheet1.P63:Sheet1.P73" chart:label-cell-address="Sheet1.O61:Sheet1.O61" chart:class="chart:scatter">
            <chart:domain table:cell-range-address="Sheet1.O63:Sheet1.O73"/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 threshold</text:p>
                <draw:g>
                  <svg:desc>Sheet1.A61:Sheet1.A6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0</text:p>
                <draw:g>
                  <svg:desc>Sheet1.C61:Sheet1.C6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50</text:p>
                <draw:g>
                  <svg:desc>Sheet1.E61:Sheet1.E6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0</text:p>
                <draw:g>
                  <svg:desc>Sheet1.G61:Sheet1.G6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200</text:p>
                <draw:g>
                  <svg:desc>Sheet1.I61:Sheet1.I6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250</text:p>
                <draw:g>
                  <svg:desc>Sheet1.K61:Sheet1.K6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375</text:p>
                <draw:g>
                  <svg:desc>Sheet1.M61:Sheet1.M6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500</text:p>
                <draw:g>
                  <svg:desc>Sheet1.O61:Sheet1.O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Sheet1.A63:Sheet1.A73</svg:desc>
                </draw:g>
              </table:table-cell>
              <table:table-cell office:value-type="float" office:value="0.00021031541">
                <text:p>0.00021031541</text:p>
                <draw:g>
                  <svg:desc>Sheet1.B63:Sheet1.B73</svg:desc>
                </draw:g>
              </table:table-cell>
              <table:table-cell office:value-type="float" office:value="1024">
                <text:p>1024</text:p>
                <draw:g>
                  <svg:desc>Sheet1.C63:Sheet1.C73</svg:desc>
                </draw:g>
              </table:table-cell>
              <table:table-cell office:value-type="float" office:value="0.00014672042">
                <text:p>0.00014672042</text:p>
                <draw:g>
                  <svg:desc>Sheet1.D63:Sheet1.D73</svg:desc>
                </draw:g>
              </table:table-cell>
              <table:table-cell office:value-type="float" office:value="1024">
                <text:p>1024</text:p>
                <draw:g>
                  <svg:desc>Sheet1.E63:Sheet1.E73</svg:desc>
                </draw:g>
              </table:table-cell>
              <table:table-cell office:value-type="float" office:value="0.0001126425">
                <text:p>0.0001126425</text:p>
                <draw:g>
                  <svg:desc>Sheet1.F63:Sheet1.F73</svg:desc>
                </draw:g>
              </table:table-cell>
              <table:table-cell office:value-type="float" office:value="1024">
                <text:p>1024</text:p>
                <draw:g>
                  <svg:desc>Sheet1.G63:Sheet1.G73</svg:desc>
                </draw:g>
              </table:table-cell>
              <table:table-cell office:value-type="float" office:value="0.00009619457">
                <text:p>0.00009619457</text:p>
                <draw:g>
                  <svg:desc>Sheet1.H63:Sheet1.H73</svg:desc>
                </draw:g>
              </table:table-cell>
              <table:table-cell office:value-type="float" office:value="1024">
                <text:p>1024</text:p>
                <draw:g>
                  <svg:desc>Sheet1.I63:Sheet1.I73</svg:desc>
                </draw:g>
              </table:table-cell>
              <table:table-cell office:value-type="float" office:value="0.00008104957">
                <text:p>0.00008104957</text:p>
                <draw:g>
                  <svg:desc>Sheet1.J63:Sheet1.J73</svg:desc>
                </draw:g>
              </table:table-cell>
              <table:table-cell office:value-type="float" office:value="1024">
                <text:p>1024</text:p>
                <draw:g>
                  <svg:desc>Sheet1.K63:Sheet1.K73</svg:desc>
                </draw:g>
              </table:table-cell>
              <table:table-cell office:value-type="float" office:value="0.00008817292">
                <text:p>0.00008817292</text:p>
                <draw:g>
                  <svg:desc>Sheet1.L63:Sheet1.L73</svg:desc>
                </draw:g>
              </table:table-cell>
              <table:table-cell office:value-type="float" office:value="1024">
                <text:p>1024</text:p>
                <draw:g>
                  <svg:desc>Sheet1.M63:Sheet1.M73</svg:desc>
                </draw:g>
              </table:table-cell>
              <table:table-cell office:value-type="float" office:value="0.00007499917">
                <text:p>0.00007499917</text:p>
                <draw:g>
                  <svg:desc>Sheet1.N63:Sheet1.N73</svg:desc>
                </draw:g>
              </table:table-cell>
              <table:table-cell office:value-type="float" office:value="1024">
                <text:p>1024</text:p>
                <draw:g>
                  <svg:desc>Sheet1.O63:Sheet1.O73</svg:desc>
                </draw:g>
              </table:table-cell>
              <table:table-cell office:value-type="float" office:value="0.00007427791">
                <text:p>0.00007427791</text:p>
                <draw:g>
                  <svg:desc>Sheet1.P63:Sheet1.P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0.00010121791">
                <text:p>0.00010121791</text:p>
              </table:table-cell>
              <table:table-cell office:value-type="float" office:value="2048">
                <text:p>2048</text:p>
              </table:table-cell>
              <table:table-cell office:value-type="float" office:value="0.00027872084">
                <text:p>0.00027872084</text:p>
              </table:table-cell>
              <table:table-cell office:value-type="float" office:value="2048">
                <text:p>2048</text:p>
              </table:table-cell>
              <table:table-cell office:value-type="float" office:value="0.00009297791">
                <text:p>0.00009297791</text:p>
              </table:table-cell>
              <table:table-cell office:value-type="float" office:value="2048">
                <text:p>2048</text:p>
              </table:table-cell>
              <table:table-cell office:value-type="float" office:value="0.00002891083">
                <text:p>0.00002891083</text:p>
              </table:table-cell>
              <table:table-cell office:value-type="float" office:value="2048">
                <text:p>2048</text:p>
              </table:table-cell>
              <table:table-cell office:value-type="float" office:value="0.00002682625">
                <text:p>0.00002682625</text:p>
              </table:table-cell>
              <table:table-cell office:value-type="float" office:value="2048">
                <text:p>2048</text:p>
              </table:table-cell>
              <table:table-cell office:value-type="float" office:value="0.00002686207">
                <text:p>0.00002686207</text:p>
              </table:table-cell>
              <table:table-cell office:value-type="float" office:value="2048">
                <text:p>2048</text:p>
              </table:table-cell>
              <table:table-cell office:value-type="float" office:value="0.00008592876">
                <text:p>0.00008592876</text:p>
              </table:table-cell>
              <table:table-cell office:value-type="float" office:value="2048">
                <text:p>2048</text:p>
              </table:table-cell>
              <table:table-cell office:value-type="float" office:value="0.00001809084">
                <text:p>0.000018090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0.00023148625">
                <text:p>0.00023148625</text:p>
              </table:table-cell>
              <table:table-cell office:value-type="float" office:value="4096">
                <text:p>4096</text:p>
              </table:table-cell>
              <table:table-cell office:value-type="float" office:value="0.00011016582">
                <text:p>0.00011016582</text:p>
              </table:table-cell>
              <table:table-cell office:value-type="float" office:value="4096">
                <text:p>4096</text:p>
              </table:table-cell>
              <table:table-cell office:value-type="float" office:value="0.00008742584">
                <text:p>0.00008742584</text:p>
              </table:table-cell>
              <table:table-cell office:value-type="float" office:value="4096">
                <text:p>4096</text:p>
              </table:table-cell>
              <table:table-cell office:value-type="float" office:value="0.00006967959">
                <text:p>0.00006967959</text:p>
              </table:table-cell>
              <table:table-cell office:value-type="float" office:value="4096">
                <text:p>4096</text:p>
              </table:table-cell>
              <table:table-cell office:value-type="float" office:value="0.00006016583">
                <text:p>0.00006016583</text:p>
              </table:table-cell>
              <table:table-cell office:value-type="float" office:value="4096">
                <text:p>4096</text:p>
              </table:table-cell>
              <table:table-cell office:value-type="float" office:value="0.00005828125">
                <text:p>0.00005828125</text:p>
              </table:table-cell>
              <table:table-cell office:value-type="float" office:value="4096">
                <text:p>4096</text:p>
              </table:table-cell>
              <table:table-cell office:value-type="float" office:value="0.00004912918">
                <text:p>0.00004912918</text:p>
              </table:table-cell>
              <table:table-cell office:value-type="float" office:value="4096">
                <text:p>4096</text:p>
              </table:table-cell>
              <table:table-cell office:value-type="float" office:value="0.00005015292">
                <text:p>0.00005015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0.00050176125">
                <text:p>0.00050176125</text:p>
              </table:table-cell>
              <table:table-cell office:value-type="float" office:value="8192">
                <text:p>8192</text:p>
              </table:table-cell>
              <table:table-cell office:value-type="float" office:value="0.00025496624">
                <text:p>0.00025496624</text:p>
              </table:table-cell>
              <table:table-cell office:value-type="float" office:value="8192">
                <text:p>8192</text:p>
              </table:table-cell>
              <table:table-cell office:value-type="float" office:value="0.00020331291">
                <text:p>0.00020331291</text:p>
              </table:table-cell>
              <table:table-cell office:value-type="float" office:value="8192">
                <text:p>8192</text:p>
              </table:table-cell>
              <table:table-cell office:value-type="float" office:value="0.00024029208">
                <text:p>0.00024029208</text:p>
              </table:table-cell>
              <table:table-cell office:value-type="float" office:value="8192">
                <text:p>8192</text:p>
              </table:table-cell>
              <table:table-cell office:value-type="float" office:value="0.00014057584">
                <text:p>0.00014057584</text:p>
              </table:table-cell>
              <table:table-cell office:value-type="float" office:value="8192">
                <text:p>8192</text:p>
              </table:table-cell>
              <table:table-cell office:value-type="float" office:value="0.00014070625">
                <text:p>0.00014070625</text:p>
              </table:table-cell>
              <table:table-cell office:value-type="float" office:value="8192">
                <text:p>8192</text:p>
              </table:table-cell>
              <table:table-cell office:value-type="float" office:value="0.00011450875">
                <text:p>0.00011450875</text:p>
              </table:table-cell>
              <table:table-cell office:value-type="float" office:value="8192">
                <text:p>8192</text:p>
              </table:table-cell>
              <table:table-cell office:value-type="float" office:value="0.00011409916">
                <text:p>0.000114099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0.00128022041">
                <text:p>0.00128022041</text:p>
              </table:table-cell>
              <table:table-cell office:value-type="float" office:value="16384">
                <text:p>16384</text:p>
              </table:table-cell>
              <table:table-cell office:value-type="float" office:value="0.00068559957">
                <text:p>0.00068559957</text:p>
              </table:table-cell>
              <table:table-cell office:value-type="float" office:value="16384">
                <text:p>16384</text:p>
              </table:table-cell>
              <table:table-cell office:value-type="float" office:value="0.00051503">
                <text:p>0.00051503</text:p>
              </table:table-cell>
              <table:table-cell office:value-type="float" office:value="16384">
                <text:p>16384</text:p>
              </table:table-cell>
              <table:table-cell office:value-type="float" office:value="0.00040954166">
                <text:p>0.00040954166</text:p>
              </table:table-cell>
              <table:table-cell office:value-type="float" office:value="16384">
                <text:p>16384</text:p>
              </table:table-cell>
              <table:table-cell office:value-type="float" office:value="0.00034220249">
                <text:p>0.00034220249</text:p>
              </table:table-cell>
              <table:table-cell office:value-type="float" office:value="16384">
                <text:p>16384</text:p>
              </table:table-cell>
              <table:table-cell office:value-type="float" office:value="0.00034774584">
                <text:p>0.00034774584</text:p>
              </table:table-cell>
              <table:table-cell office:value-type="float" office:value="16384">
                <text:p>16384</text:p>
              </table:table-cell>
              <table:table-cell office:value-type="float" office:value="0.00028646999">
                <text:p>0.00028646999</text:p>
              </table:table-cell>
              <table:table-cell office:value-type="float" office:value="16384">
                <text:p>16384</text:p>
              </table:table-cell>
              <table:table-cell office:value-type="float" office:value="0.00028591125">
                <text:p>0.00028591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0.00284053875">
                <text:p>0.00284053875</text:p>
              </table:table-cell>
              <table:table-cell office:value-type="float" office:value="32768">
                <text:p>32768</text:p>
              </table:table-cell>
              <table:table-cell office:value-type="float" office:value="0.00145881876">
                <text:p>0.00145881876</text:p>
              </table:table-cell>
              <table:table-cell office:value-type="float" office:value="32768">
                <text:p>32768</text:p>
              </table:table-cell>
              <table:table-cell office:value-type="float" office:value="0.00108382375">
                <text:p>0.00108382375</text:p>
              </table:table-cell>
              <table:table-cell office:value-type="float" office:value="32768">
                <text:p>32768</text:p>
              </table:table-cell>
              <table:table-cell office:value-type="float" office:value="0.00086923791">
                <text:p>0.00086923791</text:p>
              </table:table-cell>
              <table:table-cell office:value-type="float" office:value="32768">
                <text:p>32768</text:p>
              </table:table-cell>
              <table:table-cell office:value-type="float" office:value="0.00082606376">
                <text:p>0.00082606376</text:p>
              </table:table-cell>
              <table:table-cell office:value-type="float" office:value="32768">
                <text:p>32768</text:p>
              </table:table-cell>
              <table:table-cell office:value-type="float" office:value="0.00074138916">
                <text:p>0.00074138916</text:p>
              </table:table-cell>
              <table:table-cell office:value-type="float" office:value="32768">
                <text:p>32768</text:p>
              </table:table-cell>
              <table:table-cell office:value-type="float" office:value="0.00074914917">
                <text:p>0.00074914917</text:p>
              </table:table-cell>
              <table:table-cell office:value-type="float" office:value="32768">
                <text:p>32768</text:p>
              </table:table-cell>
              <table:table-cell office:value-type="float" office:value="0.00064028416">
                <text:p>0.00064028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0.00629654874">
                <text:p>0.00629654874</text:p>
              </table:table-cell>
              <table:table-cell office:value-type="float" office:value="65536">
                <text:p>65536</text:p>
              </table:table-cell>
              <table:table-cell office:value-type="float" office:value="0.00334974041">
                <text:p>0.00334974041</text:p>
              </table:table-cell>
              <table:table-cell office:value-type="float" office:value="65536">
                <text:p>65536</text:p>
              </table:table-cell>
              <table:table-cell office:value-type="float" office:value="0.00248884167">
                <text:p>0.00248884167</text:p>
              </table:table-cell>
              <table:table-cell office:value-type="float" office:value="65536">
                <text:p>65536</text:p>
              </table:table-cell>
              <table:table-cell office:value-type="float" office:value="0.00198434542">
                <text:p>0.00198434542</text:p>
              </table:table-cell>
              <table:table-cell office:value-type="float" office:value="65536">
                <text:p>65536</text:p>
              </table:table-cell>
              <table:table-cell office:value-type="float" office:value="0.00181628875">
                <text:p>0.00181628875</text:p>
              </table:table-cell>
              <table:table-cell office:value-type="float" office:value="65536">
                <text:p>65536</text:p>
              </table:table-cell>
              <table:table-cell office:value-type="float" office:value="0.00179981292">
                <text:p>0.00179981292</text:p>
              </table:table-cell>
              <table:table-cell office:value-type="float" office:value="65536">
                <text:p>65536</text:p>
              </table:table-cell>
              <table:table-cell office:value-type="float" office:value="0.00150826001">
                <text:p>0.00150826001</text:p>
              </table:table-cell>
              <table:table-cell office:value-type="float" office:value="65536">
                <text:p>65536</text:p>
              </table:table-cell>
              <table:table-cell office:value-type="float" office:value="0.00148581082">
                <text:p>0.001485810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0.01354941084">
                <text:p>0.01354941084</text:p>
              </table:table-cell>
              <table:table-cell office:value-type="float" office:value="131072">
                <text:p>131072</text:p>
              </table:table-cell>
              <table:table-cell office:value-type="float" office:value="0.00750022041">
                <text:p>0.00750022041</text:p>
              </table:table-cell>
              <table:table-cell office:value-type="float" office:value="131072">
                <text:p>131072</text:p>
              </table:table-cell>
              <table:table-cell office:value-type="float" office:value="0.00552945918">
                <text:p>0.00552945918</text:p>
              </table:table-cell>
              <table:table-cell office:value-type="float" office:value="131072">
                <text:p>131072</text:p>
              </table:table-cell>
              <table:table-cell office:value-type="float" office:value="0.00443779042">
                <text:p>0.00443779042</text:p>
              </table:table-cell>
              <table:table-cell office:value-type="float" office:value="131072">
                <text:p>131072</text:p>
              </table:table-cell>
              <table:table-cell office:value-type="float" office:value="0.00386940541">
                <text:p>0.00386940541</text:p>
              </table:table-cell>
              <table:table-cell office:value-type="float" office:value="131072">
                <text:p>131072</text:p>
              </table:table-cell>
              <table:table-cell office:value-type="float" office:value="0.00380326917">
                <text:p>0.00380326917</text:p>
              </table:table-cell>
              <table:table-cell office:value-type="float" office:value="131072">
                <text:p>131072</text:p>
              </table:table-cell>
              <table:table-cell office:value-type="float" office:value="0.00335200833">
                <text:p>0.00335200833</text:p>
              </table:table-cell>
              <table:table-cell office:value-type="float" office:value="131072">
                <text:p>131072</text:p>
              </table:table-cell>
              <table:table-cell office:value-type="float" office:value="0.00353692917">
                <text:p>0.003536929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0.05600144876">
                <text:p>0.05600144876</text:p>
              </table:table-cell>
              <table:table-cell office:value-type="float" office:value="262144">
                <text:p>262144</text:p>
              </table:table-cell>
              <table:table-cell office:value-type="float" office:value="0.04159459376">
                <text:p>0.04159459376</text:p>
              </table:table-cell>
              <table:table-cell office:value-type="float" office:value="262144">
                <text:p>262144</text:p>
              </table:table-cell>
              <table:table-cell office:value-type="float" office:value="0.03369652334">
                <text:p>0.03369652334</text:p>
              </table:table-cell>
              <table:table-cell office:value-type="float" office:value="262144">
                <text:p>262144</text:p>
              </table:table-cell>
              <table:table-cell office:value-type="float" office:value="0.0328542175">
                <text:p>0.0328542175</text:p>
              </table:table-cell>
              <table:table-cell office:value-type="float" office:value="262144">
                <text:p>262144</text:p>
              </table:table-cell>
              <table:table-cell office:value-type="float" office:value="0.03616262209">
                <text:p>0.03616262209</text:p>
              </table:table-cell>
              <table:table-cell office:value-type="float" office:value="262144">
                <text:p>262144</text:p>
              </table:table-cell>
              <table:table-cell office:value-type="float" office:value="0.03408462333">
                <text:p>0.03408462333</text:p>
              </table:table-cell>
              <table:table-cell office:value-type="float" office:value="262144">
                <text:p>262144</text:p>
              </table:table-cell>
              <table:table-cell office:value-type="float" office:value="0.04268399541">
                <text:p>0.04268399541</text:p>
              </table:table-cell>
              <table:table-cell office:value-type="float" office:value="262144">
                <text:p>262144</text:p>
              </table:table-cell>
              <table:table-cell office:value-type="float" office:value="0.034956025">
                <text:p>0.034956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0.12648846916">
                <text:p>0.12648846916</text:p>
              </table:table-cell>
              <table:table-cell office:value-type="float" office:value="524288">
                <text:p>524288</text:p>
              </table:table-cell>
              <table:table-cell office:value-type="float" office:value="0.09422217416">
                <text:p>0.09422217416</text:p>
              </table:table-cell>
              <table:table-cell office:value-type="float" office:value="524288">
                <text:p>524288</text:p>
              </table:table-cell>
              <table:table-cell office:value-type="float" office:value="0.08690225666">
                <text:p>0.08690225666</text:p>
              </table:table-cell>
              <table:table-cell office:value-type="float" office:value="524288">
                <text:p>524288</text:p>
              </table:table-cell>
              <table:table-cell office:value-type="float" office:value="0.08135120791">
                <text:p>0.08135120791</text:p>
              </table:table-cell>
              <table:table-cell office:value-type="float" office:value="524288">
                <text:p>524288</text:p>
              </table:table-cell>
              <table:table-cell office:value-type="float" office:value="0.08856336666">
                <text:p>0.08856336666</text:p>
              </table:table-cell>
              <table:table-cell office:value-type="float" office:value="524288">
                <text:p>524288</text:p>
              </table:table-cell>
              <table:table-cell office:value-type="float" office:value="0.08282043042">
                <text:p>0.08282043042</text:p>
              </table:table-cell>
              <table:table-cell office:value-type="float" office:value="524288">
                <text:p>524288</text:p>
              </table:table-cell>
              <table:table-cell office:value-type="float" office:value="0.11186093709">
                <text:p>0.11186093709</text:p>
              </table:table-cell>
              <table:table-cell office:value-type="float" office:value="524288">
                <text:p>524288</text:p>
              </table:table-cell>
              <table:table-cell office:value-type="float" office:value="0.09996953708">
                <text:p>0.09996953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8576">
                <text:p>1048576</text:p>
              </table:table-cell>
              <table:table-cell office:value-type="float" office:value="0.32682781917">
                <text:p>0.32682781917</text:p>
              </table:table-cell>
              <table:table-cell office:value-type="float" office:value="1048576">
                <text:p>1048576</text:p>
              </table:table-cell>
              <table:table-cell office:value-type="float" office:value="0.277680515">
                <text:p>0.277680515</text:p>
              </table:table-cell>
              <table:table-cell office:value-type="float" office:value="1048576">
                <text:p>1048576</text:p>
              </table:table-cell>
              <table:table-cell office:value-type="float" office:value="0.25174480416">
                <text:p>0.25174480416</text:p>
              </table:table-cell>
              <table:table-cell office:value-type="float" office:value="1048576">
                <text:p>1048576</text:p>
              </table:table-cell>
              <table:table-cell office:value-type="float" office:value="0.24658843584">
                <text:p>0.24658843584</text:p>
              </table:table-cell>
              <table:table-cell office:value-type="float" office:value="1048576">
                <text:p>1048576</text:p>
              </table:table-cell>
              <table:table-cell office:value-type="float" office:value="0.25109631291">
                <text:p>0.25109631291</text:p>
              </table:table-cell>
              <table:table-cell office:value-type="float" office:value="1048576">
                <text:p>1048576</text:p>
              </table:table-cell>
              <table:table-cell office:value-type="float" office:value="0.23967468791">
                <text:p>0.23967468791</text:p>
              </table:table-cell>
              <table:table-cell office:value-type="float" office:value="1048576">
                <text:p>1048576</text:p>
              </table:table-cell>
              <table:table-cell office:value-type="float" office:value="0.24080100084">
                <text:p>0.24080100084</text:p>
              </table:table-cell>
              <table:table-cell office:value-type="float" office:value="1048576">
                <text:p>1048576</text:p>
              </table:table-cell>
              <table:table-cell office:value-type="float" office:value="0.24306473875">
                <text:p>0.24306473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