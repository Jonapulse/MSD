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1.4047in"/>
    </style:style>
    <style:style style:name="co7" style:family="table-column">
      <style:table-column-properties fo:break-before="auto" style:column-width="1.52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reation from best case</text:p>
          </table:table-cell>
          <table:table-cell/>
          <table:table-cell office:value-type="string" calcext:value-type="string">
            <text:p>Creation from shuffled</text:p>
          </table:table-cell>
          <table:table-cell/>
          <table:table-cell office:value-type="string" calcext:value-type="string">
            <text:p>Creation from worst case (oops)</text:p>
          </table:table-cell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TreeSet t</text:p>
          </table:table-cell>
          <table:table-cell office:value-type="string" calcext:value-type="string">
            <text:p>ArrayList t</text:p>
          </table:table-cell>
          <table:table-cell office:value-type="string" calcext:value-type="string">
            <text:p>TreeSet t</text:p>
          </table:table-cell>
          <table:table-cell office:value-type="string" calcext:value-type="string">
            <text:p>ArrayList t</text:p>
          </table:table-cell>
          <table:table-cell office:value-type="string" calcext:value-type="string">
            <text:p>TreeSet t</text:p>
          </table:table-cell>
          <table:table-cell office:value-type="string" calcext:value-type="string">
            <text:p>ArrayList 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t(n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872.91" calcext:value-type="float">
            <text:p>80872.91</text:p>
          </table:table-cell>
          <table:table-cell office:value-type="float" office:value="19668.75" calcext:value-type="float">
            <text:p>19668.75</text:p>
          </table:table-cell>
          <table:table-cell office:value-type="float" office:value="60599.17" calcext:value-type="float">
            <text:p>60599.17</text:p>
          </table:table-cell>
          <table:table-cell office:value-type="float" office:value="19157.51" calcext:value-type="float">
            <text:p>19157.51</text:p>
          </table:table-cell>
          <table:table-cell office:value-type="float" office:value="81803.75" calcext:value-type="float">
            <text:p>81803.75</text:p>
          </table:table-cell>
          <table:table-cell office:value-type="float" office:value="19544.17" calcext:value-type="float">
            <text:p>19544.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704.16" calcext:value-type="float">
            <text:p>72704.16</text:p>
          </table:table-cell>
          <table:table-cell office:value-type="float" office:value="2806.25" calcext:value-type="float">
            <text:p>2806.25</text:p>
          </table:table-cell>
          <table:table-cell office:value-type="float" office:value="65093.33" calcext:value-type="float">
            <text:p>65093.33</text:p>
          </table:table-cell>
          <table:table-cell office:value-type="float" office:value="3027.08" calcext:value-type="float">
            <text:p>3027.08</text:p>
          </table:table-cell>
          <table:table-cell office:value-type="float" office:value="75784.99" calcext:value-type="float">
            <text:p>75784.99</text:p>
          </table:table-cell>
          <table:table-cell office:value-type="float" office:value="3757.5" calcext:value-type="float">
            <text:p>3757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2544.16" calcext:value-type="float">
            <text:p>132544.16</text:p>
          </table:table-cell>
          <table:table-cell office:value-type="float" office:value="4979.58" calcext:value-type="float">
            <text:p>4979.58</text:p>
          </table:table-cell>
          <table:table-cell office:value-type="float" office:value="111792.51" calcext:value-type="float">
            <text:p>111792.51</text:p>
          </table:table-cell>
          <table:table-cell office:value-type="float" office:value="6238.33" calcext:value-type="float">
            <text:p>6238.33</text:p>
          </table:table-cell>
          <table:table-cell office:value-type="float" office:value="133757.08" calcext:value-type="float">
            <text:p>133757.08</text:p>
          </table:table-cell>
          <table:table-cell office:value-type="float" office:value="5944.59" calcext:value-type="float">
            <text:p>5944.5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61.67" calcext:value-type="float">
            <text:p>299961.67</text:p>
          </table:table-cell>
          <table:table-cell office:value-type="float" office:value="10224.17" calcext:value-type="float">
            <text:p>10224.17</text:p>
          </table:table-cell>
          <table:table-cell office:value-type="float" office:value="531425" calcext:value-type="float">
            <text:p>531425</text:p>
          </table:table-cell>
          <table:table-cell office:value-type="float" office:value="12761.68" calcext:value-type="float">
            <text:p>12761.68</text:p>
          </table:table-cell>
          <table:table-cell office:value-type="float" office:value="284902.08" calcext:value-type="float">
            <text:p>284902.08</text:p>
          </table:table-cell>
          <table:table-cell office:value-type="float" office:value="11712.91" calcext:value-type="float">
            <text:p>11712.9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2936.25" calcext:value-type="float">
            <text:p>632936.25</text:p>
          </table:table-cell>
          <table:table-cell office:value-type="float" office:value="21446.67" calcext:value-type="float">
            <text:p>21446.67</text:p>
          </table:table-cell>
          <table:table-cell office:value-type="float" office:value="1310543.33" calcext:value-type="float">
            <text:p>1310543.33</text:p>
          </table:table-cell>
          <table:table-cell office:value-type="float" office:value="37021.66" calcext:value-type="float">
            <text:p>37021.66</text:p>
          </table:table-cell>
          <table:table-cell office:value-type="float" office:value="622380" calcext:value-type="float">
            <text:p>622380</text:p>
          </table:table-cell>
          <table:table-cell office:value-type="float" office:value="23629.18" calcext:value-type="float">
            <text:p>23629.1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328685.41" calcext:value-type="float">
            <text:p>1328685.41</text:p>
          </table:table-cell>
          <table:table-cell office:value-type="float" office:value="41789.99" calcext:value-type="float">
            <text:p>41789.99</text:p>
          </table:table-cell>
          <table:table-cell office:value-type="float" office:value="3326537.5" calcext:value-type="float">
            <text:p>3326537.5</text:p>
          </table:table-cell>
          <table:table-cell office:value-type="float" office:value="90035.42" calcext:value-type="float">
            <text:p>90035.42</text:p>
          </table:table-cell>
          <table:table-cell office:value-type="float" office:value="1432244.17" calcext:value-type="float">
            <text:p>1432244.17</text:p>
          </table:table-cell>
          <table:table-cell office:value-type="float" office:value="48196.67" calcext:value-type="float">
            <text:p>48196.6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828820.41" calcext:value-type="float">
            <text:p>2828820.41</text:p>
          </table:table-cell>
          <table:table-cell office:value-type="float" office:value="83560" calcext:value-type="float">
            <text:p>83560</text:p>
          </table:table-cell>
          <table:table-cell office:value-type="float" office:value="8253280.42" calcext:value-type="float">
            <text:p>8253280.42</text:p>
          </table:table-cell>
          <table:table-cell office:value-type="float" office:value="204896.25" calcext:value-type="float">
            <text:p>204896.25</text:p>
          </table:table-cell>
          <table:table-cell office:value-type="float" office:value="2806802.91" calcext:value-type="float">
            <text:p>2806802.91</text:p>
          </table:table-cell>
          <table:table-cell office:value-type="float" office:value="94974.16" calcext:value-type="float">
            <text:p>94974.16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968543.33" calcext:value-type="float">
            <text:p>5968543.33</text:p>
          </table:table-cell>
          <table:table-cell office:value-type="float" office:value="167658.75" calcext:value-type="float">
            <text:p>167658.75</text:p>
          </table:table-cell>
          <table:table-cell table:style-name="ce1" office:value-type="float" office:value="18948001.68" calcext:value-type="float">
            <text:p>1.89E+07</text:p>
          </table:table-cell>
          <table:table-cell office:value-type="float" office:value="439772.08" calcext:value-type="float">
            <text:p>439772.08</text:p>
          </table:table-cell>
          <table:table-cell office:value-type="float" office:value="5954702.5" calcext:value-type="float">
            <text:p>5954702.5</text:p>
          </table:table-cell>
          <table:table-cell office:value-type="float" office:value="195764.58" calcext:value-type="float">
            <text:p>195764.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pty list out</text:p>
          </table:table-cell>
          <table:table-cell table:number-columns-repeated="2"/>
          <table:table-cell office:value-type="string" calcext:value-type="string">
            <text:p>TreeSet t</text:p>
          </table:table-cell>
          <table:table-cell office:value-type="string" calcext:value-type="string">
            <text:p>ArrayList t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t(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09.18" calcext:value-type="float">
            <text:p>13809.18</text:p>
          </table:table-cell>
          <table:table-cell office:value-type="float" office:value="14870.82" calcext:value-type="float">
            <text:p>14870.82</text:p>
          </table:table-cell>
          <table:table-cell office:value-type="float" office:value="14285.02" calcext:value-type="float">
            <text:p>14285.02</text:p>
          </table:table-cell>
          <table:table-cell office:value-type="float" office:value="10476.68" calcext:value-type="float">
            <text:p>10476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2.5" calcext:value-type="float">
            <text:p>3212.5</text:p>
          </table:table-cell>
          <table:table-cell office:value-type="float" office:value="4351.66" calcext:value-type="float">
            <text:p>4351.66</text:p>
          </table:table-cell>
          <table:table-cell office:value-type="float" office:value="5325.84" calcext:value-type="float">
            <text:p>5325.84</text:p>
          </table:table-cell>
          <table:table-cell office:value-type="float" office:value="4151.66" calcext:value-type="float">
            <text:p>4151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37.5" calcext:value-type="float">
            <text:p>5637.5</text:p>
          </table:table-cell>
          <table:table-cell office:value-type="float" office:value="8472.5" calcext:value-type="float">
            <text:p>8472.5</text:p>
          </table:table-cell>
          <table:table-cell office:value-type="float" office:value="8150.84" calcext:value-type="float">
            <text:p>8150.84</text:p>
          </table:table-cell>
          <table:table-cell office:value-type="float" office:value="8169.16" calcext:value-type="float">
            <text:p>8169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96.66" calcext:value-type="float">
            <text:p>6396.66</text:p>
          </table:table-cell>
          <table:table-cell office:value-type="float" office:value="14419.16" calcext:value-type="float">
            <text:p>14419.16</text:p>
          </table:table-cell>
          <table:table-cell office:value-type="float" office:value="6928.34" calcext:value-type="float">
            <text:p>6928.34</text:p>
          </table:table-cell>
          <table:table-cell office:value-type="float" office:value="13962.52" calcext:value-type="float">
            <text:p>13962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97.5" calcext:value-type="float">
            <text:p>5497.5</text:p>
          </table:table-cell>
          <table:table-cell office:value-type="float" office:value="28797.5" calcext:value-type="float">
            <text:p>28797.5</text:p>
          </table:table-cell>
          <table:table-cell office:value-type="float" office:value="7200.84" calcext:value-type="float">
            <text:p>7200.84</text:p>
          </table:table-cell>
          <table:table-cell office:value-type="float" office:value="30601.66" calcext:value-type="float">
            <text:p>30601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20.84" calcext:value-type="float">
            <text:p>12720.84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15178.32" calcext:value-type="float">
            <text:p>15178.32</text:p>
          </table:table-cell>
          <table:table-cell office:value-type="float" office:value="66544.18" calcext:value-type="float">
            <text:p>66544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27.5" calcext:value-type="float">
            <text:p>22727.5</text:p>
          </table:table-cell>
          <table:table-cell office:value-type="float" office:value="143672.5" calcext:value-type="float">
            <text:p>143672.5</text:p>
          </table:table-cell>
          <table:table-cell office:value-type="float" office:value="41652.5" calcext:value-type="float">
            <text:p>41652.5</text:p>
          </table:table-cell>
          <table:table-cell office:value-type="float" office:value="158858.36" calcext:value-type="float">
            <text:p>158858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724.16" calcext:value-type="float">
            <text:p>54724.16</text:p>
          </table:table-cell>
          <table:table-cell office:value-type="float" office:value="307194.18" calcext:value-type="float">
            <text:p>307194.18</text:p>
          </table:table-cell>
          <table:table-cell office:value-type="float" office:value="89848.36" calcext:value-type="float">
            <text:p>89848.36</text:p>
          </table:table-cell>
          <table:table-cell office:value-type="float" office:value="333276.68" calcext:value-type="float">
            <text:p>333276.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2:21:23.601670000</meta:creation-date>
    <dc:date>2025-11-20T13:08:33.182996000</dc:date>
    <meta:editing-duration>PT16M36S</meta:editing-duration>
    <meta:editing-cycles>1</meta:editing-cycles>
    <meta:document-statistic meta:table-count="1" meta:cell-count="112" meta:object-count="0"/>
    <meta:generator>LibreOffice/25.8.2.2$MacOSX_AARCH64 LibreOffice_project/d401f2107ccab8f924a8e2df40f573aab7605b6f</meta:generator>
    <meta:user-defined meta:name=""/>
  </office:meta>
</office:document-meta>
</file>