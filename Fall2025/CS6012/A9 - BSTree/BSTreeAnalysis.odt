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0e47ce" officeooo:paragraph-rsid="000e47ce"/>
    </style:style>
    <style:style style:name="P2" style:family="paragraph" style:parent-style-name="Standard">
      <style:text-properties officeooo:rsid="001032b5" officeooo:paragraph-rsid="001032b5"/>
    </style:style>
    <style:style style:name="P3" style:family="paragraph" style:parent-style-name="Standard">
      <style:text-properties officeooo:rsid="0013807c" officeooo:paragraph-rsid="0013807c"/>
    </style:style>
    <style:style style:name="T1" style:family="text">
      <style:text-properties officeooo:rsid="0011c3dc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9 Analysis – 6012 – Jon Pulsipher</text:p>
      <text:p text:style-name="P1"/>
      <text:p text:style-name="P1">1) Compare bulk construction versus repeated insertion into an empty tree.</text:p>
      <text:p text:style-name="P1"/>
      <text:p text:style-name="P2"><draw:frame draw:style-name="fr1" draw:name="Object1" text:anchor-type="char" svg:width="6.2925in" svg:height="3.5457in" draw:z-index="0"><draw:object xlink:href="./Object 1" xlink:type="simple" xlink:show="embed" xlink:actuate="onLoad"/><draw:image xlink:href="./ObjectReplacements/Object 1" xlink:type="simple" xlink:show="embed" xlink:actuate="onLoad"/></draw:frame>Well, something isn’t right. Bulk construction logically should be <text:span text:style-name="T1">more efficient then worst case sequential addition. However, that is not what I’m seeing. I expect there is an issue with the testing (I don’t know what ‘worst’ case means, but I’m trying lines in a row), or my implementation.</text:span></text:p>
      <text:p text:style-name="P1"/>
      <text:p text:style-name="P1">2) Compare collision detection using the assignment’s algorithm with one suggested in the analysis.</text:p>
      <text:p text:style-name="P1"/>
      <text:p text:style-name="P1"/>
      <text:p text:style-name="P1"/>
      <text:p text:style-name="P3"><draw:frame draw:style-name="fr1" draw:name="Object2" text:anchor-type="char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text:soft-page-break/>In this case, going through all nodes takes significantly longer than the algorithm implemented in the assignment, which takes advantage of a binary tree search. This difference in performance is expec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15T11:57:16.234000000</meta:creation-date>
    <dc:date>2025-12-15T12:53:41.597000000</dc:date>
    <meta:editing-duration>PT6M31S</meta:editing-duration>
    <meta:editing-cycles>1</meta:editing-cycles>
    <meta:document-statistic meta:table-count="0" meta:image-count="0" meta:object-count="2" meta:page-count="2" meta:paragraph-count="5" meta:word-count="110" meta:character-count="705" meta:non-whitespace-character-count="598"/>
    <meta:generator>LibreOffice/7.2.5.2$Windows_X86_64 LibreOffice_project/499f9727c189e6ef3471021d6132d4c694f357e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2cm" svg:height="9.006cm" xlink:href="." xlink:type="simple" chart:class="chart:scatter" chart:style-name="ch1">
        <chart:legend chart:legend-position="end" svg:x="10.51cm" svg:y="3.955cm" style:legend-expansion="high" chart:style-name="ch2"/>
        <chart:plot-area chart:style-name="ch3" chart:data-source-has-labels="both" svg:x="1.33cm" svg:y="0.18cm" svg:width="8.861cm" svg:height="7.665cm">
          <chart:coordinate-region svg:x="2.137cm" svg:y="0.38cm" svg:width="7.404cm" svg:height="6.818cm"/>
          <chart:axis chart:dimension="x" chart:name="primary-x" chart:style-name="ch4" chartooo:axis-type="auto">
            <chart:title svg:x="5.61cm" svg:y="8.025cm" chart:style-name="ch5">
              <text:p>n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4.744cm" chart:style-name="ch7">
              <text:p>Time(ms)</text:p>
            </chart:title>
            <chart:grid chart:style-name="ch8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10" chart:values-cell-range-address="local-table.$D$2:.$D$12" chart:label-cell-address="local-table.$D$1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ulk Construction t(ms)</text:p>
                <text:list>
                  <text:list-item>
                    <text:p>Bulk Construction</text:p>
                  </text:list-item>
                  <text:list-item>
                    <text:p>t(ms)</text:p>
                  </text:list-item>
                </text:list>
              </table:table-cell>
              <table:table-cell office:value-type="string">
                <text:p>Successive Insertion t(ms)</text:p>
                <text:list>
                  <text:list-item>
                    <text:p>Successive Insertion</text:p>
                  </text:list-item>
                  <text:list-item>
                    <text:p>t(ms)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</table:table-cell>
              <table:table-cell office:value-type="float" office:value="0.458836">
                <text:p>0.458836</text:p>
              </table:table-cell>
              <table:table-cell office:value-type="float" office:value="0.068483">
                <text:p>0.0684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0.298186">
                <text:p>0.298186</text:p>
              </table:table-cell>
              <table:table-cell office:value-type="float" office:value="0.001117">
                <text:p>0.001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764707">
                <text:p>0.764707</text:p>
              </table:table-cell>
              <table:table-cell office:value-type="float" office:value="0.001832">
                <text:p>0.001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1.401671">
                <text:p>1.401671</text:p>
              </table:table-cell>
              <table:table-cell office:value-type="float" office:value="0.003739">
                <text:p>0.0037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2.696085">
                <text:p>2.696085</text:p>
              </table:table-cell>
              <table:table-cell office:value-type="float" office:value="0.01107">
                <text:p>0.011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5.40248">
                <text:p>5.40248</text:p>
              </table:table-cell>
              <table:table-cell office:value-type="float" office:value="0.021601">
                <text:p>0.0216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11.550387">
                <text:p>11.550387</text:p>
              </table:table-cell>
              <table:table-cell office:value-type="float" office:value="0.036691">
                <text:p>0.0366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24.677414">
                <text:p>24.677414</text:p>
              </table:table-cell>
              <table:table-cell office:value-type="float" office:value="0.074021">
                <text:p>0.074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55.569282">
                <text:p>55.569282</text:p>
              </table:table-cell>
              <table:table-cell office:value-type="float" office:value="0.147907">
                <text:p>0.1479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115.501447">
                <text:p>115.501447</text:p>
              </table:table-cell>
              <table:table-cell office:value-type="float" office:value="0.499056">
                <text:p>0.499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8576">
                <text:p>1048576</text:p>
              </table:table-cell>
              <table:table-cell office:value-type="float" office:value="254.591907">
                <text:p>254.591907</text:p>
              </table:table-cell>
              <table:table-cell office:value-type="float" office:value="1.329124">
                <text:p>1.329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1.771cm" svg:y="3.951cm" style:legend-expansion="high" chart:style-name="ch2"/>
        <chart:plot-area chart:style-name="ch3" chart:data-source-has-labels="both" svg:x="1.33cm" svg:y="0.179cm" svg:width="10.122cm" svg:height="7.66cm">
          <chart:coordinate-region svg:x="3.063cm" svg:y="0.378cm" svg:width="7.739cm" svg:height="6.814cm"/>
          <chart:axis chart:dimension="x" chart:name="primary-x" chart:style-name="ch4" chartooo:axis-type="auto">
            <chart:title svg:x="6.241cm" svg:y="8.018cm" chart:style-name="ch5">
              <text:p>n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4.701cm" chart:style-name="ch7">
              <text:p>Time(ns)</text:p>
            </chart:title>
            <chart:grid chart:style-name="ch8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10" chart:values-cell-range-address="local-table.$D$2:.$D$12" chart:label-cell-address="local-table.$D$1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Typical</text:p>
              </table:table-cell>
              <table:table-cell office:value-type="string">
                <text:p>Analysis Algorith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</table:table-cell>
              <table:table-cell office:value-type="float" office:value="2240">
                <text:p>2240</text:p>
              </table:table-cell>
              <table:table-cell office:value-type="float" office:value="42614">
                <text:p>426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409">
                <text:p>409</text:p>
              </table:table-cell>
              <table:table-cell office:value-type="float" office:value="15675">
                <text:p>15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453">
                <text:p>453</text:p>
              </table:table-cell>
              <table:table-cell office:value-type="float" office:value="30447">
                <text:p>30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546">
                <text:p>546</text:p>
              </table:table-cell>
              <table:table-cell office:value-type="float" office:value="64698">
                <text:p>64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259">
                <text:p>259</text:p>
              </table:table-cell>
              <table:table-cell office:value-type="float" office:value="153784">
                <text:p>1537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266">
                <text:p>266</text:p>
              </table:table-cell>
              <table:table-cell office:value-type="float" office:value="353475">
                <text:p>353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355">
                <text:p>355</text:p>
              </table:table-cell>
              <table:table-cell office:value-type="float" office:value="665121">
                <text:p>665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340">
                <text:p>340</text:p>
              </table:table-cell>
              <table:table-cell office:value-type="float" office:value="1623062">
                <text:p>1623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83">
                <text:p>83</text:p>
              </table:table-cell>
              <table:table-cell office:value-type="float" office:value="5162537">
                <text:p>51625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29">
                <text:p>29</text:p>
              </table:table-cell>
              <table:table-cell office:value-type="float" office:value="12453062">
                <text:p>12453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8576">
                <text:p>1048576</text:p>
              </table:table-cell>
              <table:table-cell office:value-type="float" office:value="53">
                <text:p>53</text:p>
              </table:table-cell>
              <table:table-cell office:value-type="float" office:value="19950385">
                <text:p>199503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